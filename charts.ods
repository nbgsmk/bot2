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de_history" table:style-name="ta1">
        <table:shapes>
          <draw:frame draw:z-index="0" draw:style-name="gr1" draw:text-style-name="P1" svg:width="27.901cm" svg:height="14.901cm" svg:x="2.878cm" svg:y="0.877cm">
            <draw:object draw:notify-on-update-of-ranges="trade_history.E1:trade_history.E1 trade_history.E2:trade_history.E297 trade_history.F1:trade_history.F1 trade_history.F2:trade_history.F297 trade_history.G1:trade_history.G1 trade_history.G2:trade_history.G2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BTC_open</text:p>
          </table:table-cell>
          <table:table-cell office:value-type="string" calcext:value-type="string">
            <text:p>BTC_high</text:p>
          </table:table-cell>
          <table:table-cell office:value-type="string" calcext:value-type="string">
            <text:p>BTC_low</text:p>
          </table:table-cell>
          <table:table-cell office:value-type="string" calcext:value-type="string">
            <text:p>BTC_close</text:p>
          </table:table-cell>
          <table:table-cell office:value-type="string" calcext:value-type="string">
            <text:p>BTC_volume</text:p>
          </table:table-cell>
          <table:table-cell office:value-type="string" calcext:value-type="string">
            <text:p>BTC_trades</text:p>
          </table:table-cell>
          <table:table-cell office:value-type="string" calcext:value-type="string">
            <text:p>ETH_open</text:p>
          </table:table-cell>
          <table:table-cell office:value-type="string" calcext:value-type="string">
            <text:p>ETH_high</text:p>
          </table:table-cell>
          <table:table-cell office:value-type="string" calcext:value-type="string">
            <text:p>ETH_low</text:p>
          </table:table-cell>
          <table:table-cell office:value-type="string" calcext:value-type="string">
            <text:p>ETH_close</text:p>
          </table:table-cell>
          <table:table-cell office:value-type="string" calcext:value-type="string">
            <text:p>ETH_volume</text:p>
          </table:table-cell>
          <table:table-cell office:value-type="string" calcext:value-type="string">
            <text:p>ETH_trades</text:p>
          </table:table-cell>
        </table:table-row>
        <table:table-row table:style-name="ro1">
          <table:table-cell office:value-type="string" calcext:value-type="string">
            <text:p>2026-07-04T02:32:07.529Z</text:p>
          </table:table-cell>
          <table:table-cell office:value-type="float" office:value="62479.99" calcext:value-type="float">
            <text:p>62479.99</text:p>
          </table:table-cell>
          <table:table-cell office:value-type="float" office:value="62500" calcext:value-type="float">
            <text:p>62500</text:p>
          </table:table-cell>
          <table:table-cell office:value-type="float" office:value="62450" calcext:value-type="float">
            <text:p>62450</text:p>
          </table:table-cell>
          <table:table-cell office:value-type="float" office:value="62494.2" calcext:value-type="float">
            <text:p>62494.2</text:p>
          </table:table-cell>
          <table:table-cell office:value-type="float" office:value="44.05532" calcext:value-type="float">
            <text:p>44.05532</text:p>
          </table:table-cell>
          <table:table-cell office:value-type="float" office:value="6725" calcext:value-type="float">
            <text:p>6725</text:p>
          </table:table-cell>
          <table:table-cell office:value-type="float" office:value="1747.57" calcext:value-type="float">
            <text:p>1747.57</text:p>
          </table:table-cell>
          <table:table-cell office:value-type="float" office:value="1748.67" calcext:value-type="float">
            <text:p>1748.67</text:p>
          </table:table-cell>
          <table:table-cell office:value-type="float" office:value="1747.24" calcext:value-type="float">
            <text:p>1747.24</text:p>
          </table:table-cell>
          <table:table-cell office:value-type="float" office:value="1748.22" calcext:value-type="float">
            <text:p>1748.22</text:p>
          </table:table-cell>
          <table:table-cell office:value-type="float" office:value="110.4476" calcext:value-type="float">
            <text:p>110.4476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2026-07-04T02:37:08.056Z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62432" calcext:value-type="float">
            <text:p>62432</text:p>
          </table:table-cell>
          <table:table-cell office:value-type="float" office:value="62451.99" calcext:value-type="float">
            <text:p>62451.99</text:p>
          </table:table-cell>
          <table:table-cell office:value-type="float" office:value="9.30675" calcext:value-type="float">
            <text:p>9.30675</text:p>
          </table:table-cell>
          <table:table-cell office:value-type="float" office:value="3319" calcext:value-type="float">
            <text:p>3319</text:p>
          </table:table-cell>
          <table:table-cell office:value-type="float" office:value="1748.51" calcext:value-type="float">
            <text:p>1748.51</text:p>
          </table:table-cell>
          <table:table-cell office:value-type="float" office:value="1748.52" calcext:value-type="float">
            <text:p>1748.52</text:p>
          </table:table-cell>
          <table:table-cell office:value-type="float" office:value="1744.09" calcext:value-type="float">
            <text:p>1744.09</text:p>
          </table:table-cell>
          <table:table-cell office:value-type="float" office:value="1746.61" calcext:value-type="float">
            <text:p>1746.61</text:p>
          </table:table-cell>
          <table:table-cell office:value-type="float" office:value="628.144" calcext:value-type="float">
            <text:p>628.144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string" calcext:value-type="string">
            <text:p>2026-07-04T02:42:08.071Z</text:p>
          </table:table-cell>
          <table:table-cell office:value-type="float" office:value="62450" calcext:value-type="float">
            <text:p>62450</text:p>
          </table:table-cell>
          <table:table-cell office:value-type="float" office:value="62493.34" calcext:value-type="float">
            <text:p>62493.34</text:p>
          </table:table-cell>
          <table:table-cell office:value-type="float" office:value="62446.41" calcext:value-type="float">
            <text:p>62446.41</text:p>
          </table:table-cell>
          <table:table-cell office:value-type="float" office:value="62489.99" calcext:value-type="float">
            <text:p>62489.99</text:p>
          </table:table-cell>
          <table:table-cell office:value-type="float" office:value="29.76951" calcext:value-type="float">
            <text:p>29.76951</text:p>
          </table:table-cell>
          <table:table-cell office:value-type="float" office:value="5414" calcext:value-type="float">
            <text:p>5414</text:p>
          </table:table-cell>
          <table:table-cell office:value-type="float" office:value="1746.15" calcext:value-type="float">
            <text:p>1746.15</text:p>
          </table:table-cell>
          <table:table-cell office:value-type="float" office:value="1747.88" calcext:value-type="float">
            <text:p>1747.88</text:p>
          </table:table-cell>
          <table:table-cell office:value-type="float" office:value="1745.94" calcext:value-type="float">
            <text:p>1745.94</text:p>
          </table:table-cell>
          <table:table-cell office:value-type="float" office:value="1747.38" calcext:value-type="float">
            <text:p>1747.38</text:p>
          </table:table-cell>
          <table:table-cell office:value-type="float" office:value="228.7682" calcext:value-type="float">
            <text:p>228.7682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2026-07-04T02:47:08.099Z</text:p>
          </table:table-cell>
          <table:table-cell office:value-type="float" office:value="62490" calcext:value-type="float">
            <text:p>62490</text:p>
          </table:table-cell>
          <table:table-cell office:value-type="float" office:value="62518.01" calcext:value-type="float">
            <text:p>62518.01</text:p>
          </table:table-cell>
          <table:table-cell office:value-type="float" office:value="62484.03" calcext:value-type="float">
            <text:p>62484.03</text:p>
          </table:table-cell>
          <table:table-cell office:value-type="float" office:value="62500" calcext:value-type="float">
            <text:p>62500</text:p>
          </table:table-cell>
          <table:table-cell office:value-type="float" office:value="12.21408" calcext:value-type="float">
            <text:p>12.21408</text:p>
          </table:table-cell>
          <table:table-cell office:value-type="float" office:value="3937" calcext:value-type="float">
            <text:p>3937</text:p>
          </table:table-cell>
          <table:table-cell office:value-type="float" office:value="1747.38" calcext:value-type="float">
            <text:p>1747.38</text:p>
          </table:table-cell>
          <table:table-cell office:value-type="float" office:value="1749" calcext:value-type="float">
            <text:p>1749</text:p>
          </table:table-cell>
          <table:table-cell office:value-type="float" office:value="1747.38" calcext:value-type="float">
            <text:p>1747.38</text:p>
          </table:table-cell>
          <table:table-cell office:value-type="float" office:value="1747.78" calcext:value-type="float">
            <text:p>1747.78</text:p>
          </table:table-cell>
          <table:table-cell office:value-type="float" office:value="315.2058" calcext:value-type="float">
            <text:p>315.2058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2026-07-04T02:52:08.105Z</text:p>
          </table:table-cell>
          <table:table-cell office:value-type="float" office:value="62500" calcext:value-type="float">
            <text:p>62500</text:p>
          </table:table-cell>
          <table:table-cell office:value-type="float" office:value="62561.41" calcext:value-type="float">
            <text:p>62561.41</text:p>
          </table:table-cell>
          <table:table-cell office:value-type="float" office:value="62478" calcext:value-type="float">
            <text:p>62478</text:p>
          </table:table-cell>
          <table:table-cell office:value-type="float" office:value="62561.4" calcext:value-type="float">
            <text:p>62561.4</text:p>
          </table:table-cell>
          <table:table-cell office:value-type="float" office:value="27.45148" calcext:value-type="float">
            <text:p>27.45148</text:p>
          </table:table-cell>
          <table:table-cell office:value-type="float" office:value="5290" calcext:value-type="float">
            <text:p>5290</text:p>
          </table:table-cell>
          <table:table-cell office:value-type="float" office:value="1747.79" calcext:value-type="float">
            <text:p>1747.79</text:p>
          </table:table-cell>
          <table:table-cell office:value-type="float" office:value="1750.59" calcext:value-type="float">
            <text:p>1750.59</text:p>
          </table:table-cell>
          <table:table-cell office:value-type="float" office:value="1747.07" calcext:value-type="float">
            <text:p>1747.07</text:p>
          </table:table-cell>
          <table:table-cell office:value-type="float" office:value="1750.58" calcext:value-type="float">
            <text:p>1750.58</text:p>
          </table:table-cell>
          <table:table-cell office:value-type="float" office:value="500.4897" calcext:value-type="float">
            <text:p>500.4897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string" calcext:value-type="string">
            <text:p>2026-07-04T02:57:08.129Z</text:p>
          </table:table-cell>
          <table:table-cell office:value-type="float" office:value="62549.68" calcext:value-type="float">
            <text:p>62549.68</text:p>
          </table:table-cell>
          <table:table-cell office:value-type="float" office:value="62576" calcext:value-type="float">
            <text:p>62576</text:p>
          </table:table-cell>
          <table:table-cell office:value-type="float" office:value="62548" calcext:value-type="float">
            <text:p>62548</text:p>
          </table:table-cell>
          <table:table-cell office:value-type="float" office:value="62550" calcext:value-type="float">
            <text:p>62550</text:p>
          </table:table-cell>
          <table:table-cell office:value-type="float" office:value="5.18047" calcext:value-type="float">
            <text:p>5.18047</text:p>
          </table:table-cell>
          <table:table-cell office:value-type="float" office:value="2907" calcext:value-type="float">
            <text:p>2907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51.04" calcext:value-type="float">
            <text:p>1751.04</text:p>
          </table:table-cell>
          <table:table-cell office:value-type="float" office:value="1749.05" calcext:value-type="float">
            <text:p>1749.05</text:p>
          </table:table-cell>
          <table:table-cell office:value-type="float" office:value="1749.28" calcext:value-type="float">
            <text:p>1749.28</text:p>
          </table:table-cell>
          <table:table-cell office:value-type="float" office:value="163.7582" calcext:value-type="float">
            <text:p>163.7582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2026-07-04T03:02:08.135Z</text:p>
          </table:table-cell>
          <table:table-cell office:value-type="float" office:value="62554.3" calcext:value-type="float">
            <text:p>62554.3</text:p>
          </table:table-cell>
          <table:table-cell office:value-type="float" office:value="62580" calcext:value-type="float">
            <text:p>62580</text:p>
          </table:table-cell>
          <table:table-cell office:value-type="float" office:value="62530.63" calcext:value-type="float">
            <text:p>62530.63</text:p>
          </table:table-cell>
          <table:table-cell office:value-type="float" office:value="62568" calcext:value-type="float">
            <text:p>62568</text:p>
          </table:table-cell>
          <table:table-cell office:value-type="float" office:value="23.42607" calcext:value-type="float">
            <text:p>23.42607</text:p>
          </table:table-cell>
          <table:table-cell office:value-type="float" office:value="5076" calcext:value-type="float">
            <text:p>5076</text:p>
          </table:table-cell>
          <table:table-cell office:value-type="float" office:value="1749.18" calcext:value-type="float">
            <text:p>1749.18</text:p>
          </table:table-cell>
          <table:table-cell office:value-type="float" office:value="1750.45" calcext:value-type="float">
            <text:p>1750.45</text:p>
          </table:table-cell>
          <table:table-cell office:value-type="float" office:value="1748.54" calcext:value-type="float">
            <text:p>1748.54</text:p>
          </table:table-cell>
          <table:table-cell office:value-type="float" office:value="1749.71" calcext:value-type="float">
            <text:p>1749.71</text:p>
          </table:table-cell>
          <table:table-cell office:value-type="float" office:value="755.4278" calcext:value-type="float">
            <text:p>755.4278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string" calcext:value-type="string">
            <text:p>2026-07-04T03:07:08.164Z</text:p>
          </table:table-cell>
          <table:table-cell table:number-columns-repeated="2" office:value-type="float" office:value="62580" calcext:value-type="float">
            <text:p>62580</text:p>
          </table:table-cell>
          <table:table-cell office:value-type="float" office:value="62484.01" calcext:value-type="float">
            <text:p>62484.01</text:p>
          </table:table-cell>
          <table:table-cell office:value-type="float" office:value="62503.03" calcext:value-type="float">
            <text:p>62503.03</text:p>
          </table:table-cell>
          <table:table-cell office:value-type="float" office:value="15.26009" calcext:value-type="float">
            <text:p>15.26009</text:p>
          </table:table-cell>
          <table:table-cell office:value-type="float" office:value="6577" calcext:value-type="float">
            <text:p>6577</text:p>
          </table:table-cell>
          <table:table-cell office:value-type="float" office:value="1750.45" calcext:value-type="float">
            <text:p>1750.45</text:p>
          </table:table-cell>
          <table:table-cell office:value-type="float" office:value="1750.52" calcext:value-type="float">
            <text:p>1750.52</text:p>
          </table:table-cell>
          <table:table-cell office:value-type="float" office:value="1747.35" calcext:value-type="float">
            <text:p>1747.35</text:p>
          </table:table-cell>
          <table:table-cell office:value-type="float" office:value="1748.06" calcext:value-type="float">
            <text:p>1748.06</text:p>
          </table:table-cell>
          <table:table-cell office:value-type="float" office:value="808.5669" calcext:value-type="float">
            <text:p>808.5669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2026-07-04T03:12:08.193Z</text:p>
          </table:table-cell>
          <table:table-cell office:value-type="float" office:value="62503.02" calcext:value-type="float">
            <text:p>62503.02</text:p>
          </table:table-cell>
          <table:table-cell office:value-type="float" office:value="62532" calcext:value-type="float">
            <text:p>62532</text:p>
          </table:table-cell>
          <table:table-cell office:value-type="float" office:value="62503.02" calcext:value-type="float">
            <text:p>62503.02</text:p>
          </table:table-cell>
          <table:table-cell office:value-type="float" office:value="62531.99" calcext:value-type="float">
            <text:p>62531.99</text:p>
          </table:table-cell>
          <table:table-cell office:value-type="float" office:value="18.5418" calcext:value-type="float">
            <text:p>18.5418</text:p>
          </table:table-cell>
          <table:table-cell office:value-type="float" office:value="4105" calcext:value-type="float">
            <text:p>4105</text:p>
          </table:table-cell>
          <table:table-cell office:value-type="float" office:value="1748.05" calcext:value-type="float">
            <text:p>1748.05</text:p>
          </table:table-cell>
          <table:table-cell office:value-type="float" office:value="1749.09" calcext:value-type="float">
            <text:p>1749.09</text:p>
          </table:table-cell>
          <table:table-cell office:value-type="float" office:value="1747.26" calcext:value-type="float">
            <text:p>1747.26</text:p>
          </table:table-cell>
          <table:table-cell office:value-type="float" office:value="1749.09" calcext:value-type="float">
            <text:p>1749.09</text:p>
          </table:table-cell>
          <table:table-cell office:value-type="float" office:value="280.7891" calcext:value-type="float">
            <text:p>280.7891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string" calcext:value-type="string">
            <text:p>2026-07-04T03:17:08.222Z</text:p>
          </table:table-cell>
          <table:table-cell office:value-type="float" office:value="62522" calcext:value-type="float">
            <text:p>62522</text:p>
          </table:table-cell>
          <table:table-cell office:value-type="float" office:value="62583.56" calcext:value-type="float">
            <text:p>62583.56</text:p>
          </table:table-cell>
          <table:table-cell office:value-type="float" office:value="62522" calcext:value-type="float">
            <text:p>62522</text:p>
          </table:table-cell>
          <table:table-cell office:value-type="float" office:value="62574" calcext:value-type="float">
            <text:p>62574</text:p>
          </table:table-cell>
          <table:table-cell office:value-type="float" office:value="13.71096" calcext:value-type="float">
            <text:p>13.71096</text:p>
          </table:table-cell>
          <table:table-cell office:value-type="float" office:value="5586" calcext:value-type="float">
            <text:p>5586</text:p>
          </table:table-cell>
          <table:table-cell office:value-type="float" office:value="1748.71" calcext:value-type="float">
            <text:p>1748.71</text:p>
          </table:table-cell>
          <table:table-cell office:value-type="float" office:value="1750.54" calcext:value-type="float">
            <text:p>1750.54</text:p>
          </table:table-cell>
          <table:table-cell office:value-type="float" office:value="1748.71" calcext:value-type="float">
            <text:p>1748.71</text:p>
          </table:table-cell>
          <table:table-cell office:value-type="float" office:value="1749.52" calcext:value-type="float">
            <text:p>1749.52</text:p>
          </table:table-cell>
          <table:table-cell office:value-type="float" office:value="244.8957" calcext:value-type="float">
            <text:p>244.8957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string" calcext:value-type="string">
            <text:p>2026-07-04T03:22:08.225Z</text:p>
          </table:table-cell>
          <table:table-cell office:value-type="float" office:value="62583.55" calcext:value-type="float">
            <text:p>62583.55</text:p>
          </table:table-cell>
          <table:table-cell office:value-type="float" office:value="62584.45" calcext:value-type="float">
            <text:p>62584.45</text:p>
          </table:table-cell>
          <table:table-cell office:value-type="float" office:value="62544.88" calcext:value-type="float">
            <text:p>62544.88</text:p>
          </table:table-cell>
          <table:table-cell office:value-type="float" office:value="62557.99" calcext:value-type="float">
            <text:p>62557.99</text:p>
          </table:table-cell>
          <table:table-cell office:value-type="float" office:value="20.54859" calcext:value-type="float">
            <text:p>20.54859</text:p>
          </table:table-cell>
          <table:table-cell office:value-type="float" office:value="5380" calcext:value-type="float">
            <text:p>538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13" calcext:value-type="float">
            <text:p>1750.13</text:p>
          </table:table-cell>
          <table:table-cell office:value-type="float" office:value="1748.39" calcext:value-type="float">
            <text:p>1748.39</text:p>
          </table:table-cell>
          <table:table-cell office:value-type="float" office:value="1749.23" calcext:value-type="float">
            <text:p>1749.23</text:p>
          </table:table-cell>
          <table:table-cell office:value-type="float" office:value="206.2846" calcext:value-type="float">
            <text:p>206.2846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2026-07-04T03:27:08.253Z</text:p>
          </table:table-cell>
          <table:table-cell office:value-type="float" office:value="62558" calcext:value-type="float">
            <text:p>62558</text:p>
          </table:table-cell>
          <table:table-cell office:value-type="float" office:value="62566" calcext:value-type="float">
            <text:p>62566</text:p>
          </table:table-cell>
          <table:table-cell office:value-type="float" office:value="62553" calcext:value-type="float">
            <text:p>62553</text:p>
          </table:table-cell>
          <table:table-cell office:value-type="float" office:value="62565.99" calcext:value-type="float">
            <text:p>62565.99</text:p>
          </table:table-cell>
          <table:table-cell office:value-type="float" office:value="6.91714" calcext:value-type="float">
            <text:p>6.91714</text:p>
          </table:table-cell>
          <table:table-cell office:value-type="float" office:value="2668" calcext:value-type="float">
            <text:p>2668</text:p>
          </table:table-cell>
          <table:table-cell office:value-type="float" office:value="1749.14" calcext:value-type="float">
            <text:p>1749.14</text:p>
          </table:table-cell>
          <table:table-cell office:value-type="float" office:value="1750.14" calcext:value-type="float">
            <text:p>1750.14</text:p>
          </table:table-cell>
          <table:table-cell office:value-type="float" office:value="1749.14" calcext:value-type="float">
            <text:p>1749.14</text:p>
          </table:table-cell>
          <table:table-cell office:value-type="float" office:value="1749.68" calcext:value-type="float">
            <text:p>1749.68</text:p>
          </table:table-cell>
          <table:table-cell office:value-type="float" office:value="134.43" calcext:value-type="float">
            <text:p>134.43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2026-07-04T03:32:08.281Z</text:p>
          </table:table-cell>
          <table:table-cell office:value-type="float" office:value="62565.99" calcext:value-type="float">
            <text:p>62565.99</text:p>
          </table:table-cell>
          <table:table-cell office:value-type="float" office:value="62572.21" calcext:value-type="float">
            <text:p>62572.21</text:p>
          </table:table-cell>
          <table:table-cell office:value-type="float" office:value="62520" calcext:value-type="float">
            <text:p>62520</text:p>
          </table:table-cell>
          <table:table-cell office:value-type="float" office:value="62553.98" calcext:value-type="float">
            <text:p>62553.98</text:p>
          </table:table-cell>
          <table:table-cell office:value-type="float" office:value="23.12008" calcext:value-type="float">
            <text:p>23.12008</text:p>
          </table:table-cell>
          <table:table-cell office:value-type="float" office:value="4479" calcext:value-type="float">
            <text:p>4479</text:p>
          </table:table-cell>
          <table:table-cell office:value-type="float" office:value="1749.68" calcext:value-type="float">
            <text:p>1749.68</text:p>
          </table:table-cell>
          <table:table-cell office:value-type="float" office:value="1749.69" calcext:value-type="float">
            <text:p>1749.69</text:p>
          </table:table-cell>
          <table:table-cell office:value-type="float" office:value="1748" calcext:value-type="float">
            <text:p>1748</text:p>
          </table:table-cell>
          <table:table-cell office:value-type="float" office:value="1748.73" calcext:value-type="float">
            <text:p>1748.73</text:p>
          </table:table-cell>
          <table:table-cell office:value-type="float" office:value="569.0704" calcext:value-type="float">
            <text:p>569.0704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2026-07-04T03:37:08.308Z</text:p>
          </table:table-cell>
          <table:table-cell office:value-type="float" office:value="62520" calcext:value-type="float">
            <text:p>62520</text:p>
          </table:table-cell>
          <table:table-cell office:value-type="float" office:value="62750" calcext:value-type="float">
            <text:p>62750</text:p>
          </table:table-cell>
          <table:table-cell office:value-type="float" office:value="62520" calcext:value-type="float">
            <text:p>62520</text:p>
          </table:table-cell>
          <table:table-cell office:value-type="float" office:value="62720" calcext:value-type="float">
            <text:p>62720</text:p>
          </table:table-cell>
          <table:table-cell office:value-type="float" office:value="57.90974" calcext:value-type="float">
            <text:p>57.90974</text:p>
          </table:table-cell>
          <table:table-cell office:value-type="float" office:value="13984" calcext:value-type="float">
            <text:p>13984</text:p>
          </table:table-cell>
          <table:table-cell office:value-type="float" office:value="1748.08" calcext:value-type="float">
            <text:p>1748.08</text:p>
          </table:table-cell>
          <table:table-cell office:value-type="float" office:value="1754.19" calcext:value-type="float">
            <text:p>1754.19</text:p>
          </table:table-cell>
          <table:table-cell office:value-type="float" office:value="1748.07" calcext:value-type="float">
            <text:p>1748.07</text:p>
          </table:table-cell>
          <table:table-cell office:value-type="float" office:value="1753.05" calcext:value-type="float">
            <text:p>1753.05</text:p>
          </table:table-cell>
          <table:table-cell office:value-type="float" office:value="529.9601" calcext:value-type="float">
            <text:p>529.9601</text:p>
          </table:table-cell>
          <table:table-cell office:value-type="float" office:value="11683" calcext:value-type="float">
            <text:p>11683</text:p>
          </table:table-cell>
        </table:table-row>
        <table:table-row table:style-name="ro1">
          <table:table-cell office:value-type="string" calcext:value-type="string">
            <text:p>2026-07-04T03:42:08.331Z</text:p>
          </table:table-cell>
          <table:table-cell office:value-type="float" office:value="62712.2" calcext:value-type="float">
            <text:p>62712.2</text:p>
          </table:table-cell>
          <table:table-cell office:value-type="float" office:value="62720" calcext:value-type="float">
            <text:p>62720</text:p>
          </table:table-cell>
          <table:table-cell office:value-type="float" office:value="62686.01" calcext:value-type="float">
            <text:p>62686.01</text:p>
          </table:table-cell>
          <table:table-cell office:value-type="float" office:value="62718.8" calcext:value-type="float">
            <text:p>62718.8</text:p>
          </table:table-cell>
          <table:table-cell office:value-type="float" office:value="27.01405" calcext:value-type="float">
            <text:p>27.01405</text:p>
          </table:table-cell>
          <table:table-cell office:value-type="float" office:value="6291" calcext:value-type="float">
            <text:p>6291</text:p>
          </table:table-cell>
          <table:table-cell office:value-type="float" office:value="1752.84" calcext:value-type="float">
            <text:p>1752.84</text:p>
          </table:table-cell>
          <table:table-cell office:value-type="float" office:value="1755.83" calcext:value-type="float">
            <text:p>1755.83</text:p>
          </table:table-cell>
          <table:table-cell office:value-type="float" office:value="1752.4" calcext:value-type="float">
            <text:p>1752.4</text:p>
          </table:table-cell>
          <table:table-cell office:value-type="float" office:value="1755.83" calcext:value-type="float">
            <text:p>1755.83</text:p>
          </table:table-cell>
          <table:table-cell office:value-type="float" office:value="1027.437" calcext:value-type="float">
            <text:p>1027.437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2026-07-04T03:47:08.334Z</text:p>
          </table:table-cell>
          <table:table-cell office:value-type="float" office:value="62698.8" calcext:value-type="float">
            <text:p>62698.8</text:p>
          </table:table-cell>
          <table:table-cell office:value-type="float" office:value="62729.87" calcext:value-type="float">
            <text:p>62729.87</text:p>
          </table:table-cell>
          <table:table-cell table:number-columns-repeated="2" office:value-type="float" office:value="62682.01" calcext:value-type="float">
            <text:p>62682.01</text:p>
          </table:table-cell>
          <table:table-cell office:value-type="float" office:value="39.21199" calcext:value-type="float">
            <text:p>39.21199</text:p>
          </table:table-cell>
          <table:table-cell office:value-type="float" office:value="6369" calcext:value-type="float">
            <text:p>6369</text:p>
          </table:table-cell>
          <table:table-cell office:value-type="float" office:value="1755.12" calcext:value-type="float">
            <text:p>1755.12</text:p>
          </table:table-cell>
          <table:table-cell office:value-type="float" office:value="1756.74" calcext:value-type="float">
            <text:p>1756.74</text:p>
          </table:table-cell>
          <table:table-cell office:value-type="float" office:value="1754.44" calcext:value-type="float">
            <text:p>1754.44</text:p>
          </table:table-cell>
          <table:table-cell office:value-type="float" office:value="1754.45" calcext:value-type="float">
            <text:p>1754.45</text:p>
          </table:table-cell>
          <table:table-cell office:value-type="float" office:value="415.8164" calcext:value-type="float">
            <text:p>415.8164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2026-07-04T03:52:08.362Z</text:p>
          </table:table-cell>
          <table:table-cell office:value-type="float" office:value="62685.02" calcext:value-type="float">
            <text:p>62685.02</text:p>
          </table:table-cell>
          <table:table-cell office:value-type="float" office:value="62703.23" calcext:value-type="float">
            <text:p>62703.23</text:p>
          </table:table-cell>
          <table:table-cell office:value-type="float" office:value="62668.71" calcext:value-type="float">
            <text:p>62668.71</text:p>
          </table:table-cell>
          <table:table-cell office:value-type="float" office:value="62683.57" calcext:value-type="float">
            <text:p>62683.57</text:p>
          </table:table-cell>
          <table:table-cell office:value-type="float" office:value="19.1702" calcext:value-type="float">
            <text:p>19.1702</text:p>
          </table:table-cell>
          <table:table-cell office:value-type="float" office:value="4791" calcext:value-type="float">
            <text:p>4791</text:p>
          </table:table-cell>
          <table:table-cell office:value-type="float" office:value="1754.79" calcext:value-type="float">
            <text:p>1754.79</text:p>
          </table:table-cell>
          <table:table-cell office:value-type="float" office:value="1755.32" calcext:value-type="float">
            <text:p>1755.32</text:p>
          </table:table-cell>
          <table:table-cell office:value-type="float" office:value="1754.38" calcext:value-type="float">
            <text:p>1754.38</text:p>
          </table:table-cell>
          <table:table-cell office:value-type="float" office:value="1754.39" calcext:value-type="float">
            <text:p>1754.39</text:p>
          </table:table-cell>
          <table:table-cell office:value-type="float" office:value="294.675" calcext:value-type="float">
            <text:p>294.675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2026-07-04T03:57:08.389Z</text:p>
          </table:table-cell>
          <table:table-cell table:number-columns-repeated="2" office:value-type="float" office:value="62683.58" calcext:value-type="float">
            <text:p>62683.58</text:p>
          </table:table-cell>
          <table:table-cell office:value-type="float" office:value="62624.09" calcext:value-type="float">
            <text:p>62624.09</text:p>
          </table:table-cell>
          <table:table-cell office:value-type="float" office:value="62628.2" calcext:value-type="float">
            <text:p>62628.2</text:p>
          </table:table-cell>
          <table:table-cell office:value-type="float" office:value="30.08188" calcext:value-type="float">
            <text:p>30.08188</text:p>
          </table:table-cell>
          <table:table-cell office:value-type="float" office:value="3398" calcext:value-type="float">
            <text:p>3398</text:p>
          </table:table-cell>
          <table:table-cell table:number-columns-repeated="2" office:value-type="float" office:value="1754.83" calcext:value-type="float">
            <text:p>1754.83</text:p>
          </table:table-cell>
          <table:table-cell office:value-type="float" office:value="1753.09" calcext:value-type="float">
            <text:p>1753.09</text:p>
          </table:table-cell>
          <table:table-cell office:value-type="float" office:value="1753.4" calcext:value-type="float">
            <text:p>1753.4</text:p>
          </table:table-cell>
          <table:table-cell office:value-type="float" office:value="157.0354" calcext:value-type="float">
            <text:p>157.0354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2026-07-04T04:02:08.415Z</text:p>
          </table:table-cell>
          <table:table-cell office:value-type="float" office:value="62628.21" calcext:value-type="float">
            <text:p>62628.21</text:p>
          </table:table-cell>
          <table:table-cell office:value-type="float" office:value="62644.65" calcext:value-type="float">
            <text:p>62644.65</text:p>
          </table:table-cell>
          <table:table-cell table:number-columns-repeated="2" office:value-type="float" office:value="62626.81" calcext:value-type="float">
            <text:p>62626.81</text:p>
          </table:table-cell>
          <table:table-cell office:value-type="float" office:value="15.29787" calcext:value-type="float">
            <text:p>15.29787</text:p>
          </table:table-cell>
          <table:table-cell office:value-type="float" office:value="3578" calcext:value-type="float">
            <text:p>3578</text:p>
          </table:table-cell>
          <table:table-cell office:value-type="float" office:value="1753.4" calcext:value-type="float">
            <text:p>1753.4</text:p>
          </table:table-cell>
          <table:table-cell office:value-type="float" office:value="1754.31" calcext:value-type="float">
            <text:p>1754.31</text:p>
          </table:table-cell>
          <table:table-cell office:value-type="float" office:value="1753.39" calcext:value-type="float">
            <text:p>1753.39</text:p>
          </table:table-cell>
          <table:table-cell office:value-type="float" office:value="1753.51" calcext:value-type="float">
            <text:p>1753.51</text:p>
          </table:table-cell>
          <table:table-cell office:value-type="float" office:value="232.0416" calcext:value-type="float">
            <text:p>232.0416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2026-07-04T04:07:08.416Z</text:p>
          </table:table-cell>
          <table:table-cell office:value-type="float" office:value="62632.01" calcext:value-type="float">
            <text:p>62632.01</text:p>
          </table:table-cell>
          <table:table-cell office:value-type="float" office:value="62642" calcext:value-type="float">
            <text:p>62642</text:p>
          </table:table-cell>
          <table:table-cell office:value-type="float" office:value="62602.23" calcext:value-type="float">
            <text:p>62602.23</text:p>
          </table:table-cell>
          <table:table-cell office:value-type="float" office:value="62642" calcext:value-type="float">
            <text:p>62642</text:p>
          </table:table-cell>
          <table:table-cell office:value-type="float" office:value="16.91228" calcext:value-type="float">
            <text:p>16.91228</text:p>
          </table:table-cell>
          <table:table-cell office:value-type="float" office:value="4379" calcext:value-type="float">
            <text:p>4379</text:p>
          </table:table-cell>
          <table:table-cell office:value-type="float" office:value="1754.06" calcext:value-type="float">
            <text:p>1754.06</text:p>
          </table:table-cell>
          <table:table-cell office:value-type="float" office:value="1754.46" calcext:value-type="float">
            <text:p>1754.46</text:p>
          </table:table-cell>
          <table:table-cell office:value-type="float" office:value="1752.61" calcext:value-type="float">
            <text:p>1752.61</text:p>
          </table:table-cell>
          <table:table-cell office:value-type="float" office:value="1753.92" calcext:value-type="float">
            <text:p>1753.92</text:p>
          </table:table-cell>
          <table:table-cell office:value-type="float" office:value="260.5442" calcext:value-type="float">
            <text:p>260.544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string" calcext:value-type="string">
            <text:p>2026-07-04T04:12:08.417Z</text:p>
          </table:table-cell>
          <table:table-cell office:value-type="float" office:value="62642" calcext:value-type="float">
            <text:p>62642</text:p>
          </table:table-cell>
          <table:table-cell office:value-type="float" office:value="62704" calcext:value-type="float">
            <text:p>62704</text:p>
          </table:table-cell>
          <table:table-cell office:value-type="float" office:value="62641.99" calcext:value-type="float">
            <text:p>62641.99</text:p>
          </table:table-cell>
          <table:table-cell office:value-type="float" office:value="62699.99" calcext:value-type="float">
            <text:p>62699.99</text:p>
          </table:table-cell>
          <table:table-cell office:value-type="float" office:value="16.49978" calcext:value-type="float">
            <text:p>16.49978</text:p>
          </table:table-cell>
          <table:table-cell office:value-type="float" office:value="5378" calcext:value-type="float">
            <text:p>5378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1757.01" calcext:value-type="float">
            <text:p>1757.01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1756.98" calcext:value-type="float">
            <text:p>1756.98</text:p>
          </table:table-cell>
          <table:table-cell office:value-type="float" office:value="393.8845" calcext:value-type="float">
            <text:p>393.8845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string" calcext:value-type="string">
            <text:p>2026-07-04T04:17:08.423Z</text:p>
          </table:table-cell>
          <table:table-cell office:value-type="float" office:value="62698" calcext:value-type="float">
            <text:p>62698</text:p>
          </table:table-cell>
          <table:table-cell office:value-type="float" office:value="62700.38" calcext:value-type="float">
            <text:p>62700.38</text:p>
          </table:table-cell>
          <table:table-cell table:number-columns-repeated="2" office:value-type="float" office:value="62633.21" calcext:value-type="float">
            <text:p>62633.21</text:p>
          </table:table-cell>
          <table:table-cell office:value-type="float" office:value="8.41803" calcext:value-type="float">
            <text:p>8.41803</text:p>
          </table:table-cell>
          <table:table-cell office:value-type="float" office:value="3093" calcext:value-type="float">
            <text:p>3093</text:p>
          </table:table-cell>
          <table:table-cell office:value-type="float" office:value="1756.77" calcext:value-type="float">
            <text:p>1756.77</text:p>
          </table:table-cell>
          <table:table-cell office:value-type="float" office:value="1756.98" calcext:value-type="float">
            <text:p>1756.98</text:p>
          </table:table-cell>
          <table:table-cell office:value-type="float" office:value="1753" calcext:value-type="float">
            <text:p>1753</text:p>
          </table:table-cell>
          <table:table-cell office:value-type="float" office:value="1753.65" calcext:value-type="float">
            <text:p>1753.65</text:p>
          </table:table-cell>
          <table:table-cell office:value-type="float" office:value="462.2273" calcext:value-type="float">
            <text:p>462.2273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string" calcext:value-type="string">
            <text:p>2026-07-04T04:22:08.449Z</text:p>
          </table:table-cell>
          <table:table-cell office:value-type="float" office:value="62633.21" calcext:value-type="float">
            <text:p>62633.21</text:p>
          </table:table-cell>
          <table:table-cell office:value-type="float" office:value="62633.22" calcext:value-type="float">
            <text:p>62633.22</text:p>
          </table:table-cell>
          <table:table-cell office:value-type="float" office:value="62590.06" calcext:value-type="float">
            <text:p>62590.06</text:p>
          </table:table-cell>
          <table:table-cell office:value-type="float" office:value="62619.99" calcext:value-type="float">
            <text:p>62619.99</text:p>
          </table:table-cell>
          <table:table-cell office:value-type="float" office:value="32.53605" calcext:value-type="float">
            <text:p>32.53605</text:p>
          </table:table-cell>
          <table:table-cell office:value-type="float" office:value="3128" calcext:value-type="float">
            <text:p>3128</text:p>
          </table:table-cell>
          <table:table-cell office:value-type="float" office:value="1753.64" calcext:value-type="float">
            <text:p>1753.64</text:p>
          </table:table-cell>
          <table:table-cell office:value-type="float" office:value="1753.65" calcext:value-type="float">
            <text:p>1753.65</text:p>
          </table:table-cell>
          <table:table-cell office:value-type="float" office:value="1752" calcext:value-type="float">
            <text:p>1752</text:p>
          </table:table-cell>
          <table:table-cell office:value-type="float" office:value="1752.83" calcext:value-type="float">
            <text:p>1752.83</text:p>
          </table:table-cell>
          <table:table-cell office:value-type="float" office:value="308.37" calcext:value-type="float">
            <text:p>308.37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2026-07-04T04:27:08.454Z</text:p>
          </table:table-cell>
          <table:table-cell office:value-type="float" office:value="62619.99" calcext:value-type="float">
            <text:p>62619.99</text:p>
          </table:table-cell>
          <table:table-cell office:value-type="float" office:value="62718" calcext:value-type="float">
            <text:p>62718</text:p>
          </table:table-cell>
          <table:table-cell office:value-type="float" office:value="62619.99" calcext:value-type="float">
            <text:p>62619.99</text:p>
          </table:table-cell>
          <table:table-cell office:value-type="float" office:value="62706" calcext:value-type="float">
            <text:p>62706</text:p>
          </table:table-cell>
          <table:table-cell office:value-type="float" office:value="19.32323" calcext:value-type="float">
            <text:p>19.32323</text:p>
          </table:table-cell>
          <table:table-cell office:value-type="float" office:value="6338" calcext:value-type="float">
            <text:p>6338</text:p>
          </table:table-cell>
          <table:table-cell office:value-type="float" office:value="1752.94" calcext:value-type="float">
            <text:p>1752.94</text:p>
          </table:table-cell>
          <table:table-cell office:value-type="float" office:value="1756" calcext:value-type="float">
            <text:p>1756</text:p>
          </table:table-cell>
          <table:table-cell office:value-type="float" office:value="1752.83" calcext:value-type="float">
            <text:p>1752.83</text:p>
          </table:table-cell>
          <table:table-cell office:value-type="float" office:value="1755.36" calcext:value-type="float">
            <text:p>1755.36</text:p>
          </table:table-cell>
          <table:table-cell office:value-type="float" office:value="469.2411" calcext:value-type="float">
            <text:p>469.2411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2026-07-04T04:32:08.455Z</text:p>
          </table:table-cell>
          <table:table-cell office:value-type="float" office:value="62705.99" calcext:value-type="float">
            <text:p>62705.99</text:p>
          </table:table-cell>
          <table:table-cell office:value-type="float" office:value="62706" calcext:value-type="float">
            <text:p>62706</text:p>
          </table:table-cell>
          <table:table-cell office:value-type="float" office:value="62664" calcext:value-type="float">
            <text:p>62664</text:p>
          </table:table-cell>
          <table:table-cell office:value-type="float" office:value="62666.86" calcext:value-type="float">
            <text:p>62666.86</text:p>
          </table:table-cell>
          <table:table-cell office:value-type="float" office:value="10.68133" calcext:value-type="float">
            <text:p>10.68133</text:p>
          </table:table-cell>
          <table:table-cell office:value-type="float" office:value="2588" calcext:value-type="float">
            <text:p>2588</text:p>
          </table:table-cell>
          <table:table-cell table:number-columns-repeated="2" office:value-type="float" office:value="1755.36" calcext:value-type="float">
            <text:p>1755.36</text:p>
          </table:table-cell>
          <table:table-cell office:value-type="float" office:value="1753.71" calcext:value-type="float">
            <text:p>1753.71</text:p>
          </table:table-cell>
          <table:table-cell office:value-type="float" office:value="1754.17" calcext:value-type="float">
            <text:p>1754.17</text:p>
          </table:table-cell>
          <table:table-cell office:value-type="float" office:value="92.5951" calcext:value-type="float">
            <text:p>92.595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26-07-04T04:37:08.481Z</text:p>
          </table:table-cell>
          <table:table-cell office:value-type="float" office:value="62666.86" calcext:value-type="float">
            <text:p>62666.86</text:p>
          </table:table-cell>
          <table:table-cell office:value-type="float" office:value="62749.97" calcext:value-type="float">
            <text:p>62749.97</text:p>
          </table:table-cell>
          <table:table-cell office:value-type="float" office:value="62666.85" calcext:value-type="float">
            <text:p>62666.85</text:p>
          </table:table-cell>
          <table:table-cell office:value-type="float" office:value="62676.01" calcext:value-type="float">
            <text:p>62676.01</text:p>
          </table:table-cell>
          <table:table-cell office:value-type="float" office:value="20.26254" calcext:value-type="float">
            <text:p>20.26254</text:p>
          </table:table-cell>
          <table:table-cell office:value-type="float" office:value="6921" calcext:value-type="float">
            <text:p>6921</text:p>
          </table:table-cell>
          <table:table-cell office:value-type="float" office:value="1754.16" calcext:value-type="float">
            <text:p>1754.16</text:p>
          </table:table-cell>
          <table:table-cell office:value-type="float" office:value="1758.39" calcext:value-type="float">
            <text:p>1758.39</text:p>
          </table:table-cell>
          <table:table-cell office:value-type="float" office:value="1754.16" calcext:value-type="float">
            <text:p>1754.16</text:p>
          </table:table-cell>
          <table:table-cell office:value-type="float" office:value="1755.99" calcext:value-type="float">
            <text:p>1755.99</text:p>
          </table:table-cell>
          <table:table-cell office:value-type="float" office:value="839.5585" calcext:value-type="float">
            <text:p>839.5585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string" calcext:value-type="string">
            <text:p>2026-07-04T04:42:08.486Z</text:p>
          </table:table-cell>
          <table:table-cell office:value-type="float" office:value="62676" calcext:value-type="float">
            <text:p>62676</text:p>
          </table:table-cell>
          <table:table-cell office:value-type="float" office:value="62724" calcext:value-type="float">
            <text:p>62724</text:p>
          </table:table-cell>
          <table:table-cell office:value-type="float" office:value="62676" calcext:value-type="float">
            <text:p>62676</text:p>
          </table:table-cell>
          <table:table-cell office:value-type="float" office:value="62690" calcext:value-type="float">
            <text:p>62690</text:p>
          </table:table-cell>
          <table:table-cell office:value-type="float" office:value="13.35326" calcext:value-type="float">
            <text:p>13.35326</text:p>
          </table:table-cell>
          <table:table-cell office:value-type="float" office:value="6445" calcext:value-type="float">
            <text:p>6445</text:p>
          </table:table-cell>
          <table:table-cell office:value-type="float" office:value="1755.96" calcext:value-type="float">
            <text:p>1755.96</text:p>
          </table:table-cell>
          <table:table-cell office:value-type="float" office:value="1759.49" calcext:value-type="float">
            <text:p>1759.49</text:p>
          </table:table-cell>
          <table:table-cell office:value-type="float" office:value="1755.96" calcext:value-type="float">
            <text:p>1755.96</text:p>
          </table:table-cell>
          <table:table-cell office:value-type="float" office:value="1759.03" calcext:value-type="float">
            <text:p>1759.03</text:p>
          </table:table-cell>
          <table:table-cell office:value-type="float" office:value="606.8352" calcext:value-type="float">
            <text:p>606.8352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2026-07-04T04:47:08.489Z</text:p>
          </table:table-cell>
          <table:table-cell office:value-type="float" office:value="62691.99" calcext:value-type="float">
            <text:p>62691.99</text:p>
          </table:table-cell>
          <table:table-cell office:value-type="float" office:value="62721.56" calcext:value-type="float">
            <text:p>62721.56</text:p>
          </table:table-cell>
          <table:table-cell office:value-type="float" office:value="62672" calcext:value-type="float">
            <text:p>62672</text:p>
          </table:table-cell>
          <table:table-cell office:value-type="float" office:value="62707" calcext:value-type="float">
            <text:p>62707</text:p>
          </table:table-cell>
          <table:table-cell office:value-type="float" office:value="38.64998" calcext:value-type="float">
            <text:p>38.64998</text:p>
          </table:table-cell>
          <table:table-cell office:value-type="float" office:value="5824" calcext:value-type="float">
            <text:p>5824</text:p>
          </table:table-cell>
          <table:table-cell office:value-type="float" office:value="1759.06" calcext:value-type="float">
            <text:p>1759.06</text:p>
          </table:table-cell>
          <table:table-cell office:value-type="float" office:value="1760.57" calcext:value-type="float">
            <text:p>1760.57</text:p>
          </table:table-cell>
          <table:table-cell office:value-type="float" office:value="1757.71" calcext:value-type="float">
            <text:p>1757.71</text:p>
          </table:table-cell>
          <table:table-cell office:value-type="float" office:value="1758.39" calcext:value-type="float">
            <text:p>1758.39</text:p>
          </table:table-cell>
          <table:table-cell office:value-type="float" office:value="494.745" calcext:value-type="float">
            <text:p>494.745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string" calcext:value-type="string">
            <text:p>2026-07-04T04:52:08.515Z</text:p>
          </table:table-cell>
          <table:table-cell office:value-type="float" office:value="62721.56" calcext:value-type="float">
            <text:p>62721.56</text:p>
          </table:table-cell>
          <table:table-cell office:value-type="float" office:value="62740" calcext:value-type="float">
            <text:p>62740</text:p>
          </table:table-cell>
          <table:table-cell office:value-type="float" office:value="62701.12" calcext:value-type="float">
            <text:p>62701.12</text:p>
          </table:table-cell>
          <table:table-cell office:value-type="float" office:value="62702.01" calcext:value-type="float">
            <text:p>62702.01</text:p>
          </table:table-cell>
          <table:table-cell office:value-type="float" office:value="27.7938" calcext:value-type="float">
            <text:p>27.7938</text:p>
          </table:table-cell>
          <table:table-cell office:value-type="float" office:value="4918" calcext:value-type="float">
            <text:p>4918</text:p>
          </table:table-cell>
          <table:table-cell office:value-type="float" office:value="1759.4" calcext:value-type="float">
            <text:p>1759.4</text:p>
          </table:table-cell>
          <table:table-cell office:value-type="float" office:value="1764.61" calcext:value-type="float">
            <text:p>1764.61</text:p>
          </table:table-cell>
          <table:table-cell office:value-type="float" office:value="1758.31" calcext:value-type="float">
            <text:p>1758.31</text:p>
          </table:table-cell>
          <table:table-cell office:value-type="float" office:value="1762.05" calcext:value-type="float">
            <text:p>1762.05</text:p>
          </table:table-cell>
          <table:table-cell office:value-type="float" office:value="735.6751" calcext:value-type="float">
            <text:p>735.6751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2026-07-04T04:57:08.525Z</text:p>
          </table:table-cell>
          <table:table-cell table:number-columns-repeated="2" office:value-type="float" office:value="62726.01" calcext:value-type="float">
            <text:p>62726.01</text:p>
          </table:table-cell>
          <table:table-cell table:number-columns-repeated="2" office:value-type="float" office:value="62660" calcext:value-type="float">
            <text:p>62660</text:p>
          </table:table-cell>
          <table:table-cell office:value-type="float" office:value="38.50735" calcext:value-type="float">
            <text:p>38.50735</text:p>
          </table:table-cell>
          <table:table-cell office:value-type="float" office:value="4968" calcext:value-type="float">
            <text:p>4968</text:p>
          </table:table-cell>
          <table:table-cell table:number-columns-repeated="2" office:value-type="float" office:value="1763.41" calcext:value-type="float">
            <text:p>1763.41</text:p>
          </table:table-cell>
          <table:table-cell office:value-type="float" office:value="1759.01" calcext:value-type="float">
            <text:p>1759.01</text:p>
          </table:table-cell>
          <table:table-cell office:value-type="float" office:value="1760.17" calcext:value-type="float">
            <text:p>1760.17</text:p>
          </table:table-cell>
          <table:table-cell office:value-type="float" office:value="833.6615" calcext:value-type="float">
            <text:p>833.6615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2026-07-04T05:02:08.550Z</text:p>
          </table:table-cell>
          <table:table-cell office:value-type="float" office:value="62660" calcext:value-type="float">
            <text:p>62660</text:p>
          </table:table-cell>
          <table:table-cell office:value-type="float" office:value="62704" calcext:value-type="float">
            <text:p>62704</text:p>
          </table:table-cell>
          <table:table-cell office:value-type="float" office:value="62604.3" calcext:value-type="float">
            <text:p>62604.3</text:p>
          </table:table-cell>
          <table:table-cell office:value-type="float" office:value="62605.98" calcext:value-type="float">
            <text:p>62605.98</text:p>
          </table:table-cell>
          <table:table-cell office:value-type="float" office:value="138.41973" calcext:value-type="float">
            <text:p>138.41973</text:p>
          </table:table-cell>
          <table:table-cell office:value-type="float" office:value="7142" calcext:value-type="float">
            <text:p>7142</text:p>
          </table:table-cell>
          <table:table-cell office:value-type="float" office:value="1760.48" calcext:value-type="float">
            <text:p>1760.48</text:p>
          </table:table-cell>
          <table:table-cell office:value-type="float" office:value="1762.51" calcext:value-type="float">
            <text:p>1762.51</text:p>
          </table:table-cell>
          <table:table-cell office:value-type="float" office:value="1758.89" calcext:value-type="float">
            <text:p>1758.89</text:p>
          </table:table-cell>
          <table:table-cell office:value-type="float" office:value="1758.95" calcext:value-type="float">
            <text:p>1758.95</text:p>
          </table:table-cell>
          <table:table-cell office:value-type="float" office:value="403.9119" calcext:value-type="float">
            <text:p>403.9119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2026-07-04T05:07:08.575Z</text:p>
          </table:table-cell>
          <table:table-cell office:value-type="float" office:value="62608.01" calcext:value-type="float">
            <text:p>62608.01</text:p>
          </table:table-cell>
          <table:table-cell office:value-type="float" office:value="62628.88" calcext:value-type="float">
            <text:p>62628.88</text:p>
          </table:table-cell>
          <table:table-cell office:value-type="float" office:value="62604.3" calcext:value-type="float">
            <text:p>62604.3</text:p>
          </table:table-cell>
          <table:table-cell office:value-type="float" office:value="62609.3" calcext:value-type="float">
            <text:p>62609.3</text:p>
          </table:table-cell>
          <table:table-cell office:value-type="float" office:value="11.45826" calcext:value-type="float">
            <text:p>11.45826</text:p>
          </table:table-cell>
          <table:table-cell office:value-type="float" office:value="3202" calcext:value-type="float">
            <text:p>3202</text:p>
          </table:table-cell>
          <table:table-cell office:value-type="float" office:value="1758.89" calcext:value-type="float">
            <text:p>1758.89</text:p>
          </table:table-cell>
          <table:table-cell office:value-type="float" office:value="1759.83" calcext:value-type="float">
            <text:p>1759.83</text:p>
          </table:table-cell>
          <table:table-cell office:value-type="float" office:value="1757.56" calcext:value-type="float">
            <text:p>1757.56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317.9651" calcext:value-type="float">
            <text:p>317.9651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2026-07-04T05:12:08.600Z</text:p>
          </table:table-cell>
          <table:table-cell table:number-columns-repeated="2" office:value-type="float" office:value="62609.31" calcext:value-type="float">
            <text:p>62609.31</text:p>
          </table:table-cell>
          <table:table-cell office:value-type="float" office:value="62582.04" calcext:value-type="float">
            <text:p>62582.04</text:p>
          </table:table-cell>
          <table:table-cell office:value-type="float" office:value="62586" calcext:value-type="float">
            <text:p>62586</text:p>
          </table:table-cell>
          <table:table-cell office:value-type="float" office:value="6.9599" calcext:value-type="float">
            <text:p>6.9599</text:p>
          </table:table-cell>
          <table:table-cell office:value-type="float" office:value="2306" calcext:value-type="float">
            <text:p>2306</text:p>
          </table:table-cell>
          <table:table-cell table:number-columns-repeated="2" office:value-type="float" office:value="1757.71" calcext:value-type="float">
            <text:p>1757.71</text:p>
          </table:table-cell>
          <table:table-cell office:value-type="float" office:value="1756.3" calcext:value-type="float">
            <text:p>1756.3</text:p>
          </table:table-cell>
          <table:table-cell office:value-type="float" office:value="1756.52" calcext:value-type="float">
            <text:p>1756.52</text:p>
          </table:table-cell>
          <table:table-cell office:value-type="float" office:value="370.6464" calcext:value-type="float">
            <text:p>370.6464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2026-07-04T05:17:08.625Z</text:p>
          </table:table-cell>
          <table:table-cell table:number-columns-repeated="2" office:value-type="float" office:value="62586.01" calcext:value-type="float">
            <text:p>62586.01</text:p>
          </table:table-cell>
          <table:table-cell office:value-type="float" office:value="62570" calcext:value-type="float">
            <text:p>62570</text:p>
          </table:table-cell>
          <table:table-cell office:value-type="float" office:value="62570.01" calcext:value-type="float">
            <text:p>62570.01</text:p>
          </table:table-cell>
          <table:table-cell office:value-type="float" office:value="11.09362" calcext:value-type="float">
            <text:p>11.09362</text:p>
          </table:table-cell>
          <table:table-cell office:value-type="float" office:value="1827" calcext:value-type="float">
            <text:p>1827</text:p>
          </table:table-cell>
          <table:table-cell office:value-type="float" office:value="1756.79" calcext:value-type="float">
            <text:p>1756.79</text:p>
          </table:table-cell>
          <table:table-cell office:value-type="float" office:value="1757.2" calcext:value-type="float">
            <text:p>1757.2</text:p>
          </table:table-cell>
          <table:table-cell office:value-type="float" office:value="1756.46" calcext:value-type="float">
            <text:p>1756.46</text:p>
          </table:table-cell>
          <table:table-cell office:value-type="float" office:value="1756.47" calcext:value-type="float">
            <text:p>1756.47</text:p>
          </table:table-cell>
          <table:table-cell office:value-type="float" office:value="254.059" calcext:value-type="float">
            <text:p>254.05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2026-07-04T05:22:08.649Z</text:p>
            <draw:frame draw:z-index="1" draw:style-name="gr1" draw:text-style-name="P1" svg:width="27.901cm" svg:height="14.901cm" svg:x="2.936cm" svg:y="0.134cm">
              <draw:object draw:notify-on-update-of-ranges="trade_history.E1:trade_history.E1 trade_history.E2:trade_history.E297 trade_history.G1:trade_history.G1 trade_history.G2:trade_history.G29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 office:value-type="float" office:value="62572.12" calcext:value-type="float">
            <text:p>62572.12</text:p>
          </table:table-cell>
          <table:table-cell office:value-type="float" office:value="62504.55" calcext:value-type="float">
            <text:p>62504.55</text:p>
          </table:table-cell>
          <table:table-cell office:value-type="float" office:value="62505.16" calcext:value-type="float">
            <text:p>62505.16</text:p>
          </table:table-cell>
          <table:table-cell office:value-type="float" office:value="31.44113" calcext:value-type="float">
            <text:p>31.44113</text:p>
          </table:table-cell>
          <table:table-cell office:value-type="float" office:value="4575" calcext:value-type="float">
            <text:p>4575</text:p>
          </table:table-cell>
          <table:table-cell table:number-columns-repeated="2" office:value-type="float" office:value="1756.69" calcext:value-type="float">
            <text:p>1756.69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1754.49" calcext:value-type="float">
            <text:p>1754.49</text:p>
          </table:table-cell>
          <table:table-cell office:value-type="float" office:value="366.8672" calcext:value-type="float">
            <text:p>366.867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2026-07-04T05:27:08.673Z</text:p>
          </table:table-cell>
          <table:table-cell office:value-type="float" office:value="62512.44" calcext:value-type="float">
            <text:p>62512.44</text:p>
          </table:table-cell>
          <table:table-cell office:value-type="float" office:value="62517.61" calcext:value-type="float">
            <text:p>62517.61</text:p>
          </table:table-cell>
          <table:table-cell office:value-type="float" office:value="62476" calcext:value-type="float">
            <text:p>62476</text:p>
          </table:table-cell>
          <table:table-cell office:value-type="float" office:value="62514.74" calcext:value-type="float">
            <text:p>62514.74</text:p>
          </table:table-cell>
          <table:table-cell office:value-type="float" office:value="17.93506" calcext:value-type="float">
            <text:p>17.93506</text:p>
          </table:table-cell>
          <table:table-cell office:value-type="float" office:value="5306" calcext:value-type="float">
            <text:p>5306</text:p>
          </table:table-cell>
          <table:table-cell office:value-type="float" office:value="1754.48" calcext:value-type="float">
            <text:p>1754.48</text:p>
          </table:table-cell>
          <table:table-cell office:value-type="float" office:value="1754.89" calcext:value-type="float">
            <text:p>1754.89</text:p>
          </table:table-cell>
          <table:table-cell office:value-type="float" office:value="1753.27" calcext:value-type="float">
            <text:p>1753.27</text:p>
          </table:table-cell>
          <table:table-cell office:value-type="float" office:value="1754.63" calcext:value-type="float">
            <text:p>1754.63</text:p>
          </table:table-cell>
          <table:table-cell office:value-type="float" office:value="218.7747" calcext:value-type="float">
            <text:p>218.774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2026-07-04T05:32:08.677Z</text:p>
          </table:table-cell>
          <table:table-cell office:value-type="float" office:value="62504.66" calcext:value-type="float">
            <text:p>62504.66</text:p>
          </table:table-cell>
          <table:table-cell office:value-type="float" office:value="62540" calcext:value-type="float">
            <text:p>62540</text:p>
          </table:table-cell>
          <table:table-cell office:value-type="float" office:value="62504.65" calcext:value-type="float">
            <text:p>62504.65</text:p>
          </table:table-cell>
          <table:table-cell office:value-type="float" office:value="62517.84" calcext:value-type="float">
            <text:p>62517.84</text:p>
          </table:table-cell>
          <table:table-cell office:value-type="float" office:value="9.9755" calcext:value-type="float">
            <text:p>9.9755</text:p>
          </table:table-cell>
          <table:table-cell office:value-type="float" office:value="4884" calcext:value-type="float">
            <text:p>4884</text:p>
          </table:table-cell>
          <table:table-cell office:value-type="float" office:value="1754.45" calcext:value-type="float">
            <text:p>1754.45</text:p>
          </table:table-cell>
          <table:table-cell office:value-type="float" office:value="1755.53" calcext:value-type="float">
            <text:p>1755.53</text:p>
          </table:table-cell>
          <table:table-cell office:value-type="float" office:value="1754.11" calcext:value-type="float">
            <text:p>1754.11</text:p>
          </table:table-cell>
          <table:table-cell office:value-type="float" office:value="1755.53" calcext:value-type="float">
            <text:p>1755.53</text:p>
          </table:table-cell>
          <table:table-cell office:value-type="float" office:value="594.0936" calcext:value-type="float">
            <text:p>594.0936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string" calcext:value-type="string">
            <text:p>2026-07-04T05:37:08.692Z</text:p>
          </table:table-cell>
          <table:table-cell office:value-type="float" office:value="62517.84" calcext:value-type="float">
            <text:p>62517.84</text:p>
          </table:table-cell>
          <table:table-cell office:value-type="float" office:value="62535.54" calcext:value-type="float">
            <text:p>62535.54</text:p>
          </table:table-cell>
          <table:table-cell office:value-type="float" office:value="62508.22" calcext:value-type="float">
            <text:p>62508.22</text:p>
          </table:table-cell>
          <table:table-cell office:value-type="float" office:value="62513.63" calcext:value-type="float">
            <text:p>62513.63</text:p>
          </table:table-cell>
          <table:table-cell office:value-type="float" office:value="45.9074" calcext:value-type="float">
            <text:p>45.9074</text:p>
          </table:table-cell>
          <table:table-cell office:value-type="float" office:value="4347" calcext:value-type="float">
            <text:p>4347</text:p>
          </table:table-cell>
          <table:table-cell office:value-type="float" office:value="1755.5" calcext:value-type="float">
            <text:p>1755.5</text:p>
          </table:table-cell>
          <table:table-cell office:value-type="float" office:value="1757.34" calcext:value-type="float">
            <text:p>1757.34</text:p>
          </table:table-cell>
          <table:table-cell office:value-type="float" office:value="1755.41" calcext:value-type="float">
            <text:p>1755.41</text:p>
          </table:table-cell>
          <table:table-cell office:value-type="float" office:value="1756.8" calcext:value-type="float">
            <text:p>1756.8</text:p>
          </table:table-cell>
          <table:table-cell office:value-type="float" office:value="1385.5962" calcext:value-type="float">
            <text:p>1385.5962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2026-07-04T05:42:08.716Z</text:p>
          </table:table-cell>
          <table:table-cell office:value-type="float" office:value="62510.01" calcext:value-type="float">
            <text:p>62510.01</text:p>
          </table:table-cell>
          <table:table-cell office:value-type="float" office:value="62564.55" calcext:value-type="float">
            <text:p>62564.55</text:p>
          </table:table-cell>
          <table:table-cell office:value-type="float" office:value="62510.01" calcext:value-type="float">
            <text:p>62510.01</text:p>
          </table:table-cell>
          <table:table-cell office:value-type="float" office:value="62564.55" calcext:value-type="float">
            <text:p>62564.55</text:p>
          </table:table-cell>
          <table:table-cell office:value-type="float" office:value="30.04836" calcext:value-type="float">
            <text:p>30.04836</text:p>
          </table:table-cell>
          <table:table-cell office:value-type="float" office:value="3010" calcext:value-type="float">
            <text:p>3010</text:p>
          </table:table-cell>
          <table:table-cell office:value-type="float" office:value="1756.7" calcext:value-type="float">
            <text:p>1756.7</text:p>
          </table:table-cell>
          <table:table-cell office:value-type="float" office:value="1757.89" calcext:value-type="float">
            <text:p>1757.89</text:p>
          </table:table-cell>
          <table:table-cell office:value-type="float" office:value="1756.1" calcext:value-type="float">
            <text:p>1756.1</text:p>
          </table:table-cell>
          <table:table-cell office:value-type="float" office:value="1757.89" calcext:value-type="float">
            <text:p>1757.89</text:p>
          </table:table-cell>
          <table:table-cell office:value-type="float" office:value="140.942" calcext:value-type="float">
            <text:p>140.94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2026-07-04T05:47:08.740Z</text:p>
          </table:table-cell>
          <table:table-cell office:value-type="float" office:value="62547.76" calcext:value-type="float">
            <text:p>62547.76</text:p>
          </table:table-cell>
          <table:table-cell office:value-type="float" office:value="62595.97" calcext:value-type="float">
            <text:p>62595.97</text:p>
          </table:table-cell>
          <table:table-cell office:value-type="float" office:value="62544.52" calcext:value-type="float">
            <text:p>62544.52</text:p>
          </table:table-cell>
          <table:table-cell office:value-type="float" office:value="62579.55" calcext:value-type="float">
            <text:p>62579.55</text:p>
          </table:table-cell>
          <table:table-cell office:value-type="float" office:value="31.04405" calcext:value-type="float">
            <text:p>31.04405</text:p>
          </table:table-cell>
          <table:table-cell office:value-type="float" office:value="4818" calcext:value-type="float">
            <text:p>4818</text:p>
          </table:table-cell>
          <table:table-cell office:value-type="float" office:value="1757.19" calcext:value-type="float">
            <text:p>1757.19</text:p>
          </table:table-cell>
          <table:table-cell office:value-type="float" office:value="1759.6" calcext:value-type="float">
            <text:p>1759.6</text:p>
          </table:table-cell>
          <table:table-cell office:value-type="float" office:value="1757.09" calcext:value-type="float">
            <text:p>1757.09</text:p>
          </table:table-cell>
          <table:table-cell office:value-type="float" office:value="1758.75" calcext:value-type="float">
            <text:p>1758.75</text:p>
          </table:table-cell>
          <table:table-cell office:value-type="float" office:value="296.7264" calcext:value-type="float">
            <text:p>296.7264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2026-07-04T05:52:08.763Z</text:p>
          </table:table-cell>
          <table:table-cell table:number-columns-repeated="2" office:value-type="float" office:value="62579.56" calcext:value-type="float">
            <text:p>62579.56</text:p>
          </table:table-cell>
          <table:table-cell office:value-type="float" office:value="62529.75" calcext:value-type="float">
            <text:p>62529.75</text:p>
          </table:table-cell>
          <table:table-cell office:value-type="float" office:value="62546" calcext:value-type="float">
            <text:p>62546</text:p>
          </table:table-cell>
          <table:table-cell office:value-type="float" office:value="39.74008" calcext:value-type="float">
            <text:p>39.74008</text:p>
          </table:table-cell>
          <table:table-cell office:value-type="float" office:value="3471" calcext:value-type="float">
            <text:p>3471</text:p>
          </table:table-cell>
          <table:table-cell office:value-type="float" office:value="1758.76" calcext:value-type="float">
            <text:p>1758.76</text:p>
          </table:table-cell>
          <table:table-cell office:value-type="float" office:value="1759.44" calcext:value-type="float">
            <text:p>1759.44</text:p>
          </table:table-cell>
          <table:table-cell office:value-type="float" office:value="1756.93" calcext:value-type="float">
            <text:p>1756.93</text:p>
          </table:table-cell>
          <table:table-cell office:value-type="float" office:value="1757.94" calcext:value-type="float">
            <text:p>1757.94</text:p>
          </table:table-cell>
          <table:table-cell office:value-type="float" office:value="554.4908" calcext:value-type="float">
            <text:p>554.490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2026-07-04T05:57:08.776Z</text:p>
          </table:table-cell>
          <table:table-cell table:number-columns-repeated="2" office:value-type="float" office:value="62546" calcext:value-type="float">
            <text:p>62546</text:p>
          </table:table-cell>
          <table:table-cell office:value-type="float" office:value="62441.29" calcext:value-type="float">
            <text:p>62441.29</text:p>
          </table:table-cell>
          <table:table-cell office:value-type="float" office:value="62451.97" calcext:value-type="float">
            <text:p>62451.97</text:p>
          </table:table-cell>
          <table:table-cell office:value-type="float" office:value="46.38763" calcext:value-type="float">
            <text:p>46.38763</text:p>
          </table:table-cell>
          <table:table-cell office:value-type="float" office:value="6306" calcext:value-type="float">
            <text:p>6306</text:p>
          </table:table-cell>
          <table:table-cell office:value-type="float" office:value="1757.95" calcext:value-type="float">
            <text:p>1757.95</text:p>
          </table:table-cell>
          <table:table-cell office:value-type="float" office:value="1757.99" calcext:value-type="float">
            <text:p>1757.99</text:p>
          </table:table-cell>
          <table:table-cell office:value-type="float" office:value="1754.74" calcext:value-type="float">
            <text:p>1754.74</text:p>
          </table:table-cell>
          <table:table-cell office:value-type="float" office:value="1755.6" calcext:value-type="float">
            <text:p>1755.6</text:p>
          </table:table-cell>
          <table:table-cell office:value-type="float" office:value="478.588" calcext:value-type="float">
            <text:p>478.588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2026-07-04T06:02:08.799Z</text:p>
          </table:table-cell>
          <table:table-cell office:value-type="float" office:value="62451.96" calcext:value-type="float">
            <text:p>62451.96</text:p>
          </table:table-cell>
          <table:table-cell office:value-type="float" office:value="62491.2" calcext:value-type="float">
            <text:p>62491.2</text:p>
          </table:table-cell>
          <table:table-cell office:value-type="float" office:value="62448" calcext:value-type="float">
            <text:p>62448</text:p>
          </table:table-cell>
          <table:table-cell office:value-type="float" office:value="62488" calcext:value-type="float">
            <text:p>62488</text:p>
          </table:table-cell>
          <table:table-cell office:value-type="float" office:value="13.66373" calcext:value-type="float">
            <text:p>13.66373</text:p>
          </table:table-cell>
          <table:table-cell office:value-type="float" office:value="4057" calcext:value-type="float">
            <text:p>4057</text:p>
          </table:table-cell>
          <table:table-cell office:value-type="float" office:value="1755.83" calcext:value-type="float">
            <text:p>1755.83</text:p>
          </table:table-cell>
          <table:table-cell office:value-type="float" office:value="1756.64" calcext:value-type="float">
            <text:p>1756.64</text:p>
          </table:table-cell>
          <table:table-cell office:value-type="float" office:value="1755.19" calcext:value-type="float">
            <text:p>1755.19</text:p>
          </table:table-cell>
          <table:table-cell office:value-type="float" office:value="1756.63" calcext:value-type="float">
            <text:p>1756.63</text:p>
          </table:table-cell>
          <table:table-cell office:value-type="float" office:value="413.3635" calcext:value-type="float">
            <text:p>413.363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2026-07-04T06:07:08.806Z</text:p>
          </table:table-cell>
          <table:table-cell office:value-type="float" office:value="62487.99" calcext:value-type="float">
            <text:p>62487.99</text:p>
          </table:table-cell>
          <table:table-cell office:value-type="float" office:value="62529.33" calcext:value-type="float">
            <text:p>62529.33</text:p>
          </table:table-cell>
          <table:table-cell office:value-type="float" office:value="62474.86" calcext:value-type="float">
            <text:p>62474.86</text:p>
          </table:table-cell>
          <table:table-cell office:value-type="float" office:value="62529.33" calcext:value-type="float">
            <text:p>62529.33</text:p>
          </table:table-cell>
          <table:table-cell office:value-type="float" office:value="17.8017" calcext:value-type="float">
            <text:p>17.8017</text:p>
          </table:table-cell>
          <table:table-cell office:value-type="float" office:value="3703" calcext:value-type="float">
            <text:p>3703</text:p>
          </table:table-cell>
          <table:table-cell office:value-type="float" office:value="1756.59" calcext:value-type="float">
            <text:p>1756.59</text:p>
          </table:table-cell>
          <table:table-cell office:value-type="float" office:value="1758.55" calcext:value-type="float">
            <text:p>1758.55</text:p>
          </table:table-cell>
          <table:table-cell office:value-type="float" office:value="1756.44" calcext:value-type="float">
            <text:p>1756.44</text:p>
          </table:table-cell>
          <table:table-cell office:value-type="float" office:value="1758.49" calcext:value-type="float">
            <text:p>1758.49</text:p>
          </table:table-cell>
          <table:table-cell office:value-type="float" office:value="376.6624" calcext:value-type="float">
            <text:p>376.6624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string" calcext:value-type="string">
            <text:p>2026-07-04T06:12:08.829Z</text:p>
          </table:table-cell>
          <table:table-cell office:value-type="float" office:value="62529.32" calcext:value-type="float">
            <text:p>62529.32</text:p>
          </table:table-cell>
          <table:table-cell office:value-type="float" office:value="62559.43" calcext:value-type="float">
            <text:p>62559.43</text:p>
          </table:table-cell>
          <table:table-cell office:value-type="float" office:value="62474" calcext:value-type="float">
            <text:p>62474</text:p>
          </table:table-cell>
          <table:table-cell office:value-type="float" office:value="62485.39" calcext:value-type="float">
            <text:p>62485.39</text:p>
          </table:table-cell>
          <table:table-cell office:value-type="float" office:value="64.53694" calcext:value-type="float">
            <text:p>64.53694</text:p>
          </table:table-cell>
          <table:table-cell office:value-type="float" office:value="5620" calcext:value-type="float">
            <text:p>5620</text:p>
          </table:table-cell>
          <table:table-cell office:value-type="float" office:value="1758.37" calcext:value-type="float">
            <text:p>1758.37</text:p>
          </table:table-cell>
          <table:table-cell office:value-type="float" office:value="1761.27" calcext:value-type="float">
            <text:p>1761.27</text:p>
          </table:table-cell>
          <table:table-cell office:value-type="float" office:value="1758.08" calcext:value-type="float">
            <text:p>1758.08</text:p>
          </table:table-cell>
          <table:table-cell office:value-type="float" office:value="1758.3" calcext:value-type="float">
            <text:p>1758.3</text:p>
          </table:table-cell>
          <table:table-cell office:value-type="float" office:value="534.7602" calcext:value-type="float">
            <text:p>534.7602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string" calcext:value-type="string">
            <text:p>2026-07-04T06:17:08.845Z</text:p>
          </table:table-cell>
          <table:table-cell office:value-type="float" office:value="62485.38" calcext:value-type="float">
            <text:p>62485.38</text:p>
          </table:table-cell>
          <table:table-cell office:value-type="float" office:value="62485.39" calcext:value-type="float">
            <text:p>62485.39</text:p>
          </table:table-cell>
          <table:table-cell office:value-type="float" office:value="62433" calcext:value-type="float">
            <text:p>62433</text:p>
          </table:table-cell>
          <table:table-cell office:value-type="float" office:value="62437.09" calcext:value-type="float">
            <text:p>62437.09</text:p>
          </table:table-cell>
          <table:table-cell office:value-type="float" office:value="19.58525" calcext:value-type="float">
            <text:p>19.58525</text:p>
          </table:table-cell>
          <table:table-cell office:value-type="float" office:value="3681" calcext:value-type="float">
            <text:p>3681</text:p>
          </table:table-cell>
          <table:table-cell office:value-type="float" office:value="1758.3" calcext:value-type="float">
            <text:p>1758.3</text:p>
          </table:table-cell>
          <table:table-cell office:value-type="float" office:value="1758.31" calcext:value-type="float">
            <text:p>1758.31</text:p>
          </table:table-cell>
          <table:table-cell office:value-type="float" office:value="1755.56" calcext:value-type="float">
            <text:p>1755.56</text:p>
          </table:table-cell>
          <table:table-cell office:value-type="float" office:value="1755.91" calcext:value-type="float">
            <text:p>1755.91</text:p>
          </table:table-cell>
          <table:table-cell office:value-type="float" office:value="303.8701" calcext:value-type="float">
            <text:p>303.8701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2026-07-04T06:22:08.867Z</text:p>
          </table:table-cell>
          <table:table-cell office:value-type="float" office:value="62437.09" calcext:value-type="float">
            <text:p>62437.09</text:p>
          </table:table-cell>
          <table:table-cell office:value-type="float" office:value="62452" calcext:value-type="float">
            <text:p>62452</text:p>
          </table:table-cell>
          <table:table-cell table:number-columns-repeated="2" office:value-type="float" office:value="62416.7" calcext:value-type="float">
            <text:p>62416.7</text:p>
          </table:table-cell>
          <table:table-cell office:value-type="float" office:value="9.97378" calcext:value-type="float">
            <text:p>9.97378</text:p>
          </table:table-cell>
          <table:table-cell office:value-type="float" office:value="2534" calcext:value-type="float">
            <text:p>2534</text:p>
          </table:table-cell>
          <table:table-cell office:value-type="float" office:value="1755.91" calcext:value-type="float">
            <text:p>1755.91</text:p>
          </table:table-cell>
          <table:table-cell office:value-type="float" office:value="1757.43" calcext:value-type="float">
            <text:p>1757.43</text:p>
          </table:table-cell>
          <table:table-cell office:value-type="float" office:value="1755.9" calcext:value-type="float">
            <text:p>1755.9</text:p>
          </table:table-cell>
          <table:table-cell office:value-type="float" office:value="1756.23" calcext:value-type="float">
            <text:p>1756.23</text:p>
          </table:table-cell>
          <table:table-cell office:value-type="float" office:value="1235.2713" calcext:value-type="float">
            <text:p>1235.2713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2026-07-04T06:27:08.875Z</text:p>
          </table:table-cell>
          <table:table-cell table:number-columns-repeated="2" office:value-type="float" office:value="62420" calcext:value-type="float">
            <text:p>62420</text:p>
          </table:table-cell>
          <table:table-cell office:value-type="float" office:value="62328.24" calcext:value-type="float">
            <text:p>62328.24</text:p>
          </table:table-cell>
          <table:table-cell office:value-type="float" office:value="62359.21" calcext:value-type="float">
            <text:p>62359.21</text:p>
          </table:table-cell>
          <table:table-cell office:value-type="float" office:value="48.10334" calcext:value-type="float">
            <text:p>48.10334</text:p>
          </table:table-cell>
          <table:table-cell office:value-type="float" office:value="8017" calcext:value-type="float">
            <text:p>8017</text:p>
          </table:table-cell>
          <table:table-cell table:number-columns-repeated="2" office:value-type="float" office:value="1756.4" calcext:value-type="float">
            <text:p>1756.4</text:p>
          </table:table-cell>
          <table:table-cell office:value-type="float" office:value="1751.95" calcext:value-type="float">
            <text:p>1751.95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07.4994" calcext:value-type="float">
            <text:p>2007.4994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string" calcext:value-type="string">
            <text:p>2026-07-04T06:32:08.896Z</text:p>
          </table:table-cell>
          <table:table-cell office:value-type="float" office:value="62370.81" calcext:value-type="float">
            <text:p>62370.81</text:p>
          </table:table-cell>
          <table:table-cell office:value-type="float" office:value="62521.84" calcext:value-type="float">
            <text:p>62521.84</text:p>
          </table:table-cell>
          <table:table-cell office:value-type="float" office:value="62334" calcext:value-type="float">
            <text:p>62334</text:p>
          </table:table-cell>
          <table:table-cell office:value-type="float" office:value="62491.64" calcext:value-type="float">
            <text:p>62491.64</text:p>
          </table:table-cell>
          <table:table-cell office:value-type="float" office:value="42.9722" calcext:value-type="float">
            <text:p>42.9722</text:p>
          </table:table-cell>
          <table:table-cell office:value-type="float" office:value="12795" calcext:value-type="float">
            <text:p>12795</text:p>
          </table:table-cell>
          <table:table-cell office:value-type="float" office:value="1753.46" calcext:value-type="float">
            <text:p>1753.46</text:p>
          </table:table-cell>
          <table:table-cell office:value-type="float" office:value="1757.2" calcext:value-type="float">
            <text:p>1757.2</text:p>
          </table:table-cell>
          <table:table-cell office:value-type="float" office:value="1751.72" calcext:value-type="float">
            <text:p>1751.72</text:p>
          </table:table-cell>
          <table:table-cell office:value-type="float" office:value="1756" calcext:value-type="float">
            <text:p>1756</text:p>
          </table:table-cell>
          <table:table-cell office:value-type="float" office:value="981.0172" calcext:value-type="float">
            <text:p>981.0172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2026-07-04T06:37:08.918Z</text:p>
          </table:table-cell>
          <table:table-cell office:value-type="float" office:value="62492.01" calcext:value-type="float">
            <text:p>62492.01</text:p>
          </table:table-cell>
          <table:table-cell office:value-type="float" office:value="62497.6" calcext:value-type="float">
            <text:p>62497.6</text:p>
          </table:table-cell>
          <table:table-cell office:value-type="float" office:value="62450" calcext:value-type="float">
            <text:p>62450</text:p>
          </table:table-cell>
          <table:table-cell office:value-type="float" office:value="62459.09" calcext:value-type="float">
            <text:p>62459.09</text:p>
          </table:table-cell>
          <table:table-cell office:value-type="float" office:value="17.61339" calcext:value-type="float">
            <text:p>17.61339</text:p>
          </table:table-cell>
          <table:table-cell office:value-type="float" office:value="4544" calcext:value-type="float">
            <text:p>4544</text:p>
          </table:table-cell>
          <table:table-cell office:value-type="float" office:value="1755.67" calcext:value-type="float">
            <text:p>1755.67</text:p>
          </table:table-cell>
          <table:table-cell office:value-type="float" office:value="1756.31" calcext:value-type="float">
            <text:p>1756.31</text:p>
          </table:table-cell>
          <table:table-cell office:value-type="float" office:value="1755.08" calcext:value-type="float">
            <text:p>1755.08</text:p>
          </table:table-cell>
          <table:table-cell office:value-type="float" office:value="1755.78" calcext:value-type="float">
            <text:p>1755.78</text:p>
          </table:table-cell>
          <table:table-cell office:value-type="float" office:value="596.1727" calcext:value-type="float">
            <text:p>596.1727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2026-07-04T06:42:08.919Z</text:p>
          </table:table-cell>
          <table:table-cell office:value-type="float" office:value="62450" calcext:value-type="float">
            <text:p>62450</text:p>
          </table:table-cell>
          <table:table-cell office:value-type="float" office:value="62488" calcext:value-type="float">
            <text:p>62488</text:p>
          </table:table-cell>
          <table:table-cell office:value-type="float" office:value="62446.59" calcext:value-type="float">
            <text:p>62446.59</text:p>
          </table:table-cell>
          <table:table-cell office:value-type="float" office:value="62487.99" calcext:value-type="float">
            <text:p>62487.99</text:p>
          </table:table-cell>
          <table:table-cell office:value-type="float" office:value="33.57556" calcext:value-type="float">
            <text:p>33.57556</text:p>
          </table:table-cell>
          <table:table-cell office:value-type="float" office:value="3419" calcext:value-type="float">
            <text:p>3419</text:p>
          </table:table-cell>
          <table:table-cell office:value-type="float" office:value="1755.38" calcext:value-type="float">
            <text:p>1755.38</text:p>
          </table:table-cell>
          <table:table-cell office:value-type="float" office:value="1756.5" calcext:value-type="float">
            <text:p>1756.5</text:p>
          </table:table-cell>
          <table:table-cell office:value-type="float" office:value="1754.93" calcext:value-type="float">
            <text:p>1754.93</text:p>
          </table:table-cell>
          <table:table-cell office:value-type="float" office:value="1755.3" calcext:value-type="float">
            <text:p>1755.3</text:p>
          </table:table-cell>
          <table:table-cell office:value-type="float" office:value="1257.1926" calcext:value-type="float">
            <text:p>1257.1926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string" calcext:value-type="string">
            <text:p>2026-07-04T06:47:08.935Z</text:p>
          </table:table-cell>
          <table:table-cell office:value-type="float" office:value="62488" calcext:value-type="float">
            <text:p>62488</text:p>
          </table:table-cell>
          <table:table-cell office:value-type="float" office:value="62489" calcext:value-type="float">
            <text:p>62489</text:p>
          </table:table-cell>
          <table:table-cell office:value-type="float" office:value="62460" calcext:value-type="float">
            <text:p>62460</text:p>
          </table:table-cell>
          <table:table-cell office:value-type="float" office:value="62472.01" calcext:value-type="float">
            <text:p>62472.01</text:p>
          </table:table-cell>
          <table:table-cell office:value-type="float" office:value="11.79234" calcext:value-type="float">
            <text:p>11.79234</text:p>
          </table:table-cell>
          <table:table-cell office:value-type="float" office:value="3238" calcext:value-type="float">
            <text:p>3238</text:p>
          </table:table-cell>
          <table:table-cell office:value-type="float" office:value="1755.29" calcext:value-type="float">
            <text:p>1755.29</text:p>
          </table:table-cell>
          <table:table-cell office:value-type="float" office:value="1755.3" calcext:value-type="float">
            <text:p>1755.3</text:p>
          </table:table-cell>
          <table:table-cell office:value-type="float" office:value="1753.78" calcext:value-type="float">
            <text:p>1753.78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622.7041" calcext:value-type="float">
            <text:p>622.7041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string" calcext:value-type="string">
            <text:p>2026-07-04T06:52:08.956Z</text:p>
          </table:table-cell>
          <table:table-cell office:value-type="float" office:value="62477.99" calcext:value-type="float">
            <text:p>62477.99</text:p>
          </table:table-cell>
          <table:table-cell office:value-type="float" office:value="62535.5" calcext:value-type="float">
            <text:p>62535.5</text:p>
          </table:table-cell>
          <table:table-cell office:value-type="float" office:value="62469.24" calcext:value-type="float">
            <text:p>62469.24</text:p>
          </table:table-cell>
          <table:table-cell office:value-type="float" office:value="62508" calcext:value-type="float">
            <text:p>62508</text:p>
          </table:table-cell>
          <table:table-cell office:value-type="float" office:value="26.08724" calcext:value-type="float">
            <text:p>26.08724</text:p>
          </table:table-cell>
          <table:table-cell office:value-type="float" office:value="7387" calcext:value-type="float">
            <text:p>7387</text:p>
          </table:table-cell>
          <table:table-cell office:value-type="float" office:value="1753.78" calcext:value-type="float">
            <text:p>1753.78</text:p>
          </table:table-cell>
          <table:table-cell office:value-type="float" office:value="1755.1" calcext:value-type="float">
            <text:p>1755.1</text:p>
          </table:table-cell>
          <table:table-cell table:number-columns-repeated="2" office:value-type="float" office:value="1753.43" calcext:value-type="float">
            <text:p>1753.43</text:p>
          </table:table-cell>
          <table:table-cell office:value-type="float" office:value="842.4007" calcext:value-type="float">
            <text:p>842.4007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string" calcext:value-type="string">
            <text:p>2026-07-04T06:57:08.957Z</text:p>
          </table:table-cell>
          <table:table-cell office:value-type="float" office:value="62514" calcext:value-type="float">
            <text:p>62514</text:p>
          </table:table-cell>
          <table:table-cell office:value-type="float" office:value="62526.12" calcext:value-type="float">
            <text:p>62526.12</text:p>
          </table:table-cell>
          <table:table-cell office:value-type="float" office:value="62493.68" calcext:value-type="float">
            <text:p>62493.68</text:p>
          </table:table-cell>
          <table:table-cell office:value-type="float" office:value="62503.99" calcext:value-type="float">
            <text:p>62503.99</text:p>
          </table:table-cell>
          <table:table-cell office:value-type="float" office:value="33.04656" calcext:value-type="float">
            <text:p>33.04656</text:p>
          </table:table-cell>
          <table:table-cell office:value-type="float" office:value="4518" calcext:value-type="float">
            <text:p>4518</text:p>
          </table:table-cell>
          <table:table-cell office:value-type="float" office:value="1753.82" calcext:value-type="float">
            <text:p>1753.82</text:p>
          </table:table-cell>
          <table:table-cell office:value-type="float" office:value="1755.58" calcext:value-type="float">
            <text:p>1755.58</text:p>
          </table:table-cell>
          <table:table-cell office:value-type="float" office:value="1753.43" calcext:value-type="float">
            <text:p>1753.43</text:p>
          </table:table-cell>
          <table:table-cell office:value-type="float" office:value="1754.52" calcext:value-type="float">
            <text:p>1754.52</text:p>
          </table:table-cell>
          <table:table-cell office:value-type="float" office:value="1082.7332" calcext:value-type="float">
            <text:p>1082.7332</text:p>
          </table:table-cell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string" calcext:value-type="string">
            <text:p>2026-07-04T07:02:08.978Z</text:p>
          </table:table-cell>
          <table:table-cell office:value-type="float" office:value="62503.98" calcext:value-type="float">
            <text:p>62503.98</text:p>
          </table:table-cell>
          <table:table-cell office:value-type="float" office:value="62507.13" calcext:value-type="float">
            <text:p>62507.13</text:p>
          </table:table-cell>
          <table:table-cell office:value-type="float" office:value="62486.84" calcext:value-type="float">
            <text:p>62486.84</text:p>
          </table:table-cell>
          <table:table-cell office:value-type="float" office:value="62486.85" calcext:value-type="float">
            <text:p>62486.85</text:p>
          </table:table-cell>
          <table:table-cell office:value-type="float" office:value="14.69351" calcext:value-type="float">
            <text:p>14.69351</text:p>
          </table:table-cell>
          <table:table-cell office:value-type="float" office:value="2621" calcext:value-type="float">
            <text:p>2621</text:p>
          </table:table-cell>
          <table:table-cell office:value-type="float" office:value="1754.5" calcext:value-type="float">
            <text:p>1754.5</text:p>
          </table:table-cell>
          <table:table-cell office:value-type="float" office:value="1755.2" calcext:value-type="float">
            <text:p>1755.2</text:p>
          </table:table-cell>
          <table:table-cell table:number-columns-repeated="2" office:value-type="float" office:value="1753.69" calcext:value-type="float">
            <text:p>1753.69</text:p>
          </table:table-cell>
          <table:table-cell office:value-type="float" office:value="1065.4257" calcext:value-type="float">
            <text:p>1065.4257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2026-07-04T07:07:08.984Z</text:p>
          </table:table-cell>
          <table:table-cell table:number-columns-repeated="2" office:value-type="float" office:value="62506.66" calcext:value-type="float">
            <text:p>62506.66</text:p>
          </table:table-cell>
          <table:table-cell office:value-type="float" office:value="62470" calcext:value-type="float">
            <text:p>62470</text:p>
          </table:table-cell>
          <table:table-cell office:value-type="float" office:value="62489.72" calcext:value-type="float">
            <text:p>62489.72</text:p>
          </table:table-cell>
          <table:table-cell office:value-type="float" office:value="21.75402" calcext:value-type="float">
            <text:p>21.75402</text:p>
          </table:table-cell>
          <table:table-cell office:value-type="float" office:value="4733" calcext:value-type="float">
            <text:p>4733</text:p>
          </table:table-cell>
          <table:table-cell office:value-type="float" office:value="1754.5" calcext:value-type="float">
            <text:p>1754.5</text:p>
          </table:table-cell>
          <table:table-cell office:value-type="float" office:value="1754.83" calcext:value-type="float">
            <text:p>1754.83</text:p>
          </table:table-cell>
          <table:table-cell office:value-type="float" office:value="1753.13" calcext:value-type="float">
            <text:p>1753.13</text:p>
          </table:table-cell>
          <table:table-cell office:value-type="float" office:value="1753.5" calcext:value-type="float">
            <text:p>1753.5</text:p>
          </table:table-cell>
          <table:table-cell office:value-type="float" office:value="737.33" calcext:value-type="float">
            <text:p>737.33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string" calcext:value-type="string">
            <text:p>2026-07-04T07:12:09.005Z</text:p>
          </table:table-cell>
          <table:table-cell office:value-type="float" office:value="62474" calcext:value-type="float">
            <text:p>62474</text:p>
          </table:table-cell>
          <table:table-cell office:value-type="float" office:value="62565.62" calcext:value-type="float">
            <text:p>62565.62</text:p>
          </table:table-cell>
          <table:table-cell office:value-type="float" office:value="62470" calcext:value-type="float">
            <text:p>62470</text:p>
          </table:table-cell>
          <table:table-cell office:value-type="float" office:value="62538.63" calcext:value-type="float">
            <text:p>62538.63</text:p>
          </table:table-cell>
          <table:table-cell office:value-type="float" office:value="66.60192" calcext:value-type="float">
            <text:p>66.60192</text:p>
          </table:table-cell>
          <table:table-cell office:value-type="float" office:value="5124" calcext:value-type="float">
            <text:p>5124</text:p>
          </table:table-cell>
          <table:table-cell office:value-type="float" office:value="1753.32" calcext:value-type="float">
            <text:p>1753.32</text:p>
          </table:table-cell>
          <table:table-cell office:value-type="float" office:value="1756.5" calcext:value-type="float">
            <text:p>1756.5</text:p>
          </table:table-cell>
          <table:table-cell office:value-type="float" office:value="1752.86" calcext:value-type="float">
            <text:p>1752.86</text:p>
          </table:table-cell>
          <table:table-cell office:value-type="float" office:value="1755.55" calcext:value-type="float">
            <text:p>1755.55</text:p>
          </table:table-cell>
          <table:table-cell office:value-type="float" office:value="1120.2474" calcext:value-type="float">
            <text:p>1120.2474</text:p>
          </table:table-cell>
          <table:table-cell office:value-type="float" office:value="9317" calcext:value-type="float">
            <text:p>9317</text:p>
          </table:table-cell>
        </table:table-row>
        <table:table-row table:style-name="ro1">
          <table:table-cell office:value-type="string" calcext:value-type="string">
            <text:p>2026-07-04T07:17:09.024Z</text:p>
          </table:table-cell>
          <table:table-cell office:value-type="float" office:value="62548.01" calcext:value-type="float">
            <text:p>62548.01</text:p>
          </table:table-cell>
          <table:table-cell office:value-type="float" office:value="62551.99" calcext:value-type="float">
            <text:p>62551.99</text:p>
          </table:table-cell>
          <table:table-cell office:value-type="float" office:value="62494" calcext:value-type="float">
            <text:p>62494</text:p>
          </table:table-cell>
          <table:table-cell office:value-type="float" office:value="62530" calcext:value-type="float">
            <text:p>62530</text:p>
          </table:table-cell>
          <table:table-cell office:value-type="float" office:value="29.77746" calcext:value-type="float">
            <text:p>29.77746</text:p>
          </table:table-cell>
          <table:table-cell office:value-type="float" office:value="5675" calcext:value-type="float">
            <text:p>5675</text:p>
          </table:table-cell>
          <table:table-cell office:value-type="float" office:value="1755.8" calcext:value-type="float">
            <text:p>1755.8</text:p>
          </table:table-cell>
          <table:table-cell office:value-type="float" office:value="1755.81" calcext:value-type="float">
            <text:p>1755.81</text:p>
          </table:table-cell>
          <table:table-cell office:value-type="float" office:value="1753.8" calcext:value-type="float">
            <text:p>1753.8</text:p>
          </table:table-cell>
          <table:table-cell office:value-type="float" office:value="1753.92" calcext:value-type="float">
            <text:p>1753.92</text:p>
          </table:table-cell>
          <table:table-cell office:value-type="float" office:value="206.592" calcext:value-type="float">
            <text:p>206.592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string" calcext:value-type="string">
            <text:p>2026-07-04T07:22:09.045Z</text:p>
          </table:table-cell>
          <table:table-cell office:value-type="float" office:value="62530.01" calcext:value-type="float">
            <text:p>62530.01</text:p>
          </table:table-cell>
          <table:table-cell office:value-type="float" office:value="62563.34" calcext:value-type="float">
            <text:p>62563.34</text:p>
          </table:table-cell>
          <table:table-cell office:value-type="float" office:value="62530" calcext:value-type="float">
            <text:p>62530</text:p>
          </table:table-cell>
          <table:table-cell office:value-type="float" office:value="62563.34" calcext:value-type="float">
            <text:p>62563.34</text:p>
          </table:table-cell>
          <table:table-cell office:value-type="float" office:value="25.77196" calcext:value-type="float">
            <text:p>25.77196</text:p>
          </table:table-cell>
          <table:table-cell office:value-type="float" office:value="2549" calcext:value-type="float">
            <text:p>2549</text:p>
          </table:table-cell>
          <table:table-cell office:value-type="float" office:value="1754.11" calcext:value-type="float">
            <text:p>1754.11</text:p>
          </table:table-cell>
          <table:table-cell office:value-type="float" office:value="1756.18" calcext:value-type="float">
            <text:p>1756.18</text:p>
          </table:table-cell>
          <table:table-cell office:value-type="float" office:value="1753.86" calcext:value-type="float">
            <text:p>1753.86</text:p>
          </table:table-cell>
          <table:table-cell office:value-type="float" office:value="1756.02" calcext:value-type="float">
            <text:p>1756.02</text:p>
          </table:table-cell>
          <table:table-cell office:value-type="float" office:value="273.4663" calcext:value-type="float">
            <text:p>273.4663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2026-07-04T07:27:09.065Z</text:p>
          </table:table-cell>
          <table:table-cell office:value-type="float" office:value="62563.33" calcext:value-type="float">
            <text:p>62563.33</text:p>
          </table:table-cell>
          <table:table-cell office:value-type="float" office:value="62634.24" calcext:value-type="float">
            <text:p>62634.24</text:p>
          </table:table-cell>
          <table:table-cell table:number-columns-repeated="2" office:value-type="float" office:value="62546" calcext:value-type="float">
            <text:p>62546</text:p>
          </table:table-cell>
          <table:table-cell office:value-type="float" office:value="49.73779" calcext:value-type="float">
            <text:p>49.73779</text:p>
          </table:table-cell>
          <table:table-cell office:value-type="float" office:value="9027" calcext:value-type="float">
            <text:p>9027</text:p>
          </table:table-cell>
          <table:table-cell office:value-type="float" office:value="1755.95" calcext:value-type="float">
            <text:p>1755.95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1754.64" calcext:value-type="float">
            <text:p>1754.64</text:p>
          </table:table-cell>
          <table:table-cell office:value-type="float" office:value="1754.69" calcext:value-type="float">
            <text:p>1754.69</text:p>
          </table:table-cell>
          <table:table-cell office:value-type="float" office:value="394.6644" calcext:value-type="float">
            <text:p>394.6644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2026-07-04T07:32:09.085Z</text:p>
          </table:table-cell>
          <table:table-cell office:value-type="float" office:value="62546" calcext:value-type="float">
            <text:p>62546</text:p>
          </table:table-cell>
          <table:table-cell office:value-type="float" office:value="62565.93" calcext:value-type="float">
            <text:p>62565.93</text:p>
          </table:table-cell>
          <table:table-cell office:value-type="float" office:value="62544.05" calcext:value-type="float">
            <text:p>62544.05</text:p>
          </table:table-cell>
          <table:table-cell office:value-type="float" office:value="62550" calcext:value-type="float">
            <text:p>62550</text:p>
          </table:table-cell>
          <table:table-cell office:value-type="float" office:value="34.38823" calcext:value-type="float">
            <text:p>34.38823</text:p>
          </table:table-cell>
          <table:table-cell office:value-type="float" office:value="3447" calcext:value-type="float">
            <text:p>3447</text:p>
          </table:table-cell>
          <table:table-cell office:value-type="float" office:value="1754.64" calcext:value-type="float">
            <text:p>1754.64</text:p>
          </table:table-cell>
          <table:table-cell office:value-type="float" office:value="1756.82" calcext:value-type="float">
            <text:p>1756.82</text:p>
          </table:table-cell>
          <table:table-cell office:value-type="float" office:value="1754.64" calcext:value-type="float">
            <text:p>1754.64</text:p>
          </table:table-cell>
          <table:table-cell office:value-type="float" office:value="1756.27" calcext:value-type="float">
            <text:p>1756.27</text:p>
          </table:table-cell>
          <table:table-cell office:value-type="float" office:value="578.9971" calcext:value-type="float">
            <text:p>578.9971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string" calcext:value-type="string">
            <text:p>2026-07-04T07:37:09.105Z</text:p>
          </table:table-cell>
          <table:table-cell office:value-type="float" office:value="62550.01" calcext:value-type="float">
            <text:p>62550.01</text:p>
          </table:table-cell>
          <table:table-cell office:value-type="float" office:value="62569.41" calcext:value-type="float">
            <text:p>62569.41</text:p>
          </table:table-cell>
          <table:table-cell office:value-type="float" office:value="62485.95" calcext:value-type="float">
            <text:p>62485.95</text:p>
          </table:table-cell>
          <table:table-cell office:value-type="float" office:value="62492.18" calcext:value-type="float">
            <text:p>62492.18</text:p>
          </table:table-cell>
          <table:table-cell office:value-type="float" office:value="41.41252" calcext:value-type="float">
            <text:p>41.41252</text:p>
          </table:table-cell>
          <table:table-cell office:value-type="float" office:value="5376" calcext:value-type="float">
            <text:p>5376</text:p>
          </table:table-cell>
          <table:table-cell office:value-type="float" office:value="1756.27" calcext:value-type="float">
            <text:p>1756.27</text:p>
          </table:table-cell>
          <table:table-cell office:value-type="float" office:value="1756.9" calcext:value-type="float">
            <text:p>1756.9</text:p>
          </table:table-cell>
          <table:table-cell office:value-type="float" office:value="1754.32" calcext:value-type="float">
            <text:p>1754.32</text:p>
          </table:table-cell>
          <table:table-cell office:value-type="float" office:value="1754.63" calcext:value-type="float">
            <text:p>1754.63</text:p>
          </table:table-cell>
          <table:table-cell office:value-type="float" office:value="780.7267" calcext:value-type="float">
            <text:p>780.7267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office:value-type="string" calcext:value-type="string">
            <text:p>2026-07-04T07:42:09.113Z</text:p>
          </table:table-cell>
          <table:table-cell office:value-type="float" office:value="62492.18" calcext:value-type="float">
            <text:p>62492.18</text:p>
          </table:table-cell>
          <table:table-cell office:value-type="float" office:value="62530" calcext:value-type="float">
            <text:p>62530</text:p>
          </table:table-cell>
          <table:table-cell office:value-type="float" office:value="62488" calcext:value-type="float">
            <text:p>62488</text:p>
          </table:table-cell>
          <table:table-cell office:value-type="float" office:value="62523.99" calcext:value-type="float">
            <text:p>62523.99</text:p>
          </table:table-cell>
          <table:table-cell office:value-type="float" office:value="70.36019" calcext:value-type="float">
            <text:p>70.36019</text:p>
          </table:table-cell>
          <table:table-cell office:value-type="float" office:value="4412" calcext:value-type="float">
            <text:p>4412</text:p>
          </table:table-cell>
          <table:table-cell office:value-type="float" office:value="1754.63" calcext:value-type="float">
            <text:p>1754.63</text:p>
          </table:table-cell>
          <table:table-cell office:value-type="float" office:value="1756.36" calcext:value-type="float">
            <text:p>1756.36</text:p>
          </table:table-cell>
          <table:table-cell office:value-type="float" office:value="1754.62" calcext:value-type="float">
            <text:p>1754.62</text:p>
          </table:table-cell>
          <table:table-cell office:value-type="float" office:value="1756.14" calcext:value-type="float">
            <text:p>1756.14</text:p>
          </table:table-cell>
          <table:table-cell office:value-type="float" office:value="402.901" calcext:value-type="float">
            <text:p>402.901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string" calcext:value-type="string">
            <text:p>2026-07-04T07:47:09.133Z</text:p>
          </table:table-cell>
          <table:table-cell office:value-type="float" office:value="62523.99" calcext:value-type="float">
            <text:p>62523.99</text:p>
          </table:table-cell>
          <table:table-cell office:value-type="float" office:value="62535.89" calcext:value-type="float">
            <text:p>62535.89</text:p>
          </table:table-cell>
          <table:table-cell office:value-type="float" office:value="62489.99" calcext:value-type="float">
            <text:p>62489.99</text:p>
          </table:table-cell>
          <table:table-cell office:value-type="float" office:value="62535.88" calcext:value-type="float">
            <text:p>62535.88</text:p>
          </table:table-cell>
          <table:table-cell office:value-type="float" office:value="86.33509" calcext:value-type="float">
            <text:p>86.33509</text:p>
          </table:table-cell>
          <table:table-cell office:value-type="float" office:value="4343" calcext:value-type="float">
            <text:p>4343</text:p>
          </table:table-cell>
          <table:table-cell office:value-type="float" office:value="1756.13" calcext:value-type="float">
            <text:p>1756.13</text:p>
          </table:table-cell>
          <table:table-cell office:value-type="float" office:value="1756.58" calcext:value-type="float">
            <text:p>1756.58</text:p>
          </table:table-cell>
          <table:table-cell office:value-type="float" office:value="1755.22" calcext:value-type="float">
            <text:p>1755.22</text:p>
          </table:table-cell>
          <table:table-cell office:value-type="float" office:value="1756.2" calcext:value-type="float">
            <text:p>1756.2</text:p>
          </table:table-cell>
          <table:table-cell office:value-type="float" office:value="201.4219" calcext:value-type="float">
            <text:p>201.421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2026-07-04T07:52:09.134Z</text:p>
          </table:table-cell>
          <table:table-cell office:value-type="float" office:value="62535.88" calcext:value-type="float">
            <text:p>62535.88</text:p>
          </table:table-cell>
          <table:table-cell office:value-type="float" office:value="62588" calcext:value-type="float">
            <text:p>62588</text:p>
          </table:table-cell>
          <table:table-cell office:value-type="float" office:value="62535.88" calcext:value-type="float">
            <text:p>62535.88</text:p>
          </table:table-cell>
          <table:table-cell office:value-type="float" office:value="62588" calcext:value-type="float">
            <text:p>62588</text:p>
          </table:table-cell>
          <table:table-cell office:value-type="float" office:value="29.92617" calcext:value-type="float">
            <text:p>29.92617</text:p>
          </table:table-cell>
          <table:table-cell office:value-type="float" office:value="4628" calcext:value-type="float">
            <text:p>4628</text:p>
          </table:table-cell>
          <table:table-cell office:value-type="float" office:value="1756.2" calcext:value-type="float">
            <text:p>1756.2</text:p>
          </table:table-cell>
          <table:table-cell office:value-type="float" office:value="1759.67" calcext:value-type="float">
            <text:p>1759.67</text:p>
          </table:table-cell>
          <table:table-cell office:value-type="float" office:value="1756.2" calcext:value-type="float">
            <text:p>1756.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722.2669" calcext:value-type="float">
            <text:p>722.2669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string" calcext:value-type="string">
            <text:p>2026-07-04T07:57:09.141Z</text:p>
          </table:table-cell>
          <table:table-cell table:number-columns-repeated="2" office:value-type="float" office:value="62588" calcext:value-type="float">
            <text:p>62588</text:p>
          </table:table-cell>
          <table:table-cell office:value-type="float" office:value="62570" calcext:value-type="float">
            <text:p>62570</text:p>
          </table:table-cell>
          <table:table-cell office:value-type="float" office:value="62572.91" calcext:value-type="float">
            <text:p>62572.91</text:p>
          </table:table-cell>
          <table:table-cell office:value-type="float" office:value="13.55395" calcext:value-type="float">
            <text:p>13.55395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float" office:value="1759.19" calcext:value-type="float">
            <text:p>1759.19</text:p>
          </table:table-cell>
          <table:table-cell office:value-type="float" office:value="1757.42" calcext:value-type="float">
            <text:p>1757.42</text:p>
          </table:table-cell>
          <table:table-cell office:value-type="float" office:value="1757.56" calcext:value-type="float">
            <text:p>1757.56</text:p>
          </table:table-cell>
          <table:table-cell office:value-type="float" office:value="198.8216" calcext:value-type="float">
            <text:p>198.8216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2026-07-04T08:02:09.143Z</text:p>
          </table:table-cell>
          <table:table-cell office:value-type="float" office:value="62578.76" calcext:value-type="float">
            <text:p>62578.76</text:p>
          </table:table-cell>
          <table:table-cell office:value-type="float" office:value="62594.51" calcext:value-type="float">
            <text:p>62594.51</text:p>
          </table:table-cell>
          <table:table-cell table:number-columns-repeated="2" office:value-type="float" office:value="62550.91" calcext:value-type="float">
            <text:p>62550.91</text:p>
          </table:table-cell>
          <table:table-cell office:value-type="float" office:value="24.50949" calcext:value-type="float">
            <text:p>24.50949</text:p>
          </table:table-cell>
          <table:table-cell office:value-type="float" office:value="3314" calcext:value-type="float">
            <text:p>3314</text:p>
          </table:table-cell>
          <table:table-cell office:value-type="float" office:value="1757.72" calcext:value-type="float">
            <text:p>1757.72</text:p>
          </table:table-cell>
          <table:table-cell office:value-type="float" office:value="1759.15" calcext:value-type="float">
            <text:p>1759.15</text:p>
          </table:table-cell>
          <table:table-cell office:value-type="float" office:value="1757.42" calcext:value-type="float">
            <text:p>1757.42</text:p>
          </table:table-cell>
          <table:table-cell office:value-type="float" office:value="1758.51" calcext:value-type="float">
            <text:p>1758.51</text:p>
          </table:table-cell>
          <table:table-cell office:value-type="float" office:value="280.6347" calcext:value-type="float">
            <text:p>280.6347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string" calcext:value-type="string">
            <text:p>2026-07-04T08:07:09.143Z</text:p>
          </table:table-cell>
          <table:table-cell office:value-type="float" office:value="62550.91" calcext:value-type="float">
            <text:p>62550.91</text:p>
          </table:table-cell>
          <table:table-cell office:value-type="float" office:value="62550.92" calcext:value-type="float">
            <text:p>62550.92</text:p>
          </table:table-cell>
          <table:table-cell office:value-type="float" office:value="62530.49" calcext:value-type="float">
            <text:p>62530.49</text:p>
          </table:table-cell>
          <table:table-cell office:value-type="float" office:value="62550.92" calcext:value-type="float">
            <text:p>62550.92</text:p>
          </table:table-cell>
          <table:table-cell office:value-type="float" office:value="18.95693" calcext:value-type="float">
            <text:p>18.95693</text:p>
          </table:table-cell>
          <table:table-cell office:value-type="float" office:value="2472" calcext:value-type="float">
            <text:p>2472</text:p>
          </table:table-cell>
          <table:table-cell office:value-type="float" office:value="1758.39" calcext:value-type="float">
            <text:p>1758.39</text:p>
          </table:table-cell>
          <table:table-cell office:value-type="float" office:value="1759.5" calcext:value-type="float">
            <text:p>1759.5</text:p>
          </table:table-cell>
          <table:table-cell office:value-type="float" office:value="1757.62" calcext:value-type="float">
            <text:p>1757.62</text:p>
          </table:table-cell>
          <table:table-cell office:value-type="float" office:value="1759.5" calcext:value-type="float">
            <text:p>1759.5</text:p>
          </table:table-cell>
          <table:table-cell office:value-type="float" office:value="230.7684" calcext:value-type="float">
            <text:p>230.7684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string" calcext:value-type="string">
            <text:p>2026-07-04T08:12:09.152Z</text:p>
          </table:table-cell>
          <table:table-cell office:value-type="float" office:value="62537.45" calcext:value-type="float">
            <text:p>62537.45</text:p>
          </table:table-cell>
          <table:table-cell office:value-type="float" office:value="62550.92" calcext:value-type="float">
            <text:p>62550.92</text:p>
          </table:table-cell>
          <table:table-cell table:number-columns-repeated="2" office:value-type="float" office:value="62518" calcext:value-type="float">
            <text:p>62518</text:p>
          </table:table-cell>
          <table:table-cell office:value-type="float" office:value="12.5102" calcext:value-type="float">
            <text:p>12.5102</text:p>
          </table:table-cell>
          <table:table-cell office:value-type="float" office:value="2085" calcext:value-type="float">
            <text:p>2085</text:p>
          </table:table-cell>
          <table:table-cell office:value-type="float" office:value="1759.02" calcext:value-type="float">
            <text:p>1759.02</text:p>
          </table:table-cell>
          <table:table-cell office:value-type="float" office:value="1759.5" calcext:value-type="float">
            <text:p>1759.5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1758.45" calcext:value-type="float">
            <text:p>1758.45</text:p>
          </table:table-cell>
          <table:table-cell office:value-type="float" office:value="306.0997" calcext:value-type="float">
            <text:p>306.0997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string" calcext:value-type="string">
            <text:p>2026-07-04T08:17:09.170Z</text:p>
          </table:table-cell>
          <table:table-cell office:value-type="float" office:value="62518" calcext:value-type="float">
            <text:p>62518</text:p>
          </table:table-cell>
          <table:table-cell office:value-type="float" office:value="62551.25" calcext:value-type="float">
            <text:p>62551.25</text:p>
          </table:table-cell>
          <table:table-cell office:value-type="float" office:value="62516.46" calcext:value-type="float">
            <text:p>62516.46</text:p>
          </table:table-cell>
          <table:table-cell office:value-type="float" office:value="62520" calcext:value-type="float">
            <text:p>62520</text:p>
          </table:table-cell>
          <table:table-cell office:value-type="float" office:value="10.94108" calcext:value-type="float">
            <text:p>10.94108</text:p>
          </table:table-cell>
          <table:table-cell office:value-type="float" office:value="3460" calcext:value-type="float">
            <text:p>3460</text:p>
          </table:table-cell>
          <table:table-cell office:value-type="float" office:value="1758.39" calcext:value-type="float">
            <text:p>1758.39</text:p>
          </table:table-cell>
          <table:table-cell office:value-type="float" office:value="1760" calcext:value-type="float">
            <text:p>1760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1758.2" calcext:value-type="float">
            <text:p>1758.2</text:p>
          </table:table-cell>
          <table:table-cell office:value-type="float" office:value="545.3799" calcext:value-type="float">
            <text:p>545.3799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2026-07-04T08:22:09.173Z</text:p>
          </table:table-cell>
          <table:table-cell office:value-type="float" office:value="62532" calcext:value-type="float">
            <text:p>62532</text:p>
          </table:table-cell>
          <table:table-cell office:value-type="float" office:value="62580" calcext:value-type="float">
            <text:p>62580</text:p>
          </table:table-cell>
          <table:table-cell office:value-type="float" office:value="62520" calcext:value-type="float">
            <text:p>62520</text:p>
          </table:table-cell>
          <table:table-cell office:value-type="float" office:value="62580" calcext:value-type="float">
            <text:p>62580</text:p>
          </table:table-cell>
          <table:table-cell office:value-type="float" office:value="12.64492" calcext:value-type="float">
            <text:p>12.64492</text:p>
          </table:table-cell>
          <table:table-cell office:value-type="float" office:value="3660" calcext:value-type="float">
            <text:p>3660</text:p>
          </table:table-cell>
          <table:table-cell office:value-type="float" office:value="1758.77" calcext:value-type="float">
            <text:p>1758.77</text:p>
          </table:table-cell>
          <table:table-cell office:value-type="float" office:value="1761.12" calcext:value-type="float">
            <text:p>1761.12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1761.12" calcext:value-type="float">
            <text:p>1761.12</text:p>
          </table:table-cell>
          <table:table-cell office:value-type="float" office:value="284.1129" calcext:value-type="float">
            <text:p>284.1129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2026-07-04T08:27:09.193Z</text:p>
          </table:table-cell>
          <table:table-cell office:value-type="float" office:value="62572.34" calcext:value-type="float">
            <text:p>62572.34</text:p>
          </table:table-cell>
          <table:table-cell office:value-type="float" office:value="62580" calcext:value-type="float">
            <text:p>62580</text:p>
          </table:table-cell>
          <table:table-cell office:value-type="float" office:value="62562.51" calcext:value-type="float">
            <text:p>62562.51</text:p>
          </table:table-cell>
          <table:table-cell office:value-type="float" office:value="62570" calcext:value-type="float">
            <text:p>62570</text:p>
          </table:table-cell>
          <table:table-cell office:value-type="float" office:value="16.54398" calcext:value-type="float">
            <text:p>16.54398</text:p>
          </table:table-cell>
          <table:table-cell office:value-type="float" office:value="3270" calcext:value-type="float">
            <text:p>3270</text:p>
          </table:table-cell>
          <table:table-cell office:value-type="float" office:value="1760.72" calcext:value-type="float">
            <text:p>1760.72</text:p>
          </table:table-cell>
          <table:table-cell office:value-type="float" office:value="1761.38" calcext:value-type="float">
            <text:p>1761.38</text:p>
          </table:table-cell>
          <table:table-cell office:value-type="float" office:value="1758.25" calcext:value-type="float">
            <text:p>1758.25</text:p>
          </table:table-cell>
          <table:table-cell office:value-type="float" office:value="1758.49" calcext:value-type="float">
            <text:p>1758.49</text:p>
          </table:table-cell>
          <table:table-cell office:value-type="float" office:value="320.2435" calcext:value-type="float">
            <text:p>320.2435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string" calcext:value-type="string">
            <text:p>2026-07-04T08:32:09.211Z</text:p>
          </table:table-cell>
          <table:table-cell office:value-type="float" office:value="62570.01" calcext:value-type="float">
            <text:p>62570.01</text:p>
          </table:table-cell>
          <table:table-cell office:value-type="float" office:value="62575.53" calcext:value-type="float">
            <text:p>62575.53</text:p>
          </table:table-cell>
          <table:table-cell office:value-type="float" office:value="62548" calcext:value-type="float">
            <text:p>62548</text:p>
          </table:table-cell>
          <table:table-cell office:value-type="float" office:value="62558.7" calcext:value-type="float">
            <text:p>62558.7</text:p>
          </table:table-cell>
          <table:table-cell office:value-type="float" office:value="15.49412" calcext:value-type="float">
            <text:p>15.49412</text:p>
          </table:table-cell>
          <table:table-cell office:value-type="float" office:value="2866" calcext:value-type="float">
            <text:p>2866</text:p>
          </table:table-cell>
          <table:table-cell office:value-type="float" office:value="1758.52" calcext:value-type="float">
            <text:p>1758.52</text:p>
          </table:table-cell>
          <table:table-cell office:value-type="float" office:value="1758.97" calcext:value-type="float">
            <text:p>1758.97</text:p>
          </table:table-cell>
          <table:table-cell office:value-type="float" office:value="1757.39" calcext:value-type="float">
            <text:p>1757.39</text:p>
          </table:table-cell>
          <table:table-cell office:value-type="float" office:value="1758.87" calcext:value-type="float">
            <text:p>1758.87</text:p>
          </table:table-cell>
          <table:table-cell office:value-type="float" office:value="256.0232" calcext:value-type="float">
            <text:p>256.0232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2026-07-04T08:37:09.229Z</text:p>
          </table:table-cell>
          <table:table-cell office:value-type="float" office:value="62558.71" calcext:value-type="float">
            <text:p>62558.71</text:p>
          </table:table-cell>
          <table:table-cell office:value-type="float" office:value="62617.99" calcext:value-type="float">
            <text:p>62617.99</text:p>
          </table:table-cell>
          <table:table-cell office:value-type="float" office:value="62558.7" calcext:value-type="float">
            <text:p>62558.7</text:p>
          </table:table-cell>
          <table:table-cell office:value-type="float" office:value="62605.54" calcext:value-type="float">
            <text:p>62605.54</text:p>
          </table:table-cell>
          <table:table-cell office:value-type="float" office:value="24.6072" calcext:value-type="float">
            <text:p>24.6072</text:p>
          </table:table-cell>
          <table:table-cell office:value-type="float" office:value="4624" calcext:value-type="float">
            <text:p>4624</text:p>
          </table:table-cell>
          <table:table-cell office:value-type="float" office:value="1758.87" calcext:value-type="float">
            <text:p>1758.87</text:p>
          </table:table-cell>
          <table:table-cell office:value-type="float" office:value="1762.56" calcext:value-type="float">
            <text:p>1762.56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1761.7" calcext:value-type="float">
            <text:p>1761.7</text:p>
          </table:table-cell>
          <table:table-cell office:value-type="float" office:value="286.2866" calcext:value-type="float">
            <text:p>286.2866</text:p>
          </table:table-cell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string" calcext:value-type="string">
            <text:p>2026-07-04T08:42:09.236Z</text:p>
          </table:table-cell>
          <table:table-cell office:value-type="float" office:value="62605.54" calcext:value-type="float">
            <text:p>62605.54</text:p>
          </table:table-cell>
          <table:table-cell office:value-type="float" office:value="62674.47" calcext:value-type="float">
            <text:p>62674.47</text:p>
          </table:table-cell>
          <table:table-cell office:value-type="float" office:value="62562.19" calcext:value-type="float">
            <text:p>62562.19</text:p>
          </table:table-cell>
          <table:table-cell office:value-type="float" office:value="62590.71" calcext:value-type="float">
            <text:p>62590.71</text:p>
          </table:table-cell>
          <table:table-cell office:value-type="float" office:value="60.26465" calcext:value-type="float">
            <text:p>60.26465</text:p>
          </table:table-cell>
          <table:table-cell office:value-type="float" office:value="10191" calcext:value-type="float">
            <text:p>10191</text:p>
          </table:table-cell>
          <table:table-cell office:value-type="float" office:value="1761.42" calcext:value-type="float">
            <text:p>1761.42</text:p>
          </table:table-cell>
          <table:table-cell office:value-type="float" office:value="1765.55" calcext:value-type="float">
            <text:p>1765.55</text:p>
          </table:table-cell>
          <table:table-cell office:value-type="float" office:value="1760.56" calcext:value-type="float">
            <text:p>1760.56</text:p>
          </table:table-cell>
          <table:table-cell office:value-type="float" office:value="1760.57" calcext:value-type="float">
            <text:p>1760.57</text:p>
          </table:table-cell>
          <table:table-cell office:value-type="float" office:value="623.8752" calcext:value-type="float">
            <text:p>623.8752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2026-07-04T08:47:09.254Z</text:p>
          </table:table-cell>
          <table:table-cell office:value-type="float" office:value="62602.3" calcext:value-type="float">
            <text:p>62602.3</text:p>
          </table:table-cell>
          <table:table-cell office:value-type="float" office:value="62616" calcext:value-type="float">
            <text:p>62616</text:p>
          </table:table-cell>
          <table:table-cell office:value-type="float" office:value="62569.03" calcext:value-type="float">
            <text:p>62569.03</text:p>
          </table:table-cell>
          <table:table-cell office:value-type="float" office:value="62615.99" calcext:value-type="float">
            <text:p>62615.99</text:p>
          </table:table-cell>
          <table:table-cell office:value-type="float" office:value="50.85252" calcext:value-type="float">
            <text:p>50.85252</text:p>
          </table:table-cell>
          <table:table-cell office:value-type="float" office:value="8113" calcext:value-type="float">
            <text:p>8113</text:p>
          </table:table-cell>
          <table:table-cell office:value-type="float" office:value="1760.84" calcext:value-type="float">
            <text:p>1760.84</text:p>
          </table:table-cell>
          <table:table-cell office:value-type="float" office:value="1762.49" calcext:value-type="float">
            <text:p>1762.49</text:p>
          </table:table-cell>
          <table:table-cell office:value-type="float" office:value="1759.69" calcext:value-type="float">
            <text:p>1759.69</text:p>
          </table:table-cell>
          <table:table-cell office:value-type="float" office:value="1762.25" calcext:value-type="float">
            <text:p>1762.25</text:p>
          </table:table-cell>
          <table:table-cell office:value-type="float" office:value="295.6163" calcext:value-type="float">
            <text:p>295.6163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string" calcext:value-type="string">
            <text:p>2026-07-04T08:52:09.256Z</text:p>
          </table:table-cell>
          <table:table-cell office:value-type="float" office:value="62616" calcext:value-type="float">
            <text:p>62616</text:p>
          </table:table-cell>
          <table:table-cell office:value-type="float" office:value="62661.67" calcext:value-type="float">
            <text:p>62661.67</text:p>
          </table:table-cell>
          <table:table-cell office:value-type="float" office:value="62615.99" calcext:value-type="float">
            <text:p>62615.99</text:p>
          </table:table-cell>
          <table:table-cell office:value-type="float" office:value="62639.15" calcext:value-type="float">
            <text:p>62639.15</text:p>
          </table:table-cell>
          <table:table-cell office:value-type="float" office:value="30.20698" calcext:value-type="float">
            <text:p>30.20698</text:p>
          </table:table-cell>
          <table:table-cell office:value-type="float" office:value="5091" calcext:value-type="float">
            <text:p>5091</text:p>
          </table:table-cell>
          <table:table-cell office:value-type="float" office:value="1762.49" calcext:value-type="float">
            <text:p>1762.49</text:p>
          </table:table-cell>
          <table:table-cell office:value-type="float" office:value="1765.31" calcext:value-type="float">
            <text:p>1765.31</text:p>
          </table:table-cell>
          <table:table-cell office:value-type="float" office:value="1762.24" calcext:value-type="float">
            <text:p>1762.24</text:p>
          </table:table-cell>
          <table:table-cell office:value-type="float" office:value="1763.49" calcext:value-type="float">
            <text:p>1763.49</text:p>
          </table:table-cell>
          <table:table-cell office:value-type="float" office:value="358.8394" calcext:value-type="float">
            <text:p>358.8394</text:p>
          </table:table-cell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string" calcext:value-type="string">
            <text:p>2026-07-04T08:57:09.257Z</text:p>
          </table:table-cell>
          <table:table-cell office:value-type="float" office:value="62642.6" calcext:value-type="float">
            <text:p>62642.6</text:p>
          </table:table-cell>
          <table:table-cell office:value-type="float" office:value="62644" calcext:value-type="float">
            <text:p>62644</text:p>
          </table:table-cell>
          <table:table-cell table:number-columns-repeated="2" office:value-type="float" office:value="62597.41" calcext:value-type="float">
            <text:p>62597.41</text:p>
          </table:table-cell>
          <table:table-cell office:value-type="float" office:value="55.15719" calcext:value-type="float">
            <text:p>55.15719</text:p>
          </table:table-cell>
          <table:table-cell office:value-type="float" office:value="5198" calcext:value-type="float">
            <text:p>5198</text:p>
          </table:table-cell>
          <table:table-cell office:value-type="float" office:value="1763.5" calcext:value-type="float">
            <text:p>1763.5</text:p>
          </table:table-cell>
          <table:table-cell office:value-type="float" office:value="1764.72" calcext:value-type="float">
            <text:p>1764.72</text:p>
          </table:table-cell>
          <table:table-cell office:value-type="float" office:value="1761.62" calcext:value-type="float">
            <text:p>1761.6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496.2153" calcext:value-type="float">
            <text:p>496.2153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string" calcext:value-type="string">
            <text:p>2026-07-04T09:02:09.266Z</text:p>
          </table:table-cell>
          <table:table-cell table:number-columns-repeated="2" office:value-type="float" office:value="62604.01" calcext:value-type="float">
            <text:p>62604.01</text:p>
          </table:table-cell>
          <table:table-cell office:value-type="float" office:value="62538" calcext:value-type="float">
            <text:p>62538</text:p>
          </table:table-cell>
          <table:table-cell office:value-type="float" office:value="62540.01" calcext:value-type="float">
            <text:p>62540.01</text:p>
          </table:table-cell>
          <table:table-cell office:value-type="float" office:value="38.81927" calcext:value-type="float">
            <text:p>38.81927</text:p>
          </table:table-cell>
          <table:table-cell office:value-type="float" office:value="7008" calcext:value-type="float">
            <text:p>7008</text:p>
          </table:table-cell>
          <table:table-cell office:value-type="float" office:value="1762.01" calcext:value-type="float">
            <text:p>1762.01</text:p>
          </table:table-cell>
          <table:table-cell office:value-type="float" office:value="1763.05" calcext:value-type="float">
            <text:p>1763.05</text:p>
          </table:table-cell>
          <table:table-cell office:value-type="float" office:value="1760.44" calcext:value-type="float">
            <text:p>1760.44</text:p>
          </table:table-cell>
          <table:table-cell office:value-type="float" office:value="1761.43" calcext:value-type="float">
            <text:p>1761.43</text:p>
          </table:table-cell>
          <table:table-cell office:value-type="float" office:value="359.3687" calcext:value-type="float">
            <text:p>359.3687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string" calcext:value-type="string">
            <text:p>2026-07-04T09:07:09.280Z</text:p>
          </table:table-cell>
          <table:table-cell office:value-type="float" office:value="62544.69" calcext:value-type="float">
            <text:p>62544.69</text:p>
          </table:table-cell>
          <table:table-cell office:value-type="float" office:value="62554.31" calcext:value-type="float">
            <text:p>62554.31</text:p>
          </table:table-cell>
          <table:table-cell office:value-type="float" office:value="62450" calcext:value-type="float">
            <text:p>62450</text:p>
          </table:table-cell>
          <table:table-cell office:value-type="float" office:value="62554.31" calcext:value-type="float">
            <text:p>62554.31</text:p>
          </table:table-cell>
          <table:table-cell office:value-type="float" office:value="25.38012" calcext:value-type="float">
            <text:p>25.38012</text:p>
          </table:table-cell>
          <table:table-cell office:value-type="float" office:value="7031" calcext:value-type="float">
            <text:p>7031</text:p>
          </table:table-cell>
          <table:table-cell office:value-type="float" office:value="1761.47" calcext:value-type="float">
            <text:p>1761.47</text:p>
          </table:table-cell>
          <table:table-cell office:value-type="float" office:value="1762.3" calcext:value-type="float">
            <text:p>1762.3</text:p>
          </table:table-cell>
          <table:table-cell office:value-type="float" office:value="1759.15" calcext:value-type="float">
            <text:p>1759.15</text:p>
          </table:table-cell>
          <table:table-cell office:value-type="float" office:value="1762.04" calcext:value-type="float">
            <text:p>1762.04</text:p>
          </table:table-cell>
          <table:table-cell office:value-type="float" office:value="599.9948" calcext:value-type="float">
            <text:p>599.9948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string" calcext:value-type="string">
            <text:p>2026-07-04T09:12:09.296Z</text:p>
          </table:table-cell>
          <table:table-cell office:value-type="float" office:value="62537.73" calcext:value-type="float">
            <text:p>62537.73</text:p>
          </table:table-cell>
          <table:table-cell office:value-type="float" office:value="62558.03" calcext:value-type="float">
            <text:p>62558.03</text:p>
          </table:table-cell>
          <table:table-cell office:value-type="float" office:value="62502.61" calcext:value-type="float">
            <text:p>62502.61</text:p>
          </table:table-cell>
          <table:table-cell office:value-type="float" office:value="62550.01" calcext:value-type="float">
            <text:p>62550.01</text:p>
          </table:table-cell>
          <table:table-cell office:value-type="float" office:value="11.87726" calcext:value-type="float">
            <text:p>11.87726</text:p>
          </table:table-cell>
          <table:table-cell office:value-type="float" office:value="5280" calcext:value-type="float">
            <text:p>5280</text:p>
          </table:table-cell>
          <table:table-cell office:value-type="float" office:value="1761.76" calcext:value-type="float">
            <text:p>1761.76</text:p>
          </table:table-cell>
          <table:table-cell office:value-type="float" office:value="1762.36" calcext:value-type="float">
            <text:p>1762.36</text:p>
          </table:table-cell>
          <table:table-cell office:value-type="float" office:value="1760.34" calcext:value-type="float">
            <text:p>1760.34</text:p>
          </table:table-cell>
          <table:table-cell office:value-type="float" office:value="1761.72" calcext:value-type="float">
            <text:p>1761.72</text:p>
          </table:table-cell>
          <table:table-cell office:value-type="float" office:value="404.1056" calcext:value-type="float">
            <text:p>404.1056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2026-07-04T09:17:09.313Z</text:p>
          </table:table-cell>
          <table:table-cell office:value-type="float" office:value="62556.82" calcext:value-type="float">
            <text:p>62556.82</text:p>
          </table:table-cell>
          <table:table-cell office:value-type="float" office:value="62556.83" calcext:value-type="float">
            <text:p>62556.83</text:p>
          </table:table-cell>
          <table:table-cell office:value-type="float" office:value="62480" calcext:value-type="float">
            <text:p>62480</text:p>
          </table:table-cell>
          <table:table-cell office:value-type="float" office:value="62483.79" calcext:value-type="float">
            <text:p>62483.79</text:p>
          </table:table-cell>
          <table:table-cell office:value-type="float" office:value="16.74231" calcext:value-type="float">
            <text:p>16.74231</text:p>
          </table:table-cell>
          <table:table-cell office:value-type="float" office:value="3566" calcext:value-type="float">
            <text:p>3566</text:p>
          </table:table-cell>
          <table:table-cell table:number-columns-repeated="2" office:value-type="float" office:value="1762.03" calcext:value-type="float">
            <text:p>1762.03</text:p>
          </table:table-cell>
          <table:table-cell office:value-type="float" office:value="1759.67" calcext:value-type="float">
            <text:p>1759.67</text:p>
          </table:table-cell>
          <table:table-cell office:value-type="float" office:value="1760.77" calcext:value-type="float">
            <text:p>1760.77</text:p>
          </table:table-cell>
          <table:table-cell office:value-type="float" office:value="249.212" calcext:value-type="float">
            <text:p>249.212</text:p>
          </table:table-cell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string" calcext:value-type="string">
            <text:p>2026-07-04T09:22:09.328Z</text:p>
          </table:table-cell>
          <table:table-cell office:value-type="float" office:value="62483.79" calcext:value-type="float">
            <text:p>62483.79</text:p>
          </table:table-cell>
          <table:table-cell office:value-type="float" office:value="62510" calcext:value-type="float">
            <text:p>62510</text:p>
          </table:table-cell>
          <table:table-cell office:value-type="float" office:value="62470" calcext:value-type="float">
            <text:p>62470</text:p>
          </table:table-cell>
          <table:table-cell office:value-type="float" office:value="62472" calcext:value-type="float">
            <text:p>62472</text:p>
          </table:table-cell>
          <table:table-cell office:value-type="float" office:value="9.16208" calcext:value-type="float">
            <text:p>9.16208</text:p>
          </table:table-cell>
          <table:table-cell office:value-type="float" office:value="3267" calcext:value-type="float">
            <text:p>3267</text:p>
          </table:table-cell>
          <table:table-cell office:value-type="float" office:value="1760.43" calcext:value-type="float">
            <text:p>1760.43</text:p>
          </table:table-cell>
          <table:table-cell office:value-type="float" office:value="1761.45" calcext:value-type="float">
            <text:p>1761.45</text:p>
          </table:table-cell>
          <table:table-cell office:value-type="float" office:value="1759.96" calcext:value-type="float">
            <text:p>1759.96</text:p>
          </table:table-cell>
          <table:table-cell office:value-type="float" office:value="1760.17" calcext:value-type="float">
            <text:p>1760.17</text:p>
          </table:table-cell>
          <table:table-cell office:value-type="float" office:value="204.2406" calcext:value-type="float">
            <text:p>204.2406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2026-07-04T09:27:09.333Z</text:p>
          </table:table-cell>
          <table:table-cell office:value-type="float" office:value="62472" calcext:value-type="float">
            <text:p>62472</text:p>
          </table:table-cell>
          <table:table-cell office:value-type="float" office:value="62486" calcext:value-type="float">
            <text:p>62486</text:p>
          </table:table-cell>
          <table:table-cell office:value-type="float" office:value="62458" calcext:value-type="float">
            <text:p>62458</text:p>
          </table:table-cell>
          <table:table-cell office:value-type="float" office:value="62460" calcext:value-type="float">
            <text:p>62460</text:p>
          </table:table-cell>
          <table:table-cell office:value-type="float" office:value="7.91825" calcext:value-type="float">
            <text:p>7.91825</text:p>
          </table:table-cell>
          <table:table-cell office:value-type="float" office:value="3073" calcext:value-type="float">
            <text:p>3073</text:p>
          </table:table-cell>
          <table:table-cell office:value-type="float" office:value="1760.18" calcext:value-type="float">
            <text:p>1760.18</text:p>
          </table:table-cell>
          <table:table-cell office:value-type="float" office:value="1760.46" calcext:value-type="float">
            <text:p>1760.46</text:p>
          </table:table-cell>
          <table:table-cell office:value-type="float" office:value="1758.97" calcext:value-type="float">
            <text:p>1758.97</text:p>
          </table:table-cell>
          <table:table-cell office:value-type="float" office:value="1759.53" calcext:value-type="float">
            <text:p>1759.53</text:p>
          </table:table-cell>
          <table:table-cell office:value-type="float" office:value="220.8409" calcext:value-type="float">
            <text:p>220.8409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string" calcext:value-type="string">
            <text:p>2026-07-04T09:32:09.335Z</text:p>
          </table:table-cell>
          <table:table-cell office:value-type="float" office:value="62458.01" calcext:value-type="float">
            <text:p>62458.01</text:p>
          </table:table-cell>
          <table:table-cell office:value-type="float" office:value="62486" calcext:value-type="float">
            <text:p>62486</text:p>
          </table:table-cell>
          <table:table-cell office:value-type="float" office:value="62458" calcext:value-type="float">
            <text:p>62458</text:p>
          </table:table-cell>
          <table:table-cell office:value-type="float" office:value="62464.23" calcext:value-type="float">
            <text:p>62464.23</text:p>
          </table:table-cell>
          <table:table-cell office:value-type="float" office:value="17.8481" calcext:value-type="float">
            <text:p>17.8481</text:p>
          </table:table-cell>
          <table:table-cell office:value-type="float" office:value="2563" calcext:value-type="float">
            <text:p>2563</text:p>
          </table:table-cell>
          <table:table-cell office:value-type="float" office:value="1759.8" calcext:value-type="float">
            <text:p>1759.8</text:p>
          </table:table-cell>
          <table:table-cell office:value-type="float" office:value="1759.84" calcext:value-type="float">
            <text:p>1759.84</text:p>
          </table:table-cell>
          <table:table-cell office:value-type="float" office:value="1757.78" calcext:value-type="float">
            <text:p>1757.78</text:p>
          </table:table-cell>
          <table:table-cell office:value-type="float" office:value="1757.91" calcext:value-type="float">
            <text:p>1757.91</text:p>
          </table:table-cell>
          <table:table-cell office:value-type="float" office:value="316.6676" calcext:value-type="float">
            <text:p>316.6676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string" calcext:value-type="string">
            <text:p>2026-07-04T09:37:09.351Z</text:p>
          </table:table-cell>
          <table:table-cell office:value-type="float" office:value="62464.22" calcext:value-type="float">
            <text:p>62464.22</text:p>
          </table:table-cell>
          <table:table-cell office:value-type="float" office:value="62476" calcext:value-type="float">
            <text:p>62476</text:p>
          </table:table-cell>
          <table:table-cell table:number-columns-repeated="2" office:value-type="float" office:value="62420" calcext:value-type="float">
            <text:p>62420</text:p>
          </table:table-cell>
          <table:table-cell office:value-type="float" office:value="69.65106" calcext:value-type="float">
            <text:p>69.65106</text:p>
          </table:table-cell>
          <table:table-cell office:value-type="float" office:value="6179" calcext:value-type="float">
            <text:p>6179</text:p>
          </table:table-cell>
          <table:table-cell office:value-type="float" office:value="1757.79" calcext:value-type="float">
            <text:p>1757.79</text:p>
          </table:table-cell>
          <table:table-cell office:value-type="float" office:value="1758.48" calcext:value-type="float">
            <text:p>1758.48</text:p>
          </table:table-cell>
          <table:table-cell office:value-type="float" office:value="1755.61" calcext:value-type="float">
            <text:p>1755.61</text:p>
          </table:table-cell>
          <table:table-cell office:value-type="float" office:value="1755.85" calcext:value-type="float">
            <text:p>1755.85</text:p>
          </table:table-cell>
          <table:table-cell office:value-type="float" office:value="431.1024" calcext:value-type="float">
            <text:p>431.1024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2026-07-04T09:42:09.356Z</text:p>
          </table:table-cell>
          <table:table-cell office:value-type="float" office:value="62448" calcext:value-type="float">
            <text:p>62448</text:p>
          </table:table-cell>
          <table:table-cell office:value-type="float" office:value="62448.01" calcext:value-type="float">
            <text:p>62448.01</text:p>
          </table:table-cell>
          <table:table-cell office:value-type="float" office:value="62415.87" calcext:value-type="float">
            <text:p>62415.87</text:p>
          </table:table-cell>
          <table:table-cell office:value-type="float" office:value="62437.81" calcext:value-type="float">
            <text:p>62437.81</text:p>
          </table:table-cell>
          <table:table-cell office:value-type="float" office:value="21.73274" calcext:value-type="float">
            <text:p>21.73274</text:p>
          </table:table-cell>
          <table:table-cell office:value-type="float" office:value="5044" calcext:value-type="float">
            <text:p>5044</text:p>
          </table:table-cell>
          <table:table-cell table:number-columns-repeated="2" office:value-type="float" office:value="1757.64" calcext:value-type="float">
            <text:p>1757.64</text:p>
          </table:table-cell>
          <table:table-cell office:value-type="float" office:value="1755" calcext:value-type="float">
            <text:p>1755</text:p>
          </table:table-cell>
          <table:table-cell office:value-type="float" office:value="1756.17" calcext:value-type="float">
            <text:p>1756.17</text:p>
          </table:table-cell>
          <table:table-cell office:value-type="float" office:value="370.3381" calcext:value-type="float">
            <text:p>370.3381</text:p>
          </table:table-cell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string" calcext:value-type="string">
            <text:p>2026-07-04T09:47:09.371Z</text:p>
          </table:table-cell>
          <table:table-cell office:value-type="float" office:value="62436.56" calcext:value-type="float">
            <text:p>62436.56</text:p>
          </table:table-cell>
          <table:table-cell office:value-type="float" office:value="62488" calcext:value-type="float">
            <text:p>62488</text:p>
          </table:table-cell>
          <table:table-cell office:value-type="float" office:value="62436.56" calcext:value-type="float">
            <text:p>62436.56</text:p>
          </table:table-cell>
          <table:table-cell office:value-type="float" office:value="62488" calcext:value-type="float">
            <text:p>62488</text:p>
          </table:table-cell>
          <table:table-cell office:value-type="float" office:value="18.86776" calcext:value-type="float">
            <text:p>18.86776</text:p>
          </table:table-cell>
          <table:table-cell office:value-type="float" office:value="5046" calcext:value-type="float">
            <text:p>5046</text:p>
          </table:table-cell>
          <table:table-cell office:value-type="float" office:value="1755.94" calcext:value-type="float">
            <text:p>1755.94</text:p>
          </table:table-cell>
          <table:table-cell office:value-type="float" office:value="1757.77" calcext:value-type="float">
            <text:p>1757.77</text:p>
          </table:table-cell>
          <table:table-cell office:value-type="float" office:value="1755.45" calcext:value-type="float">
            <text:p>1755.45</text:p>
          </table:table-cell>
          <table:table-cell office:value-type="float" office:value="1757.76" calcext:value-type="float">
            <text:p>1757.76</text:p>
          </table:table-cell>
          <table:table-cell office:value-type="float" office:value="372.8998" calcext:value-type="float">
            <text:p>372.8998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2026-07-04T09:52:09.386Z</text:p>
          </table:table-cell>
          <table:table-cell office:value-type="float" office:value="62478.2" calcext:value-type="float">
            <text:p>62478.2</text:p>
          </table:table-cell>
          <table:table-cell office:value-type="float" office:value="62497.49" calcext:value-type="float">
            <text:p>62497.49</text:p>
          </table:table-cell>
          <table:table-cell office:value-type="float" office:value="62478.19" calcext:value-type="float">
            <text:p>62478.19</text:p>
          </table:table-cell>
          <table:table-cell office:value-type="float" office:value="62497.49" calcext:value-type="float">
            <text:p>62497.49</text:p>
          </table:table-cell>
          <table:table-cell office:value-type="float" office:value="10.4121" calcext:value-type="float">
            <text:p>10.4121</text:p>
          </table:table-cell>
          <table:table-cell office:value-type="float" office:value="3788" calcext:value-type="float">
            <text:p>3788</text:p>
          </table:table-cell>
          <table:table-cell office:value-type="float" office:value="1757.39" calcext:value-type="float">
            <text:p>1757.39</text:p>
          </table:table-cell>
          <table:table-cell office:value-type="float" office:value="1757.79" calcext:value-type="float">
            <text:p>1757.79</text:p>
          </table:table-cell>
          <table:table-cell office:value-type="float" office:value="1756.27" calcext:value-type="float">
            <text:p>1756.27</text:p>
          </table:table-cell>
          <table:table-cell office:value-type="float" office:value="1757.79" calcext:value-type="float">
            <text:p>1757.79</text:p>
          </table:table-cell>
          <table:table-cell office:value-type="float" office:value="466.8553" calcext:value-type="float">
            <text:p>466.8553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string" calcext:value-type="string">
            <text:p>2026-07-04T09:57:09.392Z</text:p>
          </table:table-cell>
          <table:table-cell office:value-type="float" office:value="62486.18" calcext:value-type="float">
            <text:p>62486.18</text:p>
          </table:table-cell>
          <table:table-cell office:value-type="float" office:value="62508.25" calcext:value-type="float">
            <text:p>62508.25</text:p>
          </table:table-cell>
          <table:table-cell office:value-type="float" office:value="62482.01" calcext:value-type="float">
            <text:p>62482.01</text:p>
          </table:table-cell>
          <table:table-cell office:value-type="float" office:value="62502.07" calcext:value-type="float">
            <text:p>62502.07</text:p>
          </table:table-cell>
          <table:table-cell office:value-type="float" office:value="29.56049" calcext:value-type="float">
            <text:p>29.56049</text:p>
          </table:table-cell>
          <table:table-cell office:value-type="float" office:value="3577" calcext:value-type="float">
            <text:p>3577</text:p>
          </table:table-cell>
          <table:table-cell office:value-type="float" office:value="1757.32" calcext:value-type="float">
            <text:p>1757.32</text:p>
          </table:table-cell>
          <table:table-cell office:value-type="float" office:value="1758.29" calcext:value-type="float">
            <text:p>1758.29</text:p>
          </table:table-cell>
          <table:table-cell office:value-type="float" office:value="1757.24" calcext:value-type="float">
            <text:p>1757.24</text:p>
          </table:table-cell>
          <table:table-cell office:value-type="float" office:value="1757.89" calcext:value-type="float">
            <text:p>1757.89</text:p>
          </table:table-cell>
          <table:table-cell office:value-type="float" office:value="393.7868" calcext:value-type="float">
            <text:p>393.7868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2026-07-04T10:02:09.400Z</text:p>
          </table:table-cell>
          <table:table-cell table:number-columns-repeated="2" office:value-type="float" office:value="62508.24" calcext:value-type="float">
            <text:p>62508.24</text:p>
          </table:table-cell>
          <table:table-cell office:value-type="float" office:value="62486.98" calcext:value-type="float">
            <text:p>62486.98</text:p>
          </table:table-cell>
          <table:table-cell office:value-type="float" office:value="62490" calcext:value-type="float">
            <text:p>62490</text:p>
          </table:table-cell>
          <table:table-cell office:value-type="float" office:value="9.00572" calcext:value-type="float">
            <text:p>9.00572</text:p>
          </table:table-cell>
          <table:table-cell office:value-type="float" office:value="2151" calcext:value-type="float">
            <text:p>2151</text:p>
          </table:table-cell>
          <table:table-cell office:value-type="float" office:value="1758.29" calcext:value-type="float">
            <text:p>1758.29</text:p>
          </table:table-cell>
          <table:table-cell office:value-type="float" office:value="1758.44" calcext:value-type="float">
            <text:p>1758.44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399.4542" calcext:value-type="float">
            <text:p>399.4542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string" calcext:value-type="string">
            <text:p>2026-07-04T10:07:09.414Z</text:p>
          </table:table-cell>
          <table:table-cell office:value-type="float" office:value="62489.99" calcext:value-type="float">
            <text:p>62489.99</text:p>
          </table:table-cell>
          <table:table-cell office:value-type="float" office:value="62490" calcext:value-type="float">
            <text:p>62490</text:p>
          </table:table-cell>
          <table:table-cell office:value-type="float" office:value="62445.38" calcext:value-type="float">
            <text:p>62445.38</text:p>
          </table:table-cell>
          <table:table-cell office:value-type="float" office:value="62465.75" calcext:value-type="float">
            <text:p>62465.75</text:p>
          </table:table-cell>
          <table:table-cell office:value-type="float" office:value="33.14258" calcext:value-type="float">
            <text:p>33.14258</text:p>
          </table:table-cell>
          <table:table-cell office:value-type="float" office:value="6753" calcext:value-type="float">
            <text:p>6753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1760" calcext:value-type="float">
            <text:p>1760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1759.32" calcext:value-type="float">
            <text:p>1759.32</text:p>
          </table:table-cell>
          <table:table-cell office:value-type="float" office:value="300.8773" calcext:value-type="float">
            <text:p>300.8773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2026-07-04T10:12:09.426Z</text:p>
          </table:table-cell>
          <table:table-cell office:value-type="float" office:value="62465.75" calcext:value-type="float">
            <text:p>62465.75</text:p>
          </table:table-cell>
          <table:table-cell office:value-type="float" office:value="62470" calcext:value-type="float">
            <text:p>62470</text:p>
          </table:table-cell>
          <table:table-cell office:value-type="float" office:value="62460.79" calcext:value-type="float">
            <text:p>62460.79</text:p>
          </table:table-cell>
          <table:table-cell office:value-type="float" office:value="62460.8" calcext:value-type="float">
            <text:p>62460.8</text:p>
          </table:table-cell>
          <table:table-cell office:value-type="float" office:value="3.70152" calcext:value-type="float">
            <text:p>3.70152</text:p>
          </table:table-cell>
          <table:table-cell office:value-type="float" office:value="1023" calcext:value-type="float">
            <text:p>1023</text:p>
          </table:table-cell>
          <table:table-cell office:value-type="float" office:value="1759.22" calcext:value-type="float">
            <text:p>1759.22</text:p>
          </table:table-cell>
          <table:table-cell office:value-type="float" office:value="1759.99" calcext:value-type="float">
            <text:p>1759.99</text:p>
          </table:table-cell>
          <table:table-cell office:value-type="float" office:value="1758.48" calcext:value-type="float">
            <text:p>1758.48</text:p>
          </table:table-cell>
          <table:table-cell office:value-type="float" office:value="1759" calcext:value-type="float">
            <text:p>1759</text:p>
          </table:table-cell>
          <table:table-cell office:value-type="float" office:value="211.4845" calcext:value-type="float">
            <text:p>211.4845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string" calcext:value-type="string">
            <text:p>2026-07-04T10:17:09.440Z</text:p>
          </table:table-cell>
          <table:table-cell office:value-type="float" office:value="62460.8" calcext:value-type="float">
            <text:p>62460.8</text:p>
          </table:table-cell>
          <table:table-cell office:value-type="float" office:value="62489.39" calcext:value-type="float">
            <text:p>62489.39</text:p>
          </table:table-cell>
          <table:table-cell office:value-type="float" office:value="62454.21" calcext:value-type="float">
            <text:p>62454.21</text:p>
          </table:table-cell>
          <table:table-cell office:value-type="float" office:value="62457.39" calcext:value-type="float">
            <text:p>62457.39</text:p>
          </table:table-cell>
          <table:table-cell office:value-type="float" office:value="21.70574" calcext:value-type="float">
            <text:p>21.70574</text:p>
          </table:table-cell>
          <table:table-cell office:value-type="float" office:value="3217" calcext:value-type="float">
            <text:p>3217</text:p>
          </table:table-cell>
          <table:table-cell office:value-type="float" office:value="1758.88" calcext:value-type="float">
            <text:p>1758.88</text:p>
          </table:table-cell>
          <table:table-cell office:value-type="float" office:value="1760.32" calcext:value-type="float">
            <text:p>1760.32</text:p>
          </table:table-cell>
          <table:table-cell office:value-type="float" office:value="1758.88" calcext:value-type="float">
            <text:p>1758.88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271.6957" calcext:value-type="float">
            <text:p>271.6957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string" calcext:value-type="string">
            <text:p>2026-07-04T10:22:09.454Z</text:p>
          </table:table-cell>
          <table:table-cell office:value-type="float" office:value="62457.39" calcext:value-type="float">
            <text:p>62457.39</text:p>
          </table:table-cell>
          <table:table-cell office:value-type="float" office:value="62502.36" calcext:value-type="float">
            <text:p>62502.36</text:p>
          </table:table-cell>
          <table:table-cell office:value-type="float" office:value="62457.38" calcext:value-type="float">
            <text:p>62457.38</text:p>
          </table:table-cell>
          <table:table-cell office:value-type="float" office:value="62502.36" calcext:value-type="float">
            <text:p>62502.36</text:p>
          </table:table-cell>
          <table:table-cell office:value-type="float" office:value="31.06081" calcext:value-type="float">
            <text:p>31.06081</text:p>
          </table:table-cell>
          <table:table-cell office:value-type="float" office:value="4631" calcext:value-type="float">
            <text:p>463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760.86" calcext:value-type="float">
            <text:p>1760.86</text:p>
          </table:table-cell>
          <table:table-cell office:value-type="float" office:value="1758.99" calcext:value-type="float">
            <text:p>1758.99</text:p>
          </table:table-cell>
          <table:table-cell office:value-type="float" office:value="1759.76" calcext:value-type="float">
            <text:p>1759.76</text:p>
          </table:table-cell>
          <table:table-cell office:value-type="float" office:value="318.0075" calcext:value-type="float">
            <text:p>318.007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string" calcext:value-type="string">
            <text:p>2026-07-04T10:27:09.455Z</text:p>
          </table:table-cell>
          <table:table-cell office:value-type="float" office:value="62502.35" calcext:value-type="float">
            <text:p>62502.35</text:p>
          </table:table-cell>
          <table:table-cell office:value-type="float" office:value="62514.52" calcext:value-type="float">
            <text:p>62514.52</text:p>
          </table:table-cell>
          <table:table-cell office:value-type="float" office:value="62485.05" calcext:value-type="float">
            <text:p>62485.05</text:p>
          </table:table-cell>
          <table:table-cell office:value-type="float" office:value="62513.35" calcext:value-type="float">
            <text:p>62513.35</text:p>
          </table:table-cell>
          <table:table-cell office:value-type="float" office:value="32.22589" calcext:value-type="float">
            <text:p>32.22589</text:p>
          </table:table-cell>
          <table:table-cell office:value-type="float" office:value="3518" calcext:value-type="float">
            <text:p>3518</text:p>
          </table:table-cell>
          <table:table-cell office:value-type="float" office:value="1759.76" calcext:value-type="float">
            <text:p>1759.76</text:p>
          </table:table-cell>
          <table:table-cell office:value-type="float" office:value="1760.76" calcext:value-type="float">
            <text:p>1760.76</text:p>
          </table:table-cell>
          <table:table-cell office:value-type="float" office:value="1759" calcext:value-type="float">
            <text:p>1759</text:p>
          </table:table-cell>
          <table:table-cell office:value-type="float" office:value="1760.61" calcext:value-type="float">
            <text:p>1760.61</text:p>
          </table:table-cell>
          <table:table-cell office:value-type="float" office:value="436.5889" calcext:value-type="float">
            <text:p>436.5889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2026-07-04T10:32:09.457Z</text:p>
          </table:table-cell>
          <table:table-cell office:value-type="float" office:value="62513.36" calcext:value-type="float">
            <text:p>62513.36</text:p>
          </table:table-cell>
          <table:table-cell office:value-type="float" office:value="62531.19" calcext:value-type="float">
            <text:p>62531.19</text:p>
          </table:table-cell>
          <table:table-cell office:value-type="float" office:value="62486.01" calcext:value-type="float">
            <text:p>62486.01</text:p>
          </table:table-cell>
          <table:table-cell office:value-type="float" office:value="62490.34" calcext:value-type="float">
            <text:p>62490.34</text:p>
          </table:table-cell>
          <table:table-cell office:value-type="float" office:value="27.84281" calcext:value-type="float">
            <text:p>27.84281</text:p>
          </table:table-cell>
          <table:table-cell office:value-type="float" office:value="3830" calcext:value-type="float">
            <text:p>3830</text:p>
          </table:table-cell>
          <table:table-cell office:value-type="float" office:value="1760.62" calcext:value-type="float">
            <text:p>1760.62</text:p>
          </table:table-cell>
          <table:table-cell office:value-type="float" office:value="1760.88" calcext:value-type="float">
            <text:p>1760.88</text:p>
          </table:table-cell>
          <table:table-cell office:value-type="float" office:value="1758.46" calcext:value-type="float">
            <text:p>1758.46</text:p>
          </table:table-cell>
          <table:table-cell office:value-type="float" office:value="1759.13" calcext:value-type="float">
            <text:p>1759.13</text:p>
          </table:table-cell>
          <table:table-cell office:value-type="float" office:value="965.2943" calcext:value-type="float">
            <text:p>965.2943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string" calcext:value-type="string">
            <text:p>2026-07-04T10:37:09.471Z</text:p>
          </table:table-cell>
          <table:table-cell office:value-type="float" office:value="62488.01" calcext:value-type="float">
            <text:p>62488.01</text:p>
          </table:table-cell>
          <table:table-cell office:value-type="float" office:value="62492.08" calcext:value-type="float">
            <text:p>62492.08</text:p>
          </table:table-cell>
          <table:table-cell office:value-type="float" office:value="62486" calcext:value-type="float">
            <text:p>62486</text:p>
          </table:table-cell>
          <table:table-cell office:value-type="float" office:value="62486.03" calcext:value-type="float">
            <text:p>62486.03</text:p>
          </table:table-cell>
          <table:table-cell office:value-type="float" office:value="11.13896" calcext:value-type="float">
            <text:p>11.13896</text:p>
          </table:table-cell>
          <table:table-cell office:value-type="float" office:value="1414" calcext:value-type="float">
            <text:p>1414</text:p>
          </table:table-cell>
          <table:table-cell office:value-type="float" office:value="1758.87" calcext:value-type="float">
            <text:p>1758.87</text:p>
          </table:table-cell>
          <table:table-cell office:value-type="float" office:value="1759.3" calcext:value-type="float">
            <text:p>1759.3</text:p>
          </table:table-cell>
          <table:table-cell office:value-type="float" office:value="1758.75" calcext:value-type="float">
            <text:p>1758.75</text:p>
          </table:table-cell>
          <table:table-cell office:value-type="float" office:value="1758.82" calcext:value-type="float">
            <text:p>1758.82</text:p>
          </table:table-cell>
          <table:table-cell office:value-type="float" office:value="266.2369" calcext:value-type="float">
            <text:p>266.2369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2026-07-04T10:42:09.484Z</text:p>
          </table:table-cell>
          <table:table-cell office:value-type="float" office:value="62492.07" calcext:value-type="float">
            <text:p>62492.07</text:p>
          </table:table-cell>
          <table:table-cell office:value-type="float" office:value="62492.08" calcext:value-type="float">
            <text:p>62492.08</text:p>
          </table:table-cell>
          <table:table-cell office:value-type="float" office:value="62468.21" calcext:value-type="float">
            <text:p>62468.21</text:p>
          </table:table-cell>
          <table:table-cell office:value-type="float" office:value="62486.43" calcext:value-type="float">
            <text:p>62486.43</text:p>
          </table:table-cell>
          <table:table-cell office:value-type="float" office:value="8.42075" calcext:value-type="float">
            <text:p>8.42075</text:p>
          </table:table-cell>
          <table:table-cell office:value-type="float" office:value="2515" calcext:value-type="float">
            <text:p>2515</text:p>
          </table:table-cell>
          <table:table-cell table:number-columns-repeated="2" office:value-type="float" office:value="1759.14" calcext:value-type="float">
            <text:p>1759.14</text:p>
          </table:table-cell>
          <table:table-cell office:value-type="float" office:value="1757.51" calcext:value-type="float">
            <text:p>1757.51</text:p>
          </table:table-cell>
          <table:table-cell office:value-type="float" office:value="1758.1" calcext:value-type="float">
            <text:p>1758.1</text:p>
          </table:table-cell>
          <table:table-cell office:value-type="float" office:value="294.2405" calcext:value-type="float">
            <text:p>294.2405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string" calcext:value-type="string">
            <text:p>2026-07-04T10:47:09.497Z</text:p>
          </table:table-cell>
          <table:table-cell office:value-type="float" office:value="62486.43" calcext:value-type="float">
            <text:p>62486.43</text:p>
          </table:table-cell>
          <table:table-cell office:value-type="float" office:value="62487.15" calcext:value-type="float">
            <text:p>62487.15</text:p>
          </table:table-cell>
          <table:table-cell office:value-type="float" office:value="62474" calcext:value-type="float">
            <text:p>62474</text:p>
          </table:table-cell>
          <table:table-cell office:value-type="float" office:value="62482.46" calcext:value-type="float">
            <text:p>62482.46</text:p>
          </table:table-cell>
          <table:table-cell office:value-type="float" office:value="10.52792" calcext:value-type="float">
            <text:p>10.52792</text:p>
          </table:table-cell>
          <table:table-cell office:value-type="float" office:value="1878" calcext:value-type="float">
            <text:p>1878</text:p>
          </table:table-cell>
          <table:table-cell office:value-type="float" office:value="1758.1" calcext:value-type="float">
            <text:p>1758.1</text:p>
          </table:table-cell>
          <table:table-cell office:value-type="float" office:value="1758.93" calcext:value-type="float">
            <text:p>1758.93</text:p>
          </table:table-cell>
          <table:table-cell office:value-type="float" office:value="1757.78" calcext:value-type="float">
            <text:p>1757.78</text:p>
          </table:table-cell>
          <table:table-cell office:value-type="float" office:value="1758.68" calcext:value-type="float">
            <text:p>1758.68</text:p>
          </table:table-cell>
          <table:table-cell office:value-type="float" office:value="203.131" calcext:value-type="float">
            <text:p>203.131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string" calcext:value-type="string">
            <text:p>2026-07-04T10:52:09.508Z</text:p>
          </table:table-cell>
          <table:table-cell office:value-type="float" office:value="62482.47" calcext:value-type="float">
            <text:p>62482.47</text:p>
          </table:table-cell>
          <table:table-cell office:value-type="float" office:value="62502.39" calcext:value-type="float">
            <text:p>62502.39</text:p>
          </table:table-cell>
          <table:table-cell office:value-type="float" office:value="62471.88" calcext:value-type="float">
            <text:p>62471.88</text:p>
          </table:table-cell>
          <table:table-cell office:value-type="float" office:value="62502.38" calcext:value-type="float">
            <text:p>62502.38</text:p>
          </table:table-cell>
          <table:table-cell office:value-type="float" office:value="41.21199" calcext:value-type="float">
            <text:p>41.21199</text:p>
          </table:table-cell>
          <table:table-cell office:value-type="float" office:value="3411" calcext:value-type="float">
            <text:p>3411</text:p>
          </table:table-cell>
          <table:table-cell office:value-type="float" office:value="1758.35" calcext:value-type="float">
            <text:p>1758.35</text:p>
          </table:table-cell>
          <table:table-cell office:value-type="float" office:value="1759.52" calcext:value-type="float">
            <text:p>1759.52</text:p>
          </table:table-cell>
          <table:table-cell office:value-type="float" office:value="1758.34" calcext:value-type="float">
            <text:p>1758.34</text:p>
          </table:table-cell>
          <table:table-cell office:value-type="float" office:value="1759.48" calcext:value-type="float">
            <text:p>1759.48</text:p>
          </table:table-cell>
          <table:table-cell office:value-type="float" office:value="795.158" calcext:value-type="float">
            <text:p>795.158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string" calcext:value-type="string">
            <text:p>2026-07-04T10:57:09.521Z</text:p>
          </table:table-cell>
          <table:table-cell office:value-type="float" office:value="62492.85" calcext:value-type="float">
            <text:p>62492.85</text:p>
          </table:table-cell>
          <table:table-cell office:value-type="float" office:value="62545.02" calcext:value-type="float">
            <text:p>62545.02</text:p>
          </table:table-cell>
          <table:table-cell office:value-type="float" office:value="62492.85" calcext:value-type="float">
            <text:p>62492.85</text:p>
          </table:table-cell>
          <table:table-cell office:value-type="float" office:value="62545.01" calcext:value-type="float">
            <text:p>62545.01</text:p>
          </table:table-cell>
          <table:table-cell office:value-type="float" office:value="27.23671" calcext:value-type="float">
            <text:p>27.23671</text:p>
          </table:table-cell>
          <table:table-cell office:value-type="float" office:value="2948" calcext:value-type="float">
            <text:p>2948</text:p>
          </table:table-cell>
          <table:table-cell office:value-type="float" office:value="1759.52" calcext:value-type="float">
            <text:p>1759.52</text:p>
          </table:table-cell>
          <table:table-cell office:value-type="float" office:value="1760.42" calcext:value-type="float">
            <text:p>1760.42</text:p>
          </table:table-cell>
          <table:table-cell office:value-type="float" office:value="1759.47" calcext:value-type="float">
            <text:p>1759.47</text:p>
          </table:table-cell>
          <table:table-cell office:value-type="float" office:value="1759.95" calcext:value-type="float">
            <text:p>1759.95</text:p>
          </table:table-cell>
          <table:table-cell office:value-type="float" office:value="681.6473" calcext:value-type="float">
            <text:p>681.6473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string" calcext:value-type="string">
            <text:p>2026-07-04T11:02:09.524Z</text:p>
          </table:table-cell>
          <table:table-cell office:value-type="float" office:value="62545" calcext:value-type="float">
            <text:p>62545</text:p>
          </table:table-cell>
          <table:table-cell office:value-type="float" office:value="62545.01" calcext:value-type="float">
            <text:p>62545.01</text:p>
          </table:table-cell>
          <table:table-cell office:value-type="float" office:value="62472.02" calcext:value-type="float">
            <text:p>62472.02</text:p>
          </table:table-cell>
          <table:table-cell office:value-type="float" office:value="62477.99" calcext:value-type="float">
            <text:p>62477.99</text:p>
          </table:table-cell>
          <table:table-cell office:value-type="float" office:value="21.23667" calcext:value-type="float">
            <text:p>21.23667</text:p>
          </table:table-cell>
          <table:table-cell office:value-type="float" office:value="3656" calcext:value-type="float">
            <text:p>3656</text:p>
          </table:table-cell>
          <table:table-cell office:value-type="float" office:value="1759.95" calcext:value-type="float">
            <text:p>1759.95</text:p>
          </table:table-cell>
          <table:table-cell office:value-type="float" office:value="1760.56" calcext:value-type="float">
            <text:p>1760.56</text:p>
          </table:table-cell>
          <table:table-cell office:value-type="float" office:value="1756.56" calcext:value-type="float">
            <text:p>1756.56</text:p>
          </table:table-cell>
          <table:table-cell office:value-type="float" office:value="1757.18" calcext:value-type="float">
            <text:p>1757.18</text:p>
          </table:table-cell>
          <table:table-cell office:value-type="float" office:value="632.6774" calcext:value-type="float">
            <text:p>632.6774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string" calcext:value-type="string">
            <text:p>2026-07-04T11:07:09.529Z</text:p>
          </table:table-cell>
          <table:table-cell office:value-type="float" office:value="62476.01" calcext:value-type="float">
            <text:p>62476.01</text:p>
          </table:table-cell>
          <table:table-cell office:value-type="float" office:value="62484" calcext:value-type="float">
            <text:p>62484</text:p>
          </table:table-cell>
          <table:table-cell office:value-type="float" office:value="62472.02" calcext:value-type="float">
            <text:p>62472.02</text:p>
          </table:table-cell>
          <table:table-cell office:value-type="float" office:value="62480.2" calcext:value-type="float">
            <text:p>62480.2</text:p>
          </table:table-cell>
          <table:table-cell office:value-type="float" office:value="9.70193" calcext:value-type="float">
            <text:p>9.70193</text:p>
          </table:table-cell>
          <table:table-cell office:value-type="float" office:value="2746" calcext:value-type="float">
            <text:p>2746</text:p>
          </table:table-cell>
          <table:table-cell office:value-type="float" office:value="1756.77" calcext:value-type="float">
            <text:p>1756.77</text:p>
          </table:table-cell>
          <table:table-cell office:value-type="float" office:value="1758.06" calcext:value-type="float">
            <text:p>1758.06</text:p>
          </table:table-cell>
          <table:table-cell office:value-type="float" office:value="1756.19" calcext:value-type="float">
            <text:p>1756.19</text:p>
          </table:table-cell>
          <table:table-cell office:value-type="float" office:value="1756.86" calcext:value-type="float">
            <text:p>1756.86</text:p>
          </table:table-cell>
          <table:table-cell office:value-type="float" office:value="1157.9993" calcext:value-type="float">
            <text:p>1157.9993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string" calcext:value-type="string">
            <text:p>2026-07-04T11:12:09.541Z</text:p>
          </table:table-cell>
          <table:table-cell office:value-type="float" office:value="62480.21" calcext:value-type="float">
            <text:p>62480.21</text:p>
          </table:table-cell>
          <table:table-cell office:value-type="float" office:value="62522" calcext:value-type="float">
            <text:p>62522</text:p>
          </table:table-cell>
          <table:table-cell office:value-type="float" office:value="62480.2" calcext:value-type="float">
            <text:p>62480.2</text:p>
          </table:table-cell>
          <table:table-cell office:value-type="float" office:value="62507.13" calcext:value-type="float">
            <text:p>62507.13</text:p>
          </table:table-cell>
          <table:table-cell office:value-type="float" office:value="15.20631" calcext:value-type="float">
            <text:p>15.20631</text:p>
          </table:table-cell>
          <table:table-cell office:value-type="float" office:value="2824" calcext:value-type="float">
            <text:p>2824</text:p>
          </table:table-cell>
          <table:table-cell office:value-type="float" office:value="1757.62" calcext:value-type="float">
            <text:p>1757.62</text:p>
          </table:table-cell>
          <table:table-cell office:value-type="float" office:value="1758.88" calcext:value-type="float">
            <text:p>1758.88</text:p>
          </table:table-cell>
          <table:table-cell office:value-type="float" office:value="1756.56" calcext:value-type="float">
            <text:p>1756.56</text:p>
          </table:table-cell>
          <table:table-cell office:value-type="float" office:value="1758.23" calcext:value-type="float">
            <text:p>1758.23</text:p>
          </table:table-cell>
          <table:table-cell office:value-type="float" office:value="676.1029" calcext:value-type="float">
            <text:p>676.1029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string" calcext:value-type="string">
            <text:p>2026-07-04T11:17:09.550Z</text:p>
          </table:table-cell>
          <table:table-cell office:value-type="float" office:value="62507.13" calcext:value-type="float">
            <text:p>62507.13</text:p>
          </table:table-cell>
          <table:table-cell office:value-type="float" office:value="62549.25" calcext:value-type="float">
            <text:p>62549.25</text:p>
          </table:table-cell>
          <table:table-cell office:value-type="float" office:value="62499.99" calcext:value-type="float">
            <text:p>62499.99</text:p>
          </table:table-cell>
          <table:table-cell office:value-type="float" office:value="62544.55" calcext:value-type="float">
            <text:p>62544.55</text:p>
          </table:table-cell>
          <table:table-cell office:value-type="float" office:value="40.41225" calcext:value-type="float">
            <text:p>40.41225</text:p>
          </table:table-cell>
          <table:table-cell office:value-type="float" office:value="2610" calcext:value-type="float">
            <text:p>2610</text:p>
          </table:table-cell>
          <table:table-cell office:value-type="float" office:value="1758.23" calcext:value-type="float">
            <text:p>1758.23</text:p>
          </table:table-cell>
          <table:table-cell office:value-type="float" office:value="1758.8" calcext:value-type="float">
            <text:p>1758.8</text:p>
          </table:table-cell>
          <table:table-cell office:value-type="float" office:value="1757.55" calcext:value-type="float">
            <text:p>1757.55</text:p>
          </table:table-cell>
          <table:table-cell office:value-type="float" office:value="1758.79" calcext:value-type="float">
            <text:p>1758.79</text:p>
          </table:table-cell>
          <table:table-cell office:value-type="float" office:value="207.5957" calcext:value-type="float">
            <text:p>207.5957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string" calcext:value-type="string">
            <text:p>2026-07-04T11:22:09.552Z</text:p>
          </table:table-cell>
          <table:table-cell table:number-columns-repeated="2" office:value-type="float" office:value="62544.55" calcext:value-type="float">
            <text:p>62544.55</text:p>
          </table:table-cell>
          <table:table-cell office:value-type="float" office:value="62501.54" calcext:value-type="float">
            <text:p>62501.54</text:p>
          </table:table-cell>
          <table:table-cell office:value-type="float" office:value="62515.74" calcext:value-type="float">
            <text:p>62515.74</text:p>
          </table:table-cell>
          <table:table-cell office:value-type="float" office:value="18.00188" calcext:value-type="float">
            <text:p>18.00188</text:p>
          </table:table-cell>
          <table:table-cell office:value-type="float" office:value="2613" calcext:value-type="float">
            <text:p>2613</text:p>
          </table:table-cell>
          <table:table-cell office:value-type="float" office:value="1758.8" calcext:value-type="float">
            <text:p>1758.8</text:p>
          </table:table-cell>
          <table:table-cell office:value-type="float" office:value="1758.83" calcext:value-type="float">
            <text:p>1758.83</text:p>
          </table:table-cell>
          <table:table-cell office:value-type="float" office:value="1756.97" calcext:value-type="float">
            <text:p>1756.97</text:p>
          </table:table-cell>
          <table:table-cell office:value-type="float" office:value="1758.08" calcext:value-type="float">
            <text:p>1758.08</text:p>
          </table:table-cell>
          <table:table-cell office:value-type="float" office:value="385.2507" calcext:value-type="float">
            <text:p>385.2507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string" calcext:value-type="string">
            <text:p>2026-07-04T11:27:09.563Z</text:p>
          </table:table-cell>
          <table:table-cell table:number-columns-repeated="2" office:value-type="float" office:value="62521.99" calcext:value-type="float">
            <text:p>62521.99</text:p>
          </table:table-cell>
          <table:table-cell table:number-columns-repeated="2" office:value-type="float" office:value="62490.43" calcext:value-type="float">
            <text:p>62490.43</text:p>
          </table:table-cell>
          <table:table-cell office:value-type="float" office:value="23.81744" calcext:value-type="float">
            <text:p>23.81744</text:p>
          </table:table-cell>
          <table:table-cell office:value-type="float" office:value="1688" calcext:value-type="float">
            <text:p>1688</text:p>
          </table:table-cell>
          <table:table-cell office:value-type="float" office:value="1758.82" calcext:value-type="float">
            <text:p>1758.82</text:p>
          </table:table-cell>
          <table:table-cell office:value-type="float" office:value="1758.83" calcext:value-type="float">
            <text:p>1758.83</text:p>
          </table:table-cell>
          <table:table-cell office:value-type="float" office:value="1757.19" calcext:value-type="float">
            <text:p>1757.19</text:p>
          </table:table-cell>
          <table:table-cell office:value-type="float" office:value="1757.69" calcext:value-type="float">
            <text:p>1757.69</text:p>
          </table:table-cell>
          <table:table-cell office:value-type="float" office:value="153.0883" calcext:value-type="float">
            <text:p>153.088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string" calcext:value-type="string">
            <text:p>2026-07-04T11:32:09.574Z</text:p>
          </table:table-cell>
          <table:table-cell office:value-type="float" office:value="62490.43" calcext:value-type="float">
            <text:p>62490.43</text:p>
          </table:table-cell>
          <table:table-cell office:value-type="float" office:value="62496" calcext:value-type="float">
            <text:p>62496</text:p>
          </table:table-cell>
          <table:table-cell office:value-type="float" office:value="62456.24" calcext:value-type="float">
            <text:p>62456.24</text:p>
          </table:table-cell>
          <table:table-cell office:value-type="float" office:value="62495.99" calcext:value-type="float">
            <text:p>62495.99</text:p>
          </table:table-cell>
          <table:table-cell office:value-type="float" office:value="29.71989" calcext:value-type="float">
            <text:p>29.71989</text:p>
          </table:table-cell>
          <table:table-cell office:value-type="float" office:value="3006" calcext:value-type="float">
            <text:p>3006</text:p>
          </table:table-cell>
          <table:table-cell office:value-type="float" office:value="1757.69" calcext:value-type="float">
            <text:p>1757.69</text:p>
          </table:table-cell>
          <table:table-cell office:value-type="float" office:value="1758.68" calcext:value-type="float">
            <text:p>1758.68</text:p>
          </table:table-cell>
          <table:table-cell office:value-type="float" office:value="1757.42" calcext:value-type="float">
            <text:p>1757.42</text:p>
          </table:table-cell>
          <table:table-cell office:value-type="float" office:value="1758.68" calcext:value-type="float">
            <text:p>1758.68</text:p>
          </table:table-cell>
          <table:table-cell office:value-type="float" office:value="195.4956" calcext:value-type="float">
            <text:p>195.495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2026-07-04T11:37:09.585Z</text:p>
          </table:table-cell>
          <table:table-cell office:value-type="float" office:value="62486.88" calcext:value-type="float">
            <text:p>62486.88</text:p>
          </table:table-cell>
          <table:table-cell office:value-type="float" office:value="62563.84" calcext:value-type="float">
            <text:p>62563.84</text:p>
          </table:table-cell>
          <table:table-cell office:value-type="float" office:value="62486.87" calcext:value-type="float">
            <text:p>62486.87</text:p>
          </table:table-cell>
          <table:table-cell office:value-type="float" office:value="62536.33" calcext:value-type="float">
            <text:p>62536.33</text:p>
          </table:table-cell>
          <table:table-cell office:value-type="float" office:value="24.68978" calcext:value-type="float">
            <text:p>24.68978</text:p>
          </table:table-cell>
          <table:table-cell office:value-type="float" office:value="3394" calcext:value-type="float">
            <text:p>3394</text:p>
          </table:table-cell>
          <table:table-cell office:value-type="float" office:value="1758.43" calcext:value-type="float">
            <text:p>1758.43</text:p>
          </table:table-cell>
          <table:table-cell office:value-type="float" office:value="1760.15" calcext:value-type="float">
            <text:p>1760.15</text:p>
          </table:table-cell>
          <table:table-cell office:value-type="float" office:value="1758.43" calcext:value-type="float">
            <text:p>1758.43</text:p>
          </table:table-cell>
          <table:table-cell office:value-type="float" office:value="1759.74" calcext:value-type="float">
            <text:p>1759.74</text:p>
          </table:table-cell>
          <table:table-cell office:value-type="float" office:value="255.1876" calcext:value-type="float">
            <text:p>255.187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2026-07-04T11:42:09.596Z</text:p>
          </table:table-cell>
          <table:table-cell table:number-columns-repeated="2" office:value-type="float" office:value="62536.34" calcext:value-type="float">
            <text:p>62536.34</text:p>
          </table:table-cell>
          <table:table-cell table:number-columns-repeated="2" office:value-type="float" office:value="62489.4" calcext:value-type="float">
            <text:p>62489.4</text:p>
          </table:table-cell>
          <table:table-cell office:value-type="float" office:value="13.88493" calcext:value-type="float">
            <text:p>13.88493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float" office:value="1759.74" calcext:value-type="float">
            <text:p>1759.74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757.68" calcext:value-type="float">
            <text:p>1757.68</text:p>
          </table:table-cell>
          <table:table-cell office:value-type="float" office:value="219.6427" calcext:value-type="float">
            <text:p>219.6427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2026-07-04T11:47:09.606Z</text:p>
          </table:table-cell>
          <table:table-cell office:value-type="float" office:value="62489.4" calcext:value-type="float">
            <text:p>62489.4</text:p>
          </table:table-cell>
          <table:table-cell office:value-type="float" office:value="62506" calcext:value-type="float">
            <text:p>62506</text:p>
          </table:table-cell>
          <table:table-cell office:value-type="float" office:value="62466.41" calcext:value-type="float">
            <text:p>62466.41</text:p>
          </table:table-cell>
          <table:table-cell office:value-type="float" office:value="62494.01" calcext:value-type="float">
            <text:p>62494.01</text:p>
          </table:table-cell>
          <table:table-cell office:value-type="float" office:value="20.94614" calcext:value-type="float">
            <text:p>20.94614</text:p>
          </table:table-cell>
          <table:table-cell office:value-type="float" office:value="3514" calcext:value-type="float">
            <text:p>3514</text:p>
          </table:table-cell>
          <table:table-cell office:value-type="float" office:value="1757.78" calcext:value-type="float">
            <text:p>1757.78</text:p>
          </table:table-cell>
          <table:table-cell office:value-type="float" office:value="1758.3" calcext:value-type="float">
            <text:p>1758.3</text:p>
          </table:table-cell>
          <table:table-cell office:value-type="float" office:value="1757.35" calcext:value-type="float">
            <text:p>1757.35</text:p>
          </table:table-cell>
          <table:table-cell office:value-type="float" office:value="1757.94" calcext:value-type="float">
            <text:p>1757.94</text:p>
          </table:table-cell>
          <table:table-cell office:value-type="float" office:value="334.3006" calcext:value-type="float">
            <text:p>334.3006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2026-07-04T11:52:09.610Z</text:p>
          </table:table-cell>
          <table:table-cell office:value-type="float" office:value="62504.95" calcext:value-type="float">
            <text:p>62504.95</text:p>
          </table:table-cell>
          <table:table-cell office:value-type="float" office:value="62508.34" calcext:value-type="float">
            <text:p>62508.34</text:p>
          </table:table-cell>
          <table:table-cell office:value-type="float" office:value="62484.01" calcext:value-type="float">
            <text:p>62484.01</text:p>
          </table:table-cell>
          <table:table-cell office:value-type="float" office:value="62505.09" calcext:value-type="float">
            <text:p>62505.09</text:p>
          </table:table-cell>
          <table:table-cell office:value-type="float" office:value="10.74767" calcext:value-type="float">
            <text:p>10.74767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758.18" calcext:value-type="float">
            <text:p>1758.18</text:p>
          </table:table-cell>
          <table:table-cell office:value-type="float" office:value="1757.53" calcext:value-type="float">
            <text:p>1757.53</text:p>
          </table:table-cell>
          <table:table-cell office:value-type="float" office:value="1757.61" calcext:value-type="float">
            <text:p>1757.61</text:p>
          </table:table-cell>
          <table:table-cell office:value-type="float" office:value="111.6517" calcext:value-type="float">
            <text:p>111.6517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2026-07-04T11:57:09.621Z</text:p>
          </table:table-cell>
          <table:table-cell office:value-type="float" office:value="62499.99" calcext:value-type="float">
            <text:p>62499.99</text:p>
          </table:table-cell>
          <table:table-cell office:value-type="float" office:value="62511.02" calcext:value-type="float">
            <text:p>62511.02</text:p>
          </table:table-cell>
          <table:table-cell office:value-type="float" office:value="62489.13" calcext:value-type="float">
            <text:p>62489.13</text:p>
          </table:table-cell>
          <table:table-cell office:value-type="float" office:value="62511.02" calcext:value-type="float">
            <text:p>62511.02</text:p>
          </table:table-cell>
          <table:table-cell office:value-type="float" office:value="8.5688" calcext:value-type="float">
            <text:p>8.5688</text:p>
          </table:table-cell>
          <table:table-cell office:value-type="float" office:value="2076" calcext:value-type="float">
            <text:p>2076</text:p>
          </table:table-cell>
          <table:table-cell office:value-type="float" office:value="1757.61" calcext:value-type="float">
            <text:p>1757.61</text:p>
          </table:table-cell>
          <table:table-cell office:value-type="float" office:value="1758.6" calcext:value-type="float">
            <text:p>1758.6</text:p>
          </table:table-cell>
          <table:table-cell office:value-type="float" office:value="1757.61" calcext:value-type="float">
            <text:p>1757.61</text:p>
          </table:table-cell>
          <table:table-cell office:value-type="float" office:value="1758.59" calcext:value-type="float">
            <text:p>1758.59</text:p>
          </table:table-cell>
          <table:table-cell office:value-type="float" office:value="179.9547" calcext:value-type="float">
            <text:p>179.9547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2026-07-04T12:02:09.626Z</text:p>
          </table:table-cell>
          <table:table-cell office:value-type="float" office:value="62511.02" calcext:value-type="float">
            <text:p>62511.02</text:p>
          </table:table-cell>
          <table:table-cell office:value-type="float" office:value="62526" calcext:value-type="float">
            <text:p>62526</text:p>
          </table:table-cell>
          <table:table-cell office:value-type="float" office:value="62482" calcext:value-type="float">
            <text:p>62482</text:p>
          </table:table-cell>
          <table:table-cell office:value-type="float" office:value="62526" calcext:value-type="float">
            <text:p>62526</text:p>
          </table:table-cell>
          <table:table-cell office:value-type="float" office:value="34.09003" calcext:value-type="float">
            <text:p>34.09003</text:p>
          </table:table-cell>
          <table:table-cell office:value-type="float" office:value="2861" calcext:value-type="float">
            <text:p>2861</text:p>
          </table:table-cell>
          <table:table-cell office:value-type="float" office:value="1758.6" calcext:value-type="float">
            <text:p>1758.6</text:p>
          </table:table-cell>
          <table:table-cell office:value-type="float" office:value="1759.84" calcext:value-type="float">
            <text:p>1759.84</text:p>
          </table:table-cell>
          <table:table-cell office:value-type="float" office:value="1758.23" calcext:value-type="float">
            <text:p>1758.23</text:p>
          </table:table-cell>
          <table:table-cell office:value-type="float" office:value="1759.66" calcext:value-type="float">
            <text:p>1759.66</text:p>
          </table:table-cell>
          <table:table-cell office:value-type="float" office:value="152.838" calcext:value-type="float">
            <text:p>152.838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string" calcext:value-type="string">
            <text:p>2026-07-04T12:07:09.636Z</text:p>
          </table:table-cell>
          <table:table-cell office:value-type="float" office:value="62526" calcext:value-type="float">
            <text:p>62526</text:p>
          </table:table-cell>
          <table:table-cell office:value-type="float" office:value="62580.01" calcext:value-type="float">
            <text:p>62580.01</text:p>
          </table:table-cell>
          <table:table-cell office:value-type="float" office:value="62525.99" calcext:value-type="float">
            <text:p>62525.99</text:p>
          </table:table-cell>
          <table:table-cell office:value-type="float" office:value="62561.43" calcext:value-type="float">
            <text:p>62561.43</text:p>
          </table:table-cell>
          <table:table-cell office:value-type="float" office:value="19.3661" calcext:value-type="float">
            <text:p>19.3661</text:p>
          </table:table-cell>
          <table:table-cell office:value-type="float" office:value="5162" calcext:value-type="float">
            <text:p>5162</text:p>
          </table:table-cell>
          <table:table-cell office:value-type="float" office:value="1759.66" calcext:value-type="float">
            <text:p>1759.66</text:p>
          </table:table-cell>
          <table:table-cell office:value-type="float" office:value="1762.22" calcext:value-type="float">
            <text:p>1762.22</text:p>
          </table:table-cell>
          <table:table-cell office:value-type="float" office:value="1759.5" calcext:value-type="float">
            <text:p>1759.5</text:p>
          </table:table-cell>
          <table:table-cell office:value-type="float" office:value="1761.27" calcext:value-type="float">
            <text:p>1761.27</text:p>
          </table:table-cell>
          <table:table-cell office:value-type="float" office:value="621.0155" calcext:value-type="float">
            <text:p>621.0155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string" calcext:value-type="string">
            <text:p>2026-07-04T12:12:09.645Z</text:p>
          </table:table-cell>
          <table:table-cell office:value-type="float" office:value="62561.44" calcext:value-type="float">
            <text:p>62561.44</text:p>
          </table:table-cell>
          <table:table-cell office:value-type="float" office:value="62563.94" calcext:value-type="float">
            <text:p>62563.94</text:p>
          </table:table-cell>
          <table:table-cell office:value-type="float" office:value="62548.21" calcext:value-type="float">
            <text:p>62548.21</text:p>
          </table:table-cell>
          <table:table-cell office:value-type="float" office:value="62563.93" calcext:value-type="float">
            <text:p>62563.93</text:p>
          </table:table-cell>
          <table:table-cell office:value-type="float" office:value="7.55584" calcext:value-type="float">
            <text:p>7.55584</text:p>
          </table:table-cell>
          <table:table-cell office:value-type="float" office:value="1930" calcext:value-type="float">
            <text:p>1930</text:p>
          </table:table-cell>
          <table:table-cell office:value-type="float" office:value="1761.27" calcext:value-type="float">
            <text:p>1761.27</text:p>
          </table:table-cell>
          <table:table-cell office:value-type="float" office:value="1761.38" calcext:value-type="float">
            <text:p>1761.38</text:p>
          </table:table-cell>
          <table:table-cell office:value-type="float" office:value="1760.55" calcext:value-type="float">
            <text:p>1760.55</text:p>
          </table:table-cell>
          <table:table-cell office:value-type="float" office:value="1761.13" calcext:value-type="float">
            <text:p>1761.13</text:p>
          </table:table-cell>
          <table:table-cell office:value-type="float" office:value="158.0493" calcext:value-type="float">
            <text:p>158.0493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2026-07-04T12:17:09.648Z</text:p>
          </table:table-cell>
          <table:table-cell office:value-type="float" office:value="62563.93" calcext:value-type="float">
            <text:p>62563.93</text:p>
          </table:table-cell>
          <table:table-cell office:value-type="float" office:value="62570.3" calcext:value-type="float">
            <text:p>62570.3</text:p>
          </table:table-cell>
          <table:table-cell office:value-type="float" office:value="62563.93" calcext:value-type="float">
            <text:p>62563.93</text:p>
          </table:table-cell>
          <table:table-cell office:value-type="float" office:value="62569.85" calcext:value-type="float">
            <text:p>62569.85</text:p>
          </table:table-cell>
          <table:table-cell office:value-type="float" office:value="11.39391" calcext:value-type="float">
            <text:p>11.39391</text:p>
          </table:table-cell>
          <table:table-cell office:value-type="float" office:value="1404" calcext:value-type="float">
            <text:p>1404</text:p>
          </table:table-cell>
          <table:table-cell office:value-type="float" office:value="1761.12" calcext:value-type="float">
            <text:p>1761.12</text:p>
          </table:table-cell>
          <table:table-cell office:value-type="float" office:value="1761.72" calcext:value-type="float">
            <text:p>1761.72</text:p>
          </table:table-cell>
          <table:table-cell office:value-type="float" office:value="1761.12" calcext:value-type="float">
            <text:p>1761.12</text:p>
          </table:table-cell>
          <table:table-cell office:value-type="float" office:value="1761.36" calcext:value-type="float">
            <text:p>1761.36</text:p>
          </table:table-cell>
          <table:table-cell office:value-type="float" office:value="295.9418" calcext:value-type="float">
            <text:p>295.9418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2026-07-04T12:22:09.648Z</text:p>
          </table:table-cell>
          <table:table-cell office:value-type="float" office:value="62569.86" calcext:value-type="float">
            <text:p>62569.86</text:p>
          </table:table-cell>
          <table:table-cell office:value-type="float" office:value="62574.01" calcext:value-type="float">
            <text:p>62574.01</text:p>
          </table:table-cell>
          <table:table-cell office:value-type="float" office:value="62548" calcext:value-type="float">
            <text:p>62548</text:p>
          </table:table-cell>
          <table:table-cell office:value-type="float" office:value="62558.93" calcext:value-type="float">
            <text:p>62558.93</text:p>
          </table:table-cell>
          <table:table-cell office:value-type="float" office:value="9.83427" calcext:value-type="float">
            <text:p>9.83427</text:p>
          </table:table-cell>
          <table:table-cell office:value-type="float" office:value="2853" calcext:value-type="float">
            <text:p>2853</text:p>
          </table:table-cell>
          <table:table-cell table:number-columns-repeated="2" office:value-type="float" office:value="1761.36" calcext:value-type="float">
            <text:p>1761.36</text:p>
          </table:table-cell>
          <table:table-cell office:value-type="float" office:value="1759.04" calcext:value-type="float">
            <text:p>1759.04</text:p>
          </table:table-cell>
          <table:table-cell office:value-type="float" office:value="1760.59" calcext:value-type="float">
            <text:p>1760.59</text:p>
          </table:table-cell>
          <table:table-cell office:value-type="float" office:value="385.5846" calcext:value-type="float">
            <text:p>385.5846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2026-07-04T12:27:09.653Z</text:p>
          </table:table-cell>
          <table:table-cell office:value-type="float" office:value="62558.94" calcext:value-type="float">
            <text:p>62558.94</text:p>
          </table:table-cell>
          <table:table-cell office:value-type="float" office:value="62573.99" calcext:value-type="float">
            <text:p>62573.99</text:p>
          </table:table-cell>
          <table:table-cell office:value-type="float" office:value="62558.93" calcext:value-type="float">
            <text:p>62558.93</text:p>
          </table:table-cell>
          <table:table-cell office:value-type="float" office:value="62573.98" calcext:value-type="float">
            <text:p>62573.98</text:p>
          </table:table-cell>
          <table:table-cell office:value-type="float" office:value="3.66958" calcext:value-type="float">
            <text:p>3.66958</text:p>
          </table:table-cell>
          <table:table-cell office:value-type="float" office:value="1777" calcext:value-type="float">
            <text:p>1777</text:p>
          </table:table-cell>
          <table:table-cell office:value-type="float" office:value="1760.21" calcext:value-type="float">
            <text:p>1760.21</text:p>
          </table:table-cell>
          <table:table-cell office:value-type="float" office:value="1761.67" calcext:value-type="float">
            <text:p>1761.67</text:p>
          </table:table-cell>
          <table:table-cell office:value-type="float" office:value="1760.21" calcext:value-type="float">
            <text:p>1760.21</text:p>
          </table:table-cell>
          <table:table-cell office:value-type="float" office:value="1761.67" calcext:value-type="float">
            <text:p>1761.67</text:p>
          </table:table-cell>
          <table:table-cell office:value-type="float" office:value="216.7894" calcext:value-type="float">
            <text:p>216.7894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2026-07-04T12:32:09.662Z</text:p>
          </table:table-cell>
          <table:table-cell office:value-type="float" office:value="62567.32" calcext:value-type="float">
            <text:p>62567.32</text:p>
          </table:table-cell>
          <table:table-cell office:value-type="float" office:value="62614.46" calcext:value-type="float">
            <text:p>62614.46</text:p>
          </table:table-cell>
          <table:table-cell office:value-type="float" office:value="62567.32" calcext:value-type="float">
            <text:p>62567.32</text:p>
          </table:table-cell>
          <table:table-cell office:value-type="float" office:value="62607.35" calcext:value-type="float">
            <text:p>62607.35</text:p>
          </table:table-cell>
          <table:table-cell office:value-type="float" office:value="18.39556" calcext:value-type="float">
            <text:p>18.39556</text:p>
          </table:table-cell>
          <table:table-cell office:value-type="float" office:value="5485" calcext:value-type="float">
            <text:p>5485</text:p>
          </table:table-cell>
          <table:table-cell office:value-type="float" office:value="1761.4" calcext:value-type="float">
            <text:p>1761.4</text:p>
          </table:table-cell>
          <table:table-cell office:value-type="float" office:value="1765" calcext:value-type="float">
            <text:p>1765</text:p>
          </table:table-cell>
          <table:table-cell office:value-type="float" office:value="1761.39" calcext:value-type="float">
            <text:p>1761.39</text:p>
          </table:table-cell>
          <table:table-cell office:value-type="float" office:value="1764.63" calcext:value-type="float">
            <text:p>1764.63</text:p>
          </table:table-cell>
          <table:table-cell office:value-type="float" office:value="667.8942" calcext:value-type="float">
            <text:p>667.8942</text:p>
          </table:table-cell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string" calcext:value-type="string">
            <text:p>2026-07-04T12:37:09.671Z</text:p>
          </table:table-cell>
          <table:table-cell office:value-type="float" office:value="62607.62" calcext:value-type="float">
            <text:p>62607.62</text:p>
          </table:table-cell>
          <table:table-cell office:value-type="float" office:value="62648" calcext:value-type="float">
            <text:p>62648</text:p>
          </table:table-cell>
          <table:table-cell table:number-columns-repeated="2" office:value-type="float" office:value="62592.59" calcext:value-type="float">
            <text:p>62592.59</text:p>
          </table:table-cell>
          <table:table-cell office:value-type="float" office:value="15.94586" calcext:value-type="float">
            <text:p>15.94586</text:p>
          </table:table-cell>
          <table:table-cell office:value-type="float" office:value="5003" calcext:value-type="float">
            <text:p>5003</text:p>
          </table:table-cell>
          <table:table-cell office:value-type="float" office:value="1764.87" calcext:value-type="float">
            <text:p>1764.87</text:p>
          </table:table-cell>
          <table:table-cell office:value-type="float" office:value="1766.45" calcext:value-type="float">
            <text:p>1766.45</text:p>
          </table:table-cell>
          <table:table-cell office:value-type="float" office:value="1762.32" calcext:value-type="float">
            <text:p>1762.32</text:p>
          </table:table-cell>
          <table:table-cell office:value-type="float" office:value="1762.97" calcext:value-type="float">
            <text:p>1762.97</text:p>
          </table:table-cell>
          <table:table-cell office:value-type="float" office:value="1287.0731" calcext:value-type="float">
            <text:p>1287.0731</text:p>
          </table:table-cell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string" calcext:value-type="string">
            <text:p>2026-07-04T12:42:09.675Z</text:p>
          </table:table-cell>
          <table:table-cell office:value-type="float" office:value="62592.59" calcext:value-type="float">
            <text:p>62592.59</text:p>
          </table:table-cell>
          <table:table-cell office:value-type="float" office:value="62622" calcext:value-type="float">
            <text:p>62622</text:p>
          </table:table-cell>
          <table:table-cell office:value-type="float" office:value="62592.59" calcext:value-type="float">
            <text:p>62592.59</text:p>
          </table:table-cell>
          <table:table-cell office:value-type="float" office:value="62609.32" calcext:value-type="float">
            <text:p>62609.32</text:p>
          </table:table-cell>
          <table:table-cell office:value-type="float" office:value="10.21794" calcext:value-type="float">
            <text:p>10.21794</text:p>
          </table:table-cell>
          <table:table-cell office:value-type="float" office:value="2940" calcext:value-type="float">
            <text:p>2940</text:p>
          </table:table-cell>
          <table:table-cell office:value-type="float" office:value="1762.98" calcext:value-type="float">
            <text:p>1762.98</text:p>
          </table:table-cell>
          <table:table-cell office:value-type="float" office:value="1765.47" calcext:value-type="float">
            <text:p>1765.47</text:p>
          </table:table-cell>
          <table:table-cell office:value-type="float" office:value="1762.75" calcext:value-type="float">
            <text:p>1762.75</text:p>
          </table:table-cell>
          <table:table-cell office:value-type="float" office:value="1764.61" calcext:value-type="float">
            <text:p>1764.61</text:p>
          </table:table-cell>
          <table:table-cell office:value-type="float" office:value="568.466" calcext:value-type="float">
            <text:p>568.466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2026-07-04T12:47:09.676Z</text:p>
          </table:table-cell>
          <table:table-cell office:value-type="float" office:value="62609.31" calcext:value-type="float">
            <text:p>62609.31</text:p>
          </table:table-cell>
          <table:table-cell office:value-type="float" office:value="62631.64" calcext:value-type="float">
            <text:p>62631.64</text:p>
          </table:table-cell>
          <table:table-cell office:value-type="float" office:value="62600.01" calcext:value-type="float">
            <text:p>62600.01</text:p>
          </table:table-cell>
          <table:table-cell office:value-type="float" office:value="62600.02" calcext:value-type="float">
            <text:p>62600.02</text:p>
          </table:table-cell>
          <table:table-cell office:value-type="float" office:value="14.90294" calcext:value-type="float">
            <text:p>14.90294</text:p>
          </table:table-cell>
          <table:table-cell office:value-type="float" office:value="4050" calcext:value-type="float">
            <text:p>4050</text:p>
          </table:table-cell>
          <table:table-cell office:value-type="float" office:value="1764.6" calcext:value-type="float">
            <text:p>1764.6</text:p>
          </table:table-cell>
          <table:table-cell office:value-type="float" office:value="1764.69" calcext:value-type="float">
            <text:p>1764.69</text:p>
          </table:table-cell>
          <table:table-cell table:number-columns-repeated="2" office:value-type="float" office:value="1762.57" calcext:value-type="float">
            <text:p>1762.57</text:p>
          </table:table-cell>
          <table:table-cell office:value-type="float" office:value="431.4021" calcext:value-type="float">
            <text:p>431.4021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2026-07-04T12:52:09.685Z</text:p>
          </table:table-cell>
          <table:table-cell office:value-type="float" office:value="62600.02" calcext:value-type="float">
            <text:p>62600.02</text:p>
          </table:table-cell>
          <table:table-cell office:value-type="float" office:value="62603.99" calcext:value-type="float">
            <text:p>62603.99</text:p>
          </table:table-cell>
          <table:table-cell office:value-type="float" office:value="62588" calcext:value-type="float">
            <text:p>62588</text:p>
          </table:table-cell>
          <table:table-cell office:value-type="float" office:value="62599.43" calcext:value-type="float">
            <text:p>62599.43</text:p>
          </table:table-cell>
          <table:table-cell office:value-type="float" office:value="9.4954" calcext:value-type="float">
            <text:p>9.4954</text:p>
          </table:table-cell>
          <table:table-cell office:value-type="float" office:value="2176" calcext:value-type="float">
            <text:p>2176</text:p>
          </table:table-cell>
          <table:table-cell office:value-type="float" office:value="1762.58" calcext:value-type="float">
            <text:p>1762.58</text:p>
          </table:table-cell>
          <table:table-cell office:value-type="float" office:value="1763.1" calcext:value-type="float">
            <text:p>1763.1</text:p>
          </table:table-cell>
          <table:table-cell office:value-type="float" office:value="1762.28" calcext:value-type="float">
            <text:p>1762.28</text:p>
          </table:table-cell>
          <table:table-cell office:value-type="float" office:value="1762.77" calcext:value-type="float">
            <text:p>1762.77</text:p>
          </table:table-cell>
          <table:table-cell office:value-type="float" office:value="401.3747" calcext:value-type="float">
            <text:p>401.3747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2026-07-04T12:57:09.693Z</text:p>
          </table:table-cell>
          <table:table-cell office:value-type="float" office:value="62603.99" calcext:value-type="float">
            <text:p>62603.99</text:p>
          </table:table-cell>
          <table:table-cell office:value-type="float" office:value="62629.27" calcext:value-type="float">
            <text:p>62629.27</text:p>
          </table:table-cell>
          <table:table-cell office:value-type="float" office:value="62599.42" calcext:value-type="float">
            <text:p>62599.42</text:p>
          </table:table-cell>
          <table:table-cell office:value-type="float" office:value="62624.52" calcext:value-type="float">
            <text:p>62624.52</text:p>
          </table:table-cell>
          <table:table-cell office:value-type="float" office:value="16.79477" calcext:value-type="float">
            <text:p>16.79477</text:p>
          </table:table-cell>
          <table:table-cell office:value-type="float" office:value="2072" calcext:value-type="float">
            <text:p>2072</text:p>
          </table:table-cell>
          <table:table-cell office:value-type="float" office:value="1762.94" calcext:value-type="float">
            <text:p>1762.94</text:p>
          </table:table-cell>
          <table:table-cell office:value-type="float" office:value="1763.8" calcext:value-type="float">
            <text:p>1763.8</text:p>
          </table:table-cell>
          <table:table-cell office:value-type="float" office:value="1762.76" calcext:value-type="float">
            <text:p>1762.76</text:p>
          </table:table-cell>
          <table:table-cell office:value-type="float" office:value="1763.38" calcext:value-type="float">
            <text:p>1763.38</text:p>
          </table:table-cell>
          <table:table-cell office:value-type="float" office:value="177.1405" calcext:value-type="float">
            <text:p>177.1405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2026-07-04T13:02:09.701Z</text:p>
          </table:table-cell>
          <table:table-cell office:value-type="float" office:value="62620.25" calcext:value-type="float">
            <text:p>62620.25</text:p>
          </table:table-cell>
          <table:table-cell office:value-type="float" office:value="62696.78" calcext:value-type="float">
            <text:p>62696.78</text:p>
          </table:table-cell>
          <table:table-cell office:value-type="float" office:value="62620.24" calcext:value-type="float">
            <text:p>62620.24</text:p>
          </table:table-cell>
          <table:table-cell office:value-type="float" office:value="62638.02" calcext:value-type="float">
            <text:p>62638.02</text:p>
          </table:table-cell>
          <table:table-cell office:value-type="float" office:value="18.95241" calcext:value-type="float">
            <text:p>18.95241</text:p>
          </table:table-cell>
          <table:table-cell office:value-type="float" office:value="4131" calcext:value-type="float">
            <text:p>4131</text:p>
          </table:table-cell>
          <table:table-cell office:value-type="float" office:value="1763.41" calcext:value-type="float">
            <text:p>1763.41</text:p>
          </table:table-cell>
          <table:table-cell office:value-type="float" office:value="1765.34" calcext:value-type="float">
            <text:p>1765.34</text:p>
          </table:table-cell>
          <table:table-cell office:value-type="float" office:value="1763.37" calcext:value-type="float">
            <text:p>1763.37</text:p>
          </table:table-cell>
          <table:table-cell office:value-type="float" office:value="1763.62" calcext:value-type="float">
            <text:p>1763.62</text:p>
          </table:table-cell>
          <table:table-cell office:value-type="float" office:value="480.5403" calcext:value-type="float">
            <text:p>480.5403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2026-07-04T13:07:09.709Z</text:p>
          </table:table-cell>
          <table:table-cell office:value-type="float" office:value="62638.01" calcext:value-type="float">
            <text:p>62638.01</text:p>
          </table:table-cell>
          <table:table-cell office:value-type="float" office:value="62638.02" calcext:value-type="float">
            <text:p>62638.02</text:p>
          </table:table-cell>
          <table:table-cell office:value-type="float" office:value="62596.57" calcext:value-type="float">
            <text:p>62596.57</text:p>
          </table:table-cell>
          <table:table-cell office:value-type="float" office:value="62604" calcext:value-type="float">
            <text:p>62604</text:p>
          </table:table-cell>
          <table:table-cell office:value-type="float" office:value="15.44677" calcext:value-type="float">
            <text:p>15.44677</text:p>
          </table:table-cell>
          <table:table-cell office:value-type="float" office:value="2867" calcext:value-type="float">
            <text:p>2867</text:p>
          </table:table-cell>
          <table:table-cell office:value-type="float" office:value="1763.42" calcext:value-type="float">
            <text:p>1763.42</text:p>
          </table:table-cell>
          <table:table-cell office:value-type="float" office:value="1763.84" calcext:value-type="float">
            <text:p>1763.84</text:p>
          </table:table-cell>
          <table:table-cell office:value-type="float" office:value="1762" calcext:value-type="float">
            <text:p>1762</text:p>
          </table:table-cell>
          <table:table-cell office:value-type="float" office:value="1762.44" calcext:value-type="float">
            <text:p>1762.44</text:p>
          </table:table-cell>
          <table:table-cell office:value-type="float" office:value="334.4608" calcext:value-type="float">
            <text:p>334.4608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2026-07-04T13:12:09.716Z</text:p>
          </table:table-cell>
          <table:table-cell office:value-type="float" office:value="62604" calcext:value-type="float">
            <text:p>62604</text:p>
          </table:table-cell>
          <table:table-cell office:value-type="float" office:value="62617.85" calcext:value-type="float">
            <text:p>62617.85</text:p>
          </table:table-cell>
          <table:table-cell table:number-columns-repeated="2" office:value-type="float" office:value="62595.1" calcext:value-type="float">
            <text:p>62595.1</text:p>
          </table:table-cell>
          <table:table-cell office:value-type="float" office:value="14.9721" calcext:value-type="float">
            <text:p>14.9721</text:p>
          </table:table-cell>
          <table:table-cell office:value-type="float" office:value="3560" calcext:value-type="float">
            <text:p>3560</text:p>
          </table:table-cell>
          <table:table-cell office:value-type="float" office:value="1762.56" calcext:value-type="float">
            <text:p>1762.56</text:p>
          </table:table-cell>
          <table:table-cell office:value-type="float" office:value="1763.12" calcext:value-type="float">
            <text:p>1763.12</text:p>
          </table:table-cell>
          <table:table-cell office:value-type="float" office:value="1761.62" calcext:value-type="float">
            <text:p>1761.62</text:p>
          </table:table-cell>
          <table:table-cell office:value-type="float" office:value="1761.9" calcext:value-type="float">
            <text:p>1761.9</text:p>
          </table:table-cell>
          <table:table-cell office:value-type="float" office:value="281.4681" calcext:value-type="float">
            <text:p>281.4681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string" calcext:value-type="string">
            <text:p>2026-07-04T13:17:09.723Z</text:p>
          </table:table-cell>
          <table:table-cell office:value-type="float" office:value="62596" calcext:value-type="float">
            <text:p>62596</text:p>
          </table:table-cell>
          <table:table-cell office:value-type="float" office:value="62648.26" calcext:value-type="float">
            <text:p>62648.26</text:p>
          </table:table-cell>
          <table:table-cell office:value-type="float" office:value="62595.1" calcext:value-type="float">
            <text:p>62595.1</text:p>
          </table:table-cell>
          <table:table-cell office:value-type="float" office:value="62648.26" calcext:value-type="float">
            <text:p>62648.26</text:p>
          </table:table-cell>
          <table:table-cell office:value-type="float" office:value="30.77446" calcext:value-type="float">
            <text:p>30.77446</text:p>
          </table:table-cell>
          <table:table-cell office:value-type="float" office:value="4118" calcext:value-type="float">
            <text:p>4118</text:p>
          </table:table-cell>
          <table:table-cell office:value-type="float" office:value="1762.26" calcext:value-type="float">
            <text:p>1762.26</text:p>
          </table:table-cell>
          <table:table-cell office:value-type="float" office:value="1764.2" calcext:value-type="float">
            <text:p>1764.2</text:p>
          </table:table-cell>
          <table:table-cell office:value-type="float" office:value="1761.62" calcext:value-type="float">
            <text:p>1761.62</text:p>
          </table:table-cell>
          <table:table-cell office:value-type="float" office:value="1764.2" calcext:value-type="float">
            <text:p>1764.2</text:p>
          </table:table-cell>
          <table:table-cell office:value-type="float" office:value="194.5335" calcext:value-type="float">
            <text:p>194.5335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2026-07-04T13:22:09.729Z</text:p>
          </table:table-cell>
          <table:table-cell office:value-type="float" office:value="62638.02" calcext:value-type="float">
            <text:p>62638.02</text:p>
          </table:table-cell>
          <table:table-cell office:value-type="float" office:value="62776.92" calcext:value-type="float">
            <text:p>62776.92</text:p>
          </table:table-cell>
          <table:table-cell office:value-type="float" office:value="62638.02" calcext:value-type="float">
            <text:p>62638.02</text:p>
          </table:table-cell>
          <table:table-cell office:value-type="float" office:value="62711.28" calcext:value-type="float">
            <text:p>62711.28</text:p>
          </table:table-cell>
          <table:table-cell office:value-type="float" office:value="59.42169" calcext:value-type="float">
            <text:p>59.42169</text:p>
          </table:table-cell>
          <table:table-cell office:value-type="float" office:value="14080" calcext:value-type="float">
            <text:p>14080</text:p>
          </table:table-cell>
          <table:table-cell office:value-type="float" office:value="1763.6" calcext:value-type="float">
            <text:p>1763.6</text:p>
          </table:table-cell>
          <table:table-cell office:value-type="float" office:value="1778.63" calcext:value-type="float">
            <text:p>1778.63</text:p>
          </table:table-cell>
          <table:table-cell office:value-type="float" office:value="1763.6" calcext:value-type="float">
            <text:p>1763.6</text:p>
          </table:table-cell>
          <table:table-cell office:value-type="float" office:value="1772.5" calcext:value-type="float">
            <text:p>1772.5</text:p>
          </table:table-cell>
          <table:table-cell office:value-type="float" office:value="5877.7749" calcext:value-type="float">
            <text:p>5877.7749</text:p>
          </table:table-cell>
          <table:table-cell office:value-type="float" office:value="38798" calcext:value-type="float">
            <text:p>38798</text:p>
          </table:table-cell>
        </table:table-row>
        <table:table-row table:style-name="ro1">
          <table:table-cell office:value-type="string" calcext:value-type="string">
            <text:p>2026-07-04T13:27:09.736Z</text:p>
          </table:table-cell>
          <table:table-cell office:value-type="float" office:value="62680" calcext:value-type="float">
            <text:p>62680</text:p>
          </table:table-cell>
          <table:table-cell office:value-type="float" office:value="62711.28" calcext:value-type="float">
            <text:p>62711.28</text:p>
          </table:table-cell>
          <table:table-cell office:value-type="float" office:value="62652" calcext:value-type="float">
            <text:p>62652</text:p>
          </table:table-cell>
          <table:table-cell office:value-type="float" office:value="62662" calcext:value-type="float">
            <text:p>62662</text:p>
          </table:table-cell>
          <table:table-cell office:value-type="float" office:value="24.87326" calcext:value-type="float">
            <text:p>24.87326</text:p>
          </table:table-cell>
          <table:table-cell office:value-type="float" office:value="10004" calcext:value-type="float">
            <text:p>10004</text:p>
          </table:table-cell>
          <table:table-cell office:value-type="float" office:value="1770.5" calcext:value-type="float">
            <text:p>1770.5</text:p>
          </table:table-cell>
          <table:table-cell office:value-type="float" office:value="1772.51" calcext:value-type="float">
            <text:p>1772.51</text:p>
          </table:table-cell>
          <table:table-cell office:value-type="float" office:value="1768.06" calcext:value-type="float">
            <text:p>1768.06</text:p>
          </table:table-cell>
          <table:table-cell office:value-type="float" office:value="1768.07" calcext:value-type="float">
            <text:p>1768.07</text:p>
          </table:table-cell>
          <table:table-cell office:value-type="float" office:value="1703.8812" calcext:value-type="float">
            <text:p>1703.8812</text:p>
          </table:table-cell>
          <table:table-cell office:value-type="float" office:value="22507" calcext:value-type="float">
            <text:p>22507</text:p>
          </table:table-cell>
        </table:table-row>
        <table:table-row table:style-name="ro1">
          <table:table-cell office:value-type="string" calcext:value-type="string">
            <text:p>2026-07-04T13:32:09.742Z</text:p>
          </table:table-cell>
          <table:table-cell table:number-columns-repeated="2" office:value-type="float" office:value="62681.05" calcext:value-type="float">
            <text:p>62681.05</text:p>
          </table:table-cell>
          <table:table-cell office:value-type="float" office:value="62610" calcext:value-type="float">
            <text:p>62610</text:p>
          </table:table-cell>
          <table:table-cell office:value-type="float" office:value="62610.01" calcext:value-type="float">
            <text:p>62610.01</text:p>
          </table:table-cell>
          <table:table-cell office:value-type="float" office:value="19.33838" calcext:value-type="float">
            <text:p>19.33838</text:p>
          </table:table-cell>
          <table:table-cell office:value-type="float" office:value="4597" calcext:value-type="float">
            <text:p>4597</text:p>
          </table:table-cell>
          <table:table-cell table:number-columns-repeated="2" office:value-type="float" office:value="1769.52" calcext:value-type="float">
            <text:p>1769.52</text:p>
          </table:table-cell>
          <table:table-cell office:value-type="float" office:value="1764.98" calcext:value-type="float">
            <text:p>1764.98</text:p>
          </table:table-cell>
          <table:table-cell office:value-type="float" office:value="1765.18" calcext:value-type="float">
            <text:p>1765.18</text:p>
          </table:table-cell>
          <table:table-cell office:value-type="float" office:value="940.9731" calcext:value-type="float">
            <text:p>940.9731</text:p>
          </table:table-cell>
          <table:table-cell office:value-type="float" office:value="12499" calcext:value-type="float">
            <text:p>12499</text:p>
          </table:table-cell>
        </table:table-row>
        <table:table-row table:style-name="ro1">
          <table:table-cell office:value-type="string" calcext:value-type="string">
            <text:p>2026-07-04T13:37:09.749Z</text:p>
          </table:table-cell>
          <table:table-cell office:value-type="float" office:value="62620.35" calcext:value-type="float">
            <text:p>62620.35</text:p>
          </table:table-cell>
          <table:table-cell office:value-type="float" office:value="62620.36" calcext:value-type="float">
            <text:p>62620.36</text:p>
          </table:table-cell>
          <table:table-cell table:number-columns-repeated="2" office:value-type="float" office:value="62584.01" calcext:value-type="float">
            <text:p>62584.01</text:p>
          </table:table-cell>
          <table:table-cell office:value-type="float" office:value="7.90121" calcext:value-type="float">
            <text:p>7.90121</text:p>
          </table:table-cell>
          <table:table-cell office:value-type="float" office:value="2851" calcext:value-type="float">
            <text:p>2851</text:p>
          </table:table-cell>
          <table:table-cell office:value-type="float" office:value="1765.81" calcext:value-type="float">
            <text:p>1765.81</text:p>
          </table:table-cell>
          <table:table-cell office:value-type="float" office:value="1766.34" calcext:value-type="float">
            <text:p>1766.34</text:p>
          </table:table-cell>
          <table:table-cell table:number-columns-repeated="2" office:value-type="float" office:value="1763.75" calcext:value-type="float">
            <text:p>1763.75</text:p>
          </table:table-cell>
          <table:table-cell office:value-type="float" office:value="542.0417" calcext:value-type="float">
            <text:p>542.0417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string" calcext:value-type="string">
            <text:p>2026-07-04T13:42:09.755Z</text:p>
          </table:table-cell>
          <table:table-cell office:value-type="float" office:value="62594" calcext:value-type="float">
            <text:p>62594</text:p>
          </table:table-cell>
          <table:table-cell office:value-type="float" office:value="62603.99" calcext:value-type="float">
            <text:p>62603.99</text:p>
          </table:table-cell>
          <table:table-cell table:number-columns-repeated="2" office:value-type="float" office:value="62568.87" calcext:value-type="float">
            <text:p>62568.87</text:p>
          </table:table-cell>
          <table:table-cell office:value-type="float" office:value="14.64348" calcext:value-type="float">
            <text:p>14.64348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1765.54" calcext:value-type="float">
            <text:p>1765.54</text:p>
          </table:table-cell>
          <table:table-cell table:number-columns-repeated="2" office:value-type="float" office:value="1763.3" calcext:value-type="float">
            <text:p>1763.3</text:p>
          </table:table-cell>
          <table:table-cell office:value-type="float" office:value="1114.2356" calcext:value-type="float">
            <text:p>1114.2356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string" calcext:value-type="string">
            <text:p>2026-07-04T13:47:09.761Z</text:p>
          </table:table-cell>
          <table:table-cell office:value-type="float" office:value="62572.01" calcext:value-type="float">
            <text:p>62572.01</text:p>
          </table:table-cell>
          <table:table-cell office:value-type="float" office:value="62604" calcext:value-type="float">
            <text:p>62604</text:p>
          </table:table-cell>
          <table:table-cell office:value-type="float" office:value="62542" calcext:value-type="float">
            <text:p>62542</text:p>
          </table:table-cell>
          <table:table-cell office:value-type="float" office:value="62554.01" calcext:value-type="float">
            <text:p>62554.01</text:p>
          </table:table-cell>
          <table:table-cell office:value-type="float" office:value="23.69327" calcext:value-type="float">
            <text:p>23.69327</text:p>
          </table:table-cell>
          <table:table-cell office:value-type="float" office:value="7317" calcext:value-type="float">
            <text:p>7317</text:p>
          </table:table-cell>
          <table:table-cell office:value-type="float" office:value="1763.83" calcext:value-type="float">
            <text:p>1763.83</text:p>
          </table:table-cell>
          <table:table-cell office:value-type="float" office:value="1765" calcext:value-type="float">
            <text:p>1765</text:p>
          </table:table-cell>
          <table:table-cell office:value-type="float" office:value="1762.38" calcext:value-type="float">
            <text:p>1762.38</text:p>
          </table:table-cell>
          <table:table-cell office:value-type="float" office:value="1762.87" calcext:value-type="float">
            <text:p>1762.87</text:p>
          </table:table-cell>
          <table:table-cell office:value-type="float" office:value="758.1218" calcext:value-type="float">
            <text:p>758.1218</text:p>
          </table:table-cell>
          <table:table-cell office:value-type="float" office:value="8616" calcext:value-type="float">
            <text:p>8616</text:p>
          </table:table-cell>
        </table:table-row>
        <table:table-row table:style-name="ro1">
          <table:table-cell office:value-type="string" calcext:value-type="string">
            <text:p>2026-07-04T13:52:09.767Z</text:p>
          </table:table-cell>
          <table:table-cell office:value-type="float" office:value="62555.97" calcext:value-type="float">
            <text:p>62555.97</text:p>
          </table:table-cell>
          <table:table-cell office:value-type="float" office:value="62576" calcext:value-type="float">
            <text:p>62576</text:p>
          </table:table-cell>
          <table:table-cell office:value-type="float" office:value="62544.93" calcext:value-type="float">
            <text:p>62544.93</text:p>
          </table:table-cell>
          <table:table-cell office:value-type="float" office:value="62564.01" calcext:value-type="float">
            <text:p>62564.01</text:p>
          </table:table-cell>
          <table:table-cell office:value-type="float" office:value="7.9538" calcext:value-type="float">
            <text:p>7.9538</text:p>
          </table:table-cell>
          <table:table-cell office:value-type="float" office:value="2813" calcext:value-type="float">
            <text:p>2813</text:p>
          </table:table-cell>
          <table:table-cell office:value-type="float" office:value="1762.78" calcext:value-type="float">
            <text:p>1762.78</text:p>
          </table:table-cell>
          <table:table-cell office:value-type="float" office:value="1763.75" calcext:value-type="float">
            <text:p>1763.75</text:p>
          </table:table-cell>
          <table:table-cell office:value-type="float" office:value="1762.05" calcext:value-type="float">
            <text:p>1762.05</text:p>
          </table:table-cell>
          <table:table-cell office:value-type="float" office:value="1763.01" calcext:value-type="float">
            <text:p>1763.01</text:p>
          </table:table-cell>
          <table:table-cell office:value-type="float" office:value="259.8189" calcext:value-type="float">
            <text:p>259.818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string" calcext:value-type="string">
            <text:p>2026-07-04T13:57:09.772Z</text:p>
          </table:table-cell>
          <table:table-cell office:value-type="float" office:value="62573.99" calcext:value-type="float">
            <text:p>62573.99</text:p>
          </table:table-cell>
          <table:table-cell office:value-type="float" office:value="62574" calcext:value-type="float">
            <text:p>62574</text:p>
          </table:table-cell>
          <table:table-cell office:value-type="float" office:value="62556.34" calcext:value-type="float">
            <text:p>62556.34</text:p>
          </table:table-cell>
          <table:table-cell office:value-type="float" office:value="62569.26" calcext:value-type="float">
            <text:p>62569.26</text:p>
          </table:table-cell>
          <table:table-cell office:value-type="float" office:value="13.28064" calcext:value-type="float">
            <text:p>13.28064</text:p>
          </table:table-cell>
          <table:table-cell office:value-type="float" office:value="3336" calcext:value-type="float">
            <text:p>3336</text:p>
          </table:table-cell>
          <table:table-cell office:value-type="float" office:value="1763.07" calcext:value-type="float">
            <text:p>1763.07</text:p>
          </table:table-cell>
          <table:table-cell office:value-type="float" office:value="1763.59" calcext:value-type="float">
            <text:p>1763.59</text:p>
          </table:table-cell>
          <table:table-cell office:value-type="float" office:value="1761.98" calcext:value-type="float">
            <text:p>1761.98</text:p>
          </table:table-cell>
          <table:table-cell office:value-type="float" office:value="1762.71" calcext:value-type="float">
            <text:p>1762.71</text:p>
          </table:table-cell>
          <table:table-cell office:value-type="float" office:value="211.8192" calcext:value-type="float">
            <text:p>211.8192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string" calcext:value-type="string">
            <text:p>2026-07-04T14:02:09.777Z</text:p>
          </table:table-cell>
          <table:table-cell office:value-type="float" office:value="62570.32" calcext:value-type="float">
            <text:p>62570.32</text:p>
          </table:table-cell>
          <table:table-cell office:value-type="float" office:value="62653.67" calcext:value-type="float">
            <text:p>62653.67</text:p>
          </table:table-cell>
          <table:table-cell office:value-type="float" office:value="62569.25" calcext:value-type="float">
            <text:p>62569.25</text:p>
          </table:table-cell>
          <table:table-cell office:value-type="float" office:value="62638.02" calcext:value-type="float">
            <text:p>62638.02</text:p>
          </table:table-cell>
          <table:table-cell office:value-type="float" office:value="12.06961" calcext:value-type="float">
            <text:p>12.06961</text:p>
          </table:table-cell>
          <table:table-cell office:value-type="float" office:value="5859" calcext:value-type="float">
            <text:p>5859</text:p>
          </table:table-cell>
          <table:table-cell office:value-type="float" office:value="1762.79" calcext:value-type="float">
            <text:p>1762.79</text:p>
          </table:table-cell>
          <table:table-cell office:value-type="float" office:value="1768.29" calcext:value-type="float">
            <text:p>1768.29</text:p>
          </table:table-cell>
          <table:table-cell office:value-type="float" office:value="1762.7" calcext:value-type="float">
            <text:p>1762.7</text:p>
          </table:table-cell>
          <table:table-cell office:value-type="float" office:value="1767.16" calcext:value-type="float">
            <text:p>1767.16</text:p>
          </table:table-cell>
          <table:table-cell office:value-type="float" office:value="805.443" calcext:value-type="float">
            <text:p>805.443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string" calcext:value-type="string">
            <text:p>2026-07-04T14:07:09.782Z</text:p>
          </table:table-cell>
          <table:table-cell office:value-type="float" office:value="62638" calcext:value-type="float">
            <text:p>62638</text:p>
          </table:table-cell>
          <table:table-cell office:value-type="float" office:value="62638.25" calcext:value-type="float">
            <text:p>62638.25</text:p>
          </table:table-cell>
          <table:table-cell office:value-type="float" office:value="62612.72" calcext:value-type="float">
            <text:p>62612.72</text:p>
          </table:table-cell>
          <table:table-cell office:value-type="float" office:value="62633.99" calcext:value-type="float">
            <text:p>62633.99</text:p>
          </table:table-cell>
          <table:table-cell office:value-type="float" office:value="9.98477" calcext:value-type="float">
            <text:p>9.98477</text:p>
          </table:table-cell>
          <table:table-cell office:value-type="float" office:value="3515" calcext:value-type="float">
            <text:p>3515</text:p>
          </table:table-cell>
          <table:table-cell office:value-type="float" office:value="1767.15" calcext:value-type="float">
            <text:p>1767.15</text:p>
          </table:table-cell>
          <table:table-cell office:value-type="float" office:value="1768.29" calcext:value-type="float">
            <text:p>1768.29</text:p>
          </table:table-cell>
          <table:table-cell office:value-type="float" office:value="1766.67" calcext:value-type="float">
            <text:p>1766.67</text:p>
          </table:table-cell>
          <table:table-cell office:value-type="float" office:value="1768.28" calcext:value-type="float">
            <text:p>1768.28</text:p>
          </table:table-cell>
          <table:table-cell office:value-type="float" office:value="289.5967" calcext:value-type="float">
            <text:p>289.5967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2026-07-04T14:12:09.787Z</text:p>
          </table:table-cell>
          <table:table-cell office:value-type="float" office:value="62612.73" calcext:value-type="float">
            <text:p>62612.73</text:p>
          </table:table-cell>
          <table:table-cell office:value-type="float" office:value="62684.32" calcext:value-type="float">
            <text:p>62684.32</text:p>
          </table:table-cell>
          <table:table-cell office:value-type="float" office:value="62600.09" calcext:value-type="float">
            <text:p>62600.09</text:p>
          </table:table-cell>
          <table:table-cell office:value-type="float" office:value="62684.32" calcext:value-type="float">
            <text:p>62684.32</text:p>
          </table:table-cell>
          <table:table-cell office:value-type="float" office:value="15.01271" calcext:value-type="float">
            <text:p>15.01271</text:p>
          </table:table-cell>
          <table:table-cell office:value-type="float" office:value="6429" calcext:value-type="float">
            <text:p>6429</text:p>
          </table:table-cell>
          <table:table-cell office:value-type="float" office:value="1767.29" calcext:value-type="float">
            <text:p>1767.29</text:p>
          </table:table-cell>
          <table:table-cell office:value-type="float" office:value="1772.69" calcext:value-type="float">
            <text:p>1772.69</text:p>
          </table:table-cell>
          <table:table-cell office:value-type="float" office:value="1766.88" calcext:value-type="float">
            <text:p>1766.88</text:p>
          </table:table-cell>
          <table:table-cell office:value-type="float" office:value="1772.25" calcext:value-type="float">
            <text:p>1772.25</text:p>
          </table:table-cell>
          <table:table-cell office:value-type="float" office:value="1620.6033" calcext:value-type="float">
            <text:p>1620.6033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string" calcext:value-type="string">
            <text:p>2026-07-04T14:17:09.792Z</text:p>
          </table:table-cell>
          <table:table-cell office:value-type="float" office:value="62656" calcext:value-type="float">
            <text:p>62656</text:p>
          </table:table-cell>
          <table:table-cell office:value-type="float" office:value="62738.28" calcext:value-type="float">
            <text:p>62738.28</text:p>
          </table:table-cell>
          <table:table-cell office:value-type="float" office:value="62656" calcext:value-type="float">
            <text:p>62656</text:p>
          </table:table-cell>
          <table:table-cell office:value-type="float" office:value="62710.82" calcext:value-type="float">
            <text:p>62710.82</text:p>
          </table:table-cell>
          <table:table-cell office:value-type="float" office:value="22.32142" calcext:value-type="float">
            <text:p>22.32142</text:p>
          </table:table-cell>
          <table:table-cell office:value-type="float" office:value="8857" calcext:value-type="float">
            <text:p>8857</text:p>
          </table:table-cell>
          <table:table-cell office:value-type="float" office:value="1771.52" calcext:value-type="float">
            <text:p>1771.52</text:p>
          </table:table-cell>
          <table:table-cell office:value-type="float" office:value="1775" calcext:value-type="float">
            <text:p>1775</text:p>
          </table:table-cell>
          <table:table-cell office:value-type="float" office:value="1770" calcext:value-type="float">
            <text:p>1770</text:p>
          </table:table-cell>
          <table:table-cell office:value-type="float" office:value="1773.8" calcext:value-type="float">
            <text:p>1773.8</text:p>
          </table:table-cell>
          <table:table-cell office:value-type="float" office:value="1013.2648" calcext:value-type="float">
            <text:p>1013.2648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string" calcext:value-type="string">
            <text:p>2026-07-04T14:22:09.797Z</text:p>
          </table:table-cell>
          <table:table-cell office:value-type="float" office:value="62722.96" calcext:value-type="float">
            <text:p>62722.96</text:p>
          </table:table-cell>
          <table:table-cell office:value-type="float" office:value="62722.97" calcext:value-type="float">
            <text:p>62722.97</text:p>
          </table:table-cell>
          <table:table-cell office:value-type="float" office:value="62638" calcext:value-type="float">
            <text:p>62638</text:p>
          </table:table-cell>
          <table:table-cell office:value-type="float" office:value="62644.76" calcext:value-type="float">
            <text:p>62644.76</text:p>
          </table:table-cell>
          <table:table-cell office:value-type="float" office:value="41.31309" calcext:value-type="float">
            <text:p>41.31309</text:p>
          </table:table-cell>
          <table:table-cell office:value-type="float" office:value="7575" calcext:value-type="float">
            <text:p>7575</text:p>
          </table:table-cell>
          <table:table-cell office:value-type="float" office:value="1773.9" calcext:value-type="float">
            <text:p>1773.9</text:p>
          </table:table-cell>
          <table:table-cell office:value-type="float" office:value="1774.19" calcext:value-type="float">
            <text:p>1774.19</text:p>
          </table:table-cell>
          <table:table-cell office:value-type="float" office:value="1769.04" calcext:value-type="float">
            <text:p>1769.04</text:p>
          </table:table-cell>
          <table:table-cell office:value-type="float" office:value="1769.87" calcext:value-type="float">
            <text:p>1769.87</text:p>
          </table:table-cell>
          <table:table-cell office:value-type="float" office:value="985.4743" calcext:value-type="float">
            <text:p>985.4743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string" calcext:value-type="string">
            <text:p>2026-07-04T14:27:09.798Z</text:p>
          </table:table-cell>
          <table:table-cell office:value-type="float" office:value="62644.77" calcext:value-type="float">
            <text:p>62644.77</text:p>
          </table:table-cell>
          <table:table-cell office:value-type="float" office:value="62685.28" calcext:value-type="float">
            <text:p>62685.28</text:p>
          </table:table-cell>
          <table:table-cell office:value-type="float" office:value="62644.76" calcext:value-type="float">
            <text:p>62644.76</text:p>
          </table:table-cell>
          <table:table-cell office:value-type="float" office:value="62673.84" calcext:value-type="float">
            <text:p>62673.84</text:p>
          </table:table-cell>
          <table:table-cell office:value-type="float" office:value="11.13964" calcext:value-type="float">
            <text:p>11.13964</text:p>
          </table:table-cell>
          <table:table-cell office:value-type="float" office:value="4967" calcext:value-type="float">
            <text:p>4967</text:p>
          </table:table-cell>
          <table:table-cell office:value-type="float" office:value="1770.01" calcext:value-type="float">
            <text:p>1770.01</text:p>
          </table:table-cell>
          <table:table-cell office:value-type="float" office:value="1773.01" calcext:value-type="float">
            <text:p>1773.01</text:p>
          </table:table-cell>
          <table:table-cell office:value-type="float" office:value="1769.85" calcext:value-type="float">
            <text:p>1769.85</text:p>
          </table:table-cell>
          <table:table-cell office:value-type="float" office:value="1771.72" calcext:value-type="float">
            <text:p>1771.72</text:p>
          </table:table-cell>
          <table:table-cell office:value-type="float" office:value="937.7893" calcext:value-type="float">
            <text:p>937.7893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string" calcext:value-type="string">
            <text:p>2026-07-04T14:32:09.803Z</text:p>
          </table:table-cell>
          <table:table-cell office:value-type="float" office:value="62673.84" calcext:value-type="float">
            <text:p>62673.84</text:p>
          </table:table-cell>
          <table:table-cell office:value-type="float" office:value="62677.54" calcext:value-type="float">
            <text:p>62677.54</text:p>
          </table:table-cell>
          <table:table-cell table:number-columns-repeated="2" office:value-type="float" office:value="62635.27" calcext:value-type="float">
            <text:p>62635.27</text:p>
          </table:table-cell>
          <table:table-cell office:value-type="float" office:value="26.8622" calcext:value-type="float">
            <text:p>26.8622</text:p>
          </table:table-cell>
          <table:table-cell office:value-type="float" office:value="3766" calcext:value-type="float">
            <text:p>3766</text:p>
          </table:table-cell>
          <table:table-cell office:value-type="float" office:value="1771.56" calcext:value-type="float">
            <text:p>1771.56</text:p>
          </table:table-cell>
          <table:table-cell office:value-type="float" office:value="1772.23" calcext:value-type="float">
            <text:p>1772.23</text:p>
          </table:table-cell>
          <table:table-cell office:value-type="float" office:value="1768.9" calcext:value-type="float">
            <text:p>1768.9</text:p>
          </table:table-cell>
          <table:table-cell office:value-type="float" office:value="1769.02" calcext:value-type="float">
            <text:p>1769.02</text:p>
          </table:table-cell>
          <table:table-cell office:value-type="float" office:value="417.9731" calcext:value-type="float">
            <text:p>417.9731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string" calcext:value-type="string">
            <text:p>2026-07-04T14:37:09.807Z</text:p>
          </table:table-cell>
          <table:table-cell office:value-type="float" office:value="62643.7" calcext:value-type="float">
            <text:p>62643.7</text:p>
          </table:table-cell>
          <table:table-cell office:value-type="float" office:value="62661.53" calcext:value-type="float">
            <text:p>62661.53</text:p>
          </table:table-cell>
          <table:table-cell office:value-type="float" office:value="62630.6" calcext:value-type="float">
            <text:p>62630.6</text:p>
          </table:table-cell>
          <table:table-cell office:value-type="float" office:value="62647.84" calcext:value-type="float">
            <text:p>62647.84</text:p>
          </table:table-cell>
          <table:table-cell office:value-type="float" office:value="20.54095" calcext:value-type="float">
            <text:p>20.54095</text:p>
          </table:table-cell>
          <table:table-cell office:value-type="float" office:value="5059" calcext:value-type="float">
            <text:p>5059</text:p>
          </table:table-cell>
          <table:table-cell office:value-type="float" office:value="1769.6" calcext:value-type="float">
            <text:p>1769.6</text:p>
          </table:table-cell>
          <table:table-cell office:value-type="float" office:value="1770.62" calcext:value-type="float">
            <text:p>1770.62</text:p>
          </table:table-cell>
          <table:table-cell office:value-type="float" office:value="1768.9" calcext:value-type="float">
            <text:p>1768.9</text:p>
          </table:table-cell>
          <table:table-cell office:value-type="float" office:value="1769.61" calcext:value-type="float">
            <text:p>1769.61</text:p>
          </table:table-cell>
          <table:table-cell office:value-type="float" office:value="378.3027" calcext:value-type="float">
            <text:p>378.3027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string" calcext:value-type="string">
            <text:p>2026-07-04T14:42:09.811Z</text:p>
          </table:table-cell>
          <table:table-cell office:value-type="float" office:value="62647.84" calcext:value-type="float">
            <text:p>62647.84</text:p>
          </table:table-cell>
          <table:table-cell office:value-type="float" office:value="62676.83" calcext:value-type="float">
            <text:p>62676.83</text:p>
          </table:table-cell>
          <table:table-cell office:value-type="float" office:value="62627.09" calcext:value-type="float">
            <text:p>62627.09</text:p>
          </table:table-cell>
          <table:table-cell office:value-type="float" office:value="62664.01" calcext:value-type="float">
            <text:p>62664.01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4969" calcext:value-type="float">
            <text:p>4969</text:p>
          </table:table-cell>
          <table:table-cell office:value-type="float" office:value="1769.61" calcext:value-type="float">
            <text:p>1769.61</text:p>
          </table:table-cell>
          <table:table-cell office:value-type="float" office:value="1770.76" calcext:value-type="float">
            <text:p>1770.76</text:p>
          </table:table-cell>
          <table:table-cell office:value-type="float" office:value="1768.35" calcext:value-type="float">
            <text:p>1768.35</text:p>
          </table:table-cell>
          <table:table-cell office:value-type="float" office:value="1769.85" calcext:value-type="float">
            <text:p>1769.85</text:p>
          </table:table-cell>
          <table:table-cell office:value-type="float" office:value="270.064" calcext:value-type="float">
            <text:p>270.064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2026-07-04T14:47:09.814Z</text:p>
          </table:table-cell>
          <table:table-cell office:value-type="float" office:value="62674.36" calcext:value-type="float">
            <text:p>62674.36</text:p>
          </table:table-cell>
          <table:table-cell office:value-type="float" office:value="62696" calcext:value-type="float">
            <text:p>62696</text:p>
          </table:table-cell>
          <table:table-cell office:value-type="float" office:value="62664" calcext:value-type="float">
            <text:p>62664</text:p>
          </table:table-cell>
          <table:table-cell office:value-type="float" office:value="62696" calcext:value-type="float">
            <text:p>62696</text:p>
          </table:table-cell>
          <table:table-cell office:value-type="float" office:value="8.09924" calcext:value-type="float">
            <text:p>8.09924</text:p>
          </table:table-cell>
          <table:table-cell office:value-type="float" office:value="4412" calcext:value-type="float">
            <text:p>4412</text:p>
          </table:table-cell>
          <table:table-cell office:value-type="float" office:value="1770.32" calcext:value-type="float">
            <text:p>1770.32</text:p>
          </table:table-cell>
          <table:table-cell office:value-type="float" office:value="1771.31" calcext:value-type="float">
            <text:p>1771.31</text:p>
          </table:table-cell>
          <table:table-cell office:value-type="float" office:value="1769.82" calcext:value-type="float">
            <text:p>1769.82</text:p>
          </table:table-cell>
          <table:table-cell office:value-type="float" office:value="1771.07" calcext:value-type="float">
            <text:p>1771.07</text:p>
          </table:table-cell>
          <table:table-cell office:value-type="float" office:value="258.1933" calcext:value-type="float">
            <text:p>258.1933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2026-07-04T14:52:09.814Z</text:p>
          </table:table-cell>
          <table:table-cell office:value-type="float" office:value="62692" calcext:value-type="float">
            <text:p>62692</text:p>
          </table:table-cell>
          <table:table-cell office:value-type="float" office:value="62713.67" calcext:value-type="float">
            <text:p>62713.67</text:p>
          </table:table-cell>
          <table:table-cell office:value-type="float" office:value="62664" calcext:value-type="float">
            <text:p>62664</text:p>
          </table:table-cell>
          <table:table-cell office:value-type="float" office:value="62672.4" calcext:value-type="float">
            <text:p>62672.4</text:p>
          </table:table-cell>
          <table:table-cell office:value-type="float" office:value="25.15233" calcext:value-type="float">
            <text:p>25.15233</text:p>
          </table:table-cell>
          <table:table-cell office:value-type="float" office:value="5604" calcext:value-type="float">
            <text:p>5604</text:p>
          </table:table-cell>
          <table:table-cell office:value-type="float" office:value="1771.06" calcext:value-type="float">
            <text:p>1771.06</text:p>
          </table:table-cell>
          <table:table-cell office:value-type="float" office:value="1772" calcext:value-type="float">
            <text:p>1772</text:p>
          </table:table-cell>
          <table:table-cell office:value-type="float" office:value="1769.03" calcext:value-type="float">
            <text:p>1769.03</text:p>
          </table:table-cell>
          <table:table-cell office:value-type="float" office:value="1770.04" calcext:value-type="float">
            <text:p>1770.04</text:p>
          </table:table-cell>
          <table:table-cell office:value-type="float" office:value="269.8317" calcext:value-type="float">
            <text:p>269.8317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2026-07-04T14:57:09.818Z</text:p>
          </table:table-cell>
          <table:table-cell office:value-type="float" office:value="62674.47" calcext:value-type="float">
            <text:p>62674.47</text:p>
          </table:table-cell>
          <table:table-cell office:value-type="float" office:value="62690" calcext:value-type="float">
            <text:p>62690</text:p>
          </table:table-cell>
          <table:table-cell office:value-type="float" office:value="62656" calcext:value-type="float">
            <text:p>62656</text:p>
          </table:table-cell>
          <table:table-cell office:value-type="float" office:value="62665.95" calcext:value-type="float">
            <text:p>62665.95</text:p>
          </table:table-cell>
          <table:table-cell office:value-type="float" office:value="13.78938" calcext:value-type="float">
            <text:p>13.78938</text:p>
          </table:table-cell>
          <table:table-cell office:value-type="float" office:value="4006" calcext:value-type="float">
            <text:p>4006</text:p>
          </table:table-cell>
          <table:table-cell office:value-type="float" office:value="1770.21" calcext:value-type="float">
            <text:p>1770.21</text:p>
          </table:table-cell>
          <table:table-cell office:value-type="float" office:value="1771" calcext:value-type="float">
            <text:p>1771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770.53" calcext:value-type="float">
            <text:p>1770.53</text:p>
          </table:table-cell>
          <table:table-cell office:value-type="float" office:value="296.1217" calcext:value-type="float">
            <text:p>296.1217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2026-07-04T15:02:09.821Z</text:p>
          </table:table-cell>
          <table:table-cell office:value-type="float" office:value="62665.95" calcext:value-type="float">
            <text:p>62665.95</text:p>
          </table:table-cell>
          <table:table-cell office:value-type="float" office:value="62716" calcext:value-type="float">
            <text:p>62716</text:p>
          </table:table-cell>
          <table:table-cell office:value-type="float" office:value="62658.93" calcext:value-type="float">
            <text:p>62658.93</text:p>
          </table:table-cell>
          <table:table-cell office:value-type="float" office:value="62709.28" calcext:value-type="float">
            <text:p>62709.28</text:p>
          </table:table-cell>
          <table:table-cell office:value-type="float" office:value="23.1195" calcext:value-type="float">
            <text:p>23.1195</text:p>
          </table:table-cell>
          <table:table-cell office:value-type="float" office:value="7042" calcext:value-type="float">
            <text:p>7042</text:p>
          </table:table-cell>
          <table:table-cell office:value-type="float" office:value="1770.52" calcext:value-type="float">
            <text:p>1770.52</text:p>
          </table:table-cell>
          <table:table-cell office:value-type="float" office:value="1774.06" calcext:value-type="float">
            <text:p>1774.06</text:p>
          </table:table-cell>
          <table:table-cell office:value-type="float" office:value="1770.42" calcext:value-type="float">
            <text:p>1770.42</text:p>
          </table:table-cell>
          <table:table-cell office:value-type="float" office:value="1773.64" calcext:value-type="float">
            <text:p>1773.64</text:p>
          </table:table-cell>
          <table:table-cell office:value-type="float" office:value="486.634" calcext:value-type="float">
            <text:p>486.634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string" calcext:value-type="string">
            <text:p>2026-07-04T15:07:09.825Z</text:p>
          </table:table-cell>
          <table:table-cell office:value-type="float" office:value="62708.45" calcext:value-type="float">
            <text:p>62708.45</text:p>
          </table:table-cell>
          <table:table-cell office:value-type="float" office:value="62745.06" calcext:value-type="float">
            <text:p>62745.06</text:p>
          </table:table-cell>
          <table:table-cell office:value-type="float" office:value="62687.89" calcext:value-type="float">
            <text:p>62687.89</text:p>
          </table:table-cell>
          <table:table-cell office:value-type="float" office:value="62690.79" calcext:value-type="float">
            <text:p>62690.79</text:p>
          </table:table-cell>
          <table:table-cell office:value-type="float" office:value="30.25188" calcext:value-type="float">
            <text:p>30.25188</text:p>
          </table:table-cell>
          <table:table-cell office:value-type="float" office:value="6394" calcext:value-type="float">
            <text:p>6394</text:p>
          </table:table-cell>
          <table:table-cell office:value-type="float" office:value="1773.13" calcext:value-type="float">
            <text:p>1773.13</text:p>
          </table:table-cell>
          <table:table-cell office:value-type="float" office:value="1776.56" calcext:value-type="float">
            <text:p>1776.56</text:p>
          </table:table-cell>
          <table:table-cell office:value-type="float" office:value="1772.34" calcext:value-type="float">
            <text:p>1772.34</text:p>
          </table:table-cell>
          <table:table-cell office:value-type="float" office:value="1774.27" calcext:value-type="float">
            <text:p>1774.27</text:p>
          </table:table-cell>
          <table:table-cell office:value-type="float" office:value="525.0146" calcext:value-type="float">
            <text:p>525.0146</text:p>
          </table:table-cell>
          <table:table-cell office:value-type="float" office:value="12729" calcext:value-type="float">
            <text:p>12729</text:p>
          </table:table-cell>
        </table:table-row>
        <table:table-row table:style-name="ro1">
          <table:table-cell office:value-type="string" calcext:value-type="string">
            <text:p>2026-07-04T15:12:09.828Z</text:p>
          </table:table-cell>
          <table:table-cell office:value-type="float" office:value="62704.39" calcext:value-type="float">
            <text:p>62704.39</text:p>
          </table:table-cell>
          <table:table-cell office:value-type="float" office:value="63075.46" calcext:value-type="float">
            <text:p>63075.46</text:p>
          </table:table-cell>
          <table:table-cell office:value-type="float" office:value="62687.89" calcext:value-type="float">
            <text:p>62687.89</text:p>
          </table:table-cell>
          <table:table-cell office:value-type="float" office:value="62844" calcext:value-type="float">
            <text:p>62844</text:p>
          </table:table-cell>
          <table:table-cell office:value-type="float" office:value="252.81429" calcext:value-type="float">
            <text:p>252.81429</text:p>
          </table:table-cell>
          <table:table-cell office:value-type="float" office:value="38779" calcext:value-type="float">
            <text:p>38779</text:p>
          </table:table-cell>
          <table:table-cell office:value-type="float" office:value="1774.7" calcext:value-type="float">
            <text:p>1774.7</text:p>
          </table:table-cell>
          <table:table-cell office:value-type="float" office:value="1799.92" calcext:value-type="float">
            <text:p>1799.92</text:p>
          </table:table-cell>
          <table:table-cell office:value-type="float" office:value="1773.99" calcext:value-type="float">
            <text:p>1773.99</text:p>
          </table:table-cell>
          <table:table-cell office:value-type="float" office:value="1787.28" calcext:value-type="float">
            <text:p>1787.28</text:p>
          </table:table-cell>
          <table:table-cell office:value-type="float" office:value="13445.218" calcext:value-type="float">
            <text:p>13445.218</text:p>
          </table:table-cell>
          <table:table-cell office:value-type="float" office:value="63726" calcext:value-type="float">
            <text:p>63726</text:p>
          </table:table-cell>
        </table:table-row>
        <table:table-row table:style-name="ro1">
          <table:table-cell office:value-type="string" calcext:value-type="string">
            <text:p>2026-07-04T15:17:09.831Z</text:p>
          </table:table-cell>
          <table:table-cell office:value-type="float" office:value="62825.99" calcext:value-type="float">
            <text:p>62825.99</text:p>
          </table:table-cell>
          <table:table-cell office:value-type="float" office:value="62856" calcext:value-type="float">
            <text:p>62856</text:p>
          </table:table-cell>
          <table:table-cell office:value-type="float" office:value="62760.01" calcext:value-type="float">
            <text:p>62760.01</text:p>
          </table:table-cell>
          <table:table-cell office:value-type="float" office:value="62816.29" calcext:value-type="float">
            <text:p>62816.29</text:p>
          </table:table-cell>
          <table:table-cell office:value-type="float" office:value="57.48029" calcext:value-type="float">
            <text:p>57.48029</text:p>
          </table:table-cell>
          <table:table-cell office:value-type="float" office:value="16100" calcext:value-type="float">
            <text:p>16100</text:p>
          </table:table-cell>
          <table:table-cell office:value-type="float" office:value="1786.39" calcext:value-type="float">
            <text:p>1786.39</text:p>
          </table:table-cell>
          <table:table-cell office:value-type="float" office:value="1788.07" calcext:value-type="float">
            <text:p>1788.07</text:p>
          </table:table-cell>
          <table:table-cell office:value-type="float" office:value="1783.02" calcext:value-type="float">
            <text:p>1783.02</text:p>
          </table:table-cell>
          <table:table-cell office:value-type="float" office:value="1787.03" calcext:value-type="float">
            <text:p>1787.03</text:p>
          </table:table-cell>
          <table:table-cell office:value-type="float" office:value="1341.4014" calcext:value-type="float">
            <text:p>1341.4014</text:p>
          </table:table-cell>
          <table:table-cell office:value-type="float" office:value="23984" calcext:value-type="float">
            <text:p>23984</text:p>
          </table:table-cell>
        </table:table-row>
        <table:table-row table:style-name="ro1">
          <table:table-cell office:value-type="string" calcext:value-type="string">
            <text:p>2026-07-04T15:22:09.834Z</text:p>
          </table:table-cell>
          <table:table-cell office:value-type="float" office:value="62822" calcext:value-type="float">
            <text:p>62822</text:p>
          </table:table-cell>
          <table:table-cell office:value-type="float" office:value="62869.35" calcext:value-type="float">
            <text:p>62869.35</text:p>
          </table:table-cell>
          <table:table-cell office:value-type="float" office:value="62776" calcext:value-type="float">
            <text:p>62776</text:p>
          </table:table-cell>
          <table:table-cell office:value-type="float" office:value="62825.53" calcext:value-type="float">
            <text:p>62825.53</text:p>
          </table:table-cell>
          <table:table-cell office:value-type="float" office:value="37.22333" calcext:value-type="float">
            <text:p>37.22333</text:p>
          </table:table-cell>
          <table:table-cell office:value-type="float" office:value="10505" calcext:value-type="float">
            <text:p>10505</text:p>
          </table:table-cell>
          <table:table-cell office:value-type="float" office:value="1787.13" calcext:value-type="float">
            <text:p>1787.13</text:p>
          </table:table-cell>
          <table:table-cell office:value-type="float" office:value="1792.74" calcext:value-type="float">
            <text:p>1792.74</text:p>
          </table:table-cell>
          <table:table-cell office:value-type="float" office:value="1785" calcext:value-type="float">
            <text:p>1785</text:p>
          </table:table-cell>
          <table:table-cell office:value-type="float" office:value="1789.59" calcext:value-type="float">
            <text:p>1789.59</text:p>
          </table:table-cell>
          <table:table-cell office:value-type="float" office:value="1545.3707" calcext:value-type="float">
            <text:p>1545.3707</text:p>
          </table:table-cell>
          <table:table-cell office:value-type="float" office:value="16911" calcext:value-type="float">
            <text:p>16911</text:p>
          </table:table-cell>
        </table:table-row>
        <table:table-row table:style-name="ro1">
          <table:table-cell office:value-type="string" calcext:value-type="string">
            <text:p>2026-07-04T15:27:09.837Z</text:p>
          </table:table-cell>
          <table:table-cell office:value-type="float" office:value="62836.52" calcext:value-type="float">
            <text:p>62836.52</text:p>
          </table:table-cell>
          <table:table-cell office:value-type="float" office:value="62930" calcext:value-type="float">
            <text:p>62930</text:p>
          </table:table-cell>
          <table:table-cell office:value-type="float" office:value="62812" calcext:value-type="float">
            <text:p>62812</text:p>
          </table:table-cell>
          <table:table-cell office:value-type="float" office:value="62864.14" calcext:value-type="float">
            <text:p>62864.14</text:p>
          </table:table-cell>
          <table:table-cell office:value-type="float" office:value="54.11146" calcext:value-type="float">
            <text:p>54.11146</text:p>
          </table:table-cell>
          <table:table-cell office:value-type="float" office:value="15288" calcext:value-type="float">
            <text:p>15288</text:p>
          </table:table-cell>
          <table:table-cell office:value-type="float" office:value="1790.16" calcext:value-type="float">
            <text:p>1790.16</text:p>
          </table:table-cell>
          <table:table-cell office:value-type="float" office:value="1798.52" calcext:value-type="float">
            <text:p>1798.52</text:p>
          </table:table-cell>
          <table:table-cell office:value-type="float" office:value="1788.93" calcext:value-type="float">
            <text:p>1788.93</text:p>
          </table:table-cell>
          <table:table-cell office:value-type="float" office:value="1792.36" calcext:value-type="float">
            <text:p>1792.36</text:p>
          </table:table-cell>
          <table:table-cell office:value-type="float" office:value="2409.1057" calcext:value-type="float">
            <text:p>2409.1057</text:p>
          </table:table-cell>
          <table:table-cell office:value-type="float" office:value="22359" calcext:value-type="float">
            <text:p>22359</text:p>
          </table:table-cell>
        </table:table-row>
        <table:table-row table:style-name="ro1">
          <table:table-cell office:value-type="string" calcext:value-type="string">
            <text:p>2026-07-04T15:32:09.839Z</text:p>
          </table:table-cell>
          <table:table-cell office:value-type="float" office:value="62867.47" calcext:value-type="float">
            <text:p>62867.47</text:p>
          </table:table-cell>
          <table:table-cell office:value-type="float" office:value="62930" calcext:value-type="float">
            <text:p>62930</text:p>
          </table:table-cell>
          <table:table-cell office:value-type="float" office:value="62840" calcext:value-type="float">
            <text:p>62840</text:p>
          </table:table-cell>
          <table:table-cell office:value-type="float" office:value="62862.94" calcext:value-type="float">
            <text:p>62862.94</text:p>
          </table:table-cell>
          <table:table-cell office:value-type="float" office:value="47.93716" calcext:value-type="float">
            <text:p>47.93716</text:p>
          </table:table-cell>
          <table:table-cell office:value-type="float" office:value="11375" calcext:value-type="float">
            <text:p>11375</text:p>
          </table:table-cell>
          <table:table-cell office:value-type="float" office:value="1792.8" calcext:value-type="float">
            <text:p>1792.8</text:p>
          </table:table-cell>
          <table:table-cell office:value-type="float" office:value="1794.87" calcext:value-type="float">
            <text:p>1794.87</text:p>
          </table:table-cell>
          <table:table-cell office:value-type="float" office:value="1790" calcext:value-type="float">
            <text:p>1790</text:p>
          </table:table-cell>
          <table:table-cell office:value-type="float" office:value="1790.01" calcext:value-type="float">
            <text:p>1790.01</text:p>
          </table:table-cell>
          <table:table-cell office:value-type="float" office:value="1253.7521" calcext:value-type="float">
            <text:p>1253.7521</text:p>
          </table:table-cell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string" calcext:value-type="string">
            <text:p>2026-07-04T15:37:09.841Z</text:p>
          </table:table-cell>
          <table:table-cell office:value-type="float" office:value="62874.22" calcext:value-type="float">
            <text:p>62874.22</text:p>
          </table:table-cell>
          <table:table-cell office:value-type="float" office:value="63006" calcext:value-type="float">
            <text:p>63006</text:p>
          </table:table-cell>
          <table:table-cell office:value-type="float" office:value="62862" calcext:value-type="float">
            <text:p>62862</text:p>
          </table:table-cell>
          <table:table-cell office:value-type="float" office:value="62917.1" calcext:value-type="float">
            <text:p>62917.1</text:p>
          </table:table-cell>
          <table:table-cell office:value-type="float" office:value="78.18448" calcext:value-type="float">
            <text:p>78.18448</text:p>
          </table:table-cell>
          <table:table-cell office:value-type="float" office:value="12874" calcext:value-type="float">
            <text:p>12874</text:p>
          </table:table-cell>
          <table:table-cell office:value-type="float" office:value="1791.06" calcext:value-type="float">
            <text:p>1791.06</text:p>
          </table:table-cell>
          <table:table-cell office:value-type="float" office:value="1796.31" calcext:value-type="float">
            <text:p>1796.31</text:p>
          </table:table-cell>
          <table:table-cell office:value-type="float" office:value="1790" calcext:value-type="float">
            <text:p>1790</text:p>
          </table:table-cell>
          <table:table-cell office:value-type="float" office:value="1792.19" calcext:value-type="float">
            <text:p>1792.19</text:p>
          </table:table-cell>
          <table:table-cell office:value-type="float" office:value="1563.5861" calcext:value-type="float">
            <text:p>1563.5861</text:p>
          </table:table-cell>
          <table:table-cell office:value-type="float" office:value="13712" calcext:value-type="float">
            <text:p>13712</text:p>
          </table:table-cell>
        </table:table-row>
        <table:table-row table:style-name="ro1">
          <table:table-cell office:value-type="string" calcext:value-type="string">
            <text:p>2026-07-04T15:42:09.843Z</text:p>
          </table:table-cell>
          <table:table-cell table:number-columns-repeated="2" office:value-type="float" office:value="62919.99" calcext:value-type="float">
            <text:p>62919.99</text:p>
          </table:table-cell>
          <table:table-cell office:value-type="float" office:value="62868" calcext:value-type="float">
            <text:p>62868</text:p>
          </table:table-cell>
          <table:table-cell office:value-type="float" office:value="62903.22" calcext:value-type="float">
            <text:p>62903.22</text:p>
          </table:table-cell>
          <table:table-cell office:value-type="float" office:value="51.77891" calcext:value-type="float">
            <text:p>51.77891</text:p>
          </table:table-cell>
          <table:table-cell office:value-type="float" office:value="9435" calcext:value-type="float">
            <text:p>9435</text:p>
          </table:table-cell>
          <table:table-cell table:number-columns-repeated="2" office:value-type="float" office:value="1792.52" calcext:value-type="float">
            <text:p>1792.52</text:p>
          </table:table-cell>
          <table:table-cell office:value-type="float" office:value="1788.54" calcext:value-type="float">
            <text:p>1788.54</text:p>
          </table:table-cell>
          <table:table-cell office:value-type="float" office:value="1790" calcext:value-type="float">
            <text:p>1790</text:p>
          </table:table-cell>
          <table:table-cell office:value-type="float" office:value="1123.3487" calcext:value-type="float">
            <text:p>1123.3487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string" calcext:value-type="string">
            <text:p>2026-07-04T15:47:09.844Z</text:p>
          </table:table-cell>
          <table:table-cell office:value-type="float" office:value="62909.51" calcext:value-type="float">
            <text:p>62909.51</text:p>
          </table:table-cell>
          <table:table-cell office:value-type="float" office:value="62972" calcext:value-type="float">
            <text:p>62972</text:p>
          </table:table-cell>
          <table:table-cell office:value-type="float" office:value="62898" calcext:value-type="float">
            <text:p>62898</text:p>
          </table:table-cell>
          <table:table-cell office:value-type="float" office:value="62941.27" calcext:value-type="float">
            <text:p>62941.27</text:p>
          </table:table-cell>
          <table:table-cell office:value-type="float" office:value="71.7218" calcext:value-type="float">
            <text:p>71.7218</text:p>
          </table:table-cell>
          <table:table-cell office:value-type="float" office:value="6482" calcext:value-type="float">
            <text:p>6482</text:p>
          </table:table-cell>
          <table:table-cell office:value-type="float" office:value="1790.02" calcext:value-type="float">
            <text:p>1790.02</text:p>
          </table:table-cell>
          <table:table-cell office:value-type="float" office:value="1794.21" calcext:value-type="float">
            <text:p>1794.21</text:p>
          </table:table-cell>
          <table:table-cell office:value-type="float" office:value="1789.85" calcext:value-type="float">
            <text:p>1789.85</text:p>
          </table:table-cell>
          <table:table-cell office:value-type="float" office:value="1792.82" calcext:value-type="float">
            <text:p>1792.82</text:p>
          </table:table-cell>
          <table:table-cell office:value-type="float" office:value="1181.0905" calcext:value-type="float">
            <text:p>1181.0905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2026-07-04T15:52:09.844Z</text:p>
          </table:table-cell>
          <table:table-cell office:value-type="float" office:value="62958.01" calcext:value-type="float">
            <text:p>62958.01</text:p>
          </table:table-cell>
          <table:table-cell office:value-type="float" office:value="63006" calcext:value-type="float">
            <text:p>63006</text:p>
          </table:table-cell>
          <table:table-cell table:number-columns-repeated="2" office:value-type="float" office:value="62871.42" calcext:value-type="float">
            <text:p>62871.42</text:p>
          </table:table-cell>
          <table:table-cell office:value-type="float" office:value="43.4126" calcext:value-type="float">
            <text:p>43.4126</text:p>
          </table:table-cell>
          <table:table-cell office:value-type="float" office:value="9136" calcext:value-type="float">
            <text:p>9136</text:p>
          </table:table-cell>
          <table:table-cell office:value-type="float" office:value="1793.29" calcext:value-type="float">
            <text:p>1793.29</text:p>
          </table:table-cell>
          <table:table-cell office:value-type="float" office:value="1795.43" calcext:value-type="float">
            <text:p>1795.43</text:p>
          </table:table-cell>
          <table:table-cell office:value-type="float" office:value="1790.27" calcext:value-type="float">
            <text:p>1790.27</text:p>
          </table:table-cell>
          <table:table-cell office:value-type="float" office:value="1790.52" calcext:value-type="float">
            <text:p>1790.52</text:p>
          </table:table-cell>
          <table:table-cell office:value-type="float" office:value="1283.0208" calcext:value-type="float">
            <text:p>1283.0208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string" calcext:value-type="string">
            <text:p>2026-07-04T15:57:09.846Z</text:p>
          </table:table-cell>
          <table:table-cell office:value-type="float" office:value="62874.01" calcext:value-type="float">
            <text:p>62874.01</text:p>
          </table:table-cell>
          <table:table-cell office:value-type="float" office:value="62948" calcext:value-type="float">
            <text:p>62948</text:p>
          </table:table-cell>
          <table:table-cell office:value-type="float" office:value="62867.3" calcext:value-type="float">
            <text:p>62867.3</text:p>
          </table:table-cell>
          <table:table-cell office:value-type="float" office:value="62935.67" calcext:value-type="float">
            <text:p>62935.67</text:p>
          </table:table-cell>
          <table:table-cell office:value-type="float" office:value="23.5745" calcext:value-type="float">
            <text:p>23.5745</text:p>
          </table:table-cell>
          <table:table-cell office:value-type="float" office:value="5178" calcext:value-type="float">
            <text:p>5178</text:p>
          </table:table-cell>
          <table:table-cell office:value-type="float" office:value="1791.16" calcext:value-type="float">
            <text:p>1791.16</text:p>
          </table:table-cell>
          <table:table-cell office:value-type="float" office:value="1793.05" calcext:value-type="float">
            <text:p>1793.05</text:p>
          </table:table-cell>
          <table:table-cell office:value-type="float" office:value="1789.82" calcext:value-type="float">
            <text:p>1789.82</text:p>
          </table:table-cell>
          <table:table-cell office:value-type="float" office:value="1791.78" calcext:value-type="float">
            <text:p>1791.78</text:p>
          </table:table-cell>
          <table:table-cell office:value-type="float" office:value="844.1549" calcext:value-type="float">
            <text:p>844.1549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2026-07-04T16:02:09.847Z</text:p>
          </table:table-cell>
          <table:table-cell office:value-type="float" office:value="62935.67" calcext:value-type="float">
            <text:p>62935.67</text:p>
          </table:table-cell>
          <table:table-cell office:value-type="float" office:value="62943.3" calcext:value-type="float">
            <text:p>62943.3</text:p>
          </table:table-cell>
          <table:table-cell office:value-type="float" office:value="62876" calcext:value-type="float">
            <text:p>62876</text:p>
          </table:table-cell>
          <table:table-cell office:value-type="float" office:value="62882.24" calcext:value-type="float">
            <text:p>62882.24</text:p>
          </table:table-cell>
          <table:table-cell office:value-type="float" office:value="52.73612" calcext:value-type="float">
            <text:p>52.73612</text:p>
          </table:table-cell>
          <table:table-cell office:value-type="float" office:value="7076" calcext:value-type="float">
            <text:p>7076</text:p>
          </table:table-cell>
          <table:table-cell office:value-type="float" office:value="1791.78" calcext:value-type="float">
            <text:p>1791.78</text:p>
          </table:table-cell>
          <table:table-cell office:value-type="float" office:value="1792.27" calcext:value-type="float">
            <text:p>1792.27</text:p>
          </table:table-cell>
          <table:table-cell office:value-type="float" office:value="1786.88" calcext:value-type="float">
            <text:p>1786.88</text:p>
          </table:table-cell>
          <table:table-cell office:value-type="float" office:value="1787.86" calcext:value-type="float">
            <text:p>1787.86</text:p>
          </table:table-cell>
          <table:table-cell office:value-type="float" office:value="1381.1142" calcext:value-type="float">
            <text:p>1381.1142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string" calcext:value-type="string">
            <text:p>2026-07-04T16:07:09.848Z</text:p>
          </table:table-cell>
          <table:table-cell office:value-type="float" office:value="62876.01" calcext:value-type="float">
            <text:p>62876.01</text:p>
          </table:table-cell>
          <table:table-cell office:value-type="float" office:value="62964" calcext:value-type="float">
            <text:p>62964</text:p>
          </table:table-cell>
          <table:table-cell office:value-type="float" office:value="62861.4" calcext:value-type="float">
            <text:p>62861.4</text:p>
          </table:table-cell>
          <table:table-cell office:value-type="float" office:value="62897.99" calcext:value-type="float">
            <text:p>62897.99</text:p>
          </table:table-cell>
          <table:table-cell office:value-type="float" office:value="42.82836" calcext:value-type="float">
            <text:p>42.82836</text:p>
          </table:table-cell>
          <table:table-cell office:value-type="float" office:value="10552" calcext:value-type="float">
            <text:p>10552</text:p>
          </table:table-cell>
          <table:table-cell office:value-type="float" office:value="1787.21" calcext:value-type="float">
            <text:p>1787.21</text:p>
          </table:table-cell>
          <table:table-cell office:value-type="float" office:value="1792" calcext:value-type="float">
            <text:p>1792</text:p>
          </table:table-cell>
          <table:table-cell office:value-type="float" office:value="1787.21" calcext:value-type="float">
            <text:p>1787.21</text:p>
          </table:table-cell>
          <table:table-cell office:value-type="float" office:value="1790.54" calcext:value-type="float">
            <text:p>1790.54</text:p>
          </table:table-cell>
          <table:table-cell office:value-type="float" office:value="1181.5826" calcext:value-type="float">
            <text:p>1181.5826</text:p>
          </table:table-cell>
          <table:table-cell office:value-type="float" office:value="18471" calcext:value-type="float">
            <text:p>18471</text:p>
          </table:table-cell>
        </table:table-row>
        <table:table-row table:style-name="ro1">
          <table:table-cell office:value-type="string" calcext:value-type="string">
            <text:p>2026-07-04T16:12:09.848Z</text:p>
          </table:table-cell>
          <table:table-cell office:value-type="float" office:value="62890" calcext:value-type="float">
            <text:p>62890</text:p>
          </table:table-cell>
          <table:table-cell office:value-type="float" office:value="62920" calcext:value-type="float">
            <text:p>62920</text:p>
          </table:table-cell>
          <table:table-cell office:value-type="float" office:value="62864" calcext:value-type="float">
            <text:p>62864</text:p>
          </table:table-cell>
          <table:table-cell office:value-type="float" office:value="62865.71" calcext:value-type="float">
            <text:p>62865.71</text:p>
          </table:table-cell>
          <table:table-cell office:value-type="float" office:value="22.29267" calcext:value-type="float">
            <text:p>22.29267</text:p>
          </table:table-cell>
          <table:table-cell office:value-type="float" office:value="6437" calcext:value-type="float">
            <text:p>6437</text:p>
          </table:table-cell>
          <table:table-cell office:value-type="float" office:value="1789.92" calcext:value-type="float">
            <text:p>1789.92</text:p>
          </table:table-cell>
          <table:table-cell office:value-type="float" office:value="1790.66" calcext:value-type="float">
            <text:p>1790.66</text:p>
          </table:table-cell>
          <table:table-cell office:value-type="float" office:value="1786.35" calcext:value-type="float">
            <text:p>1786.35</text:p>
          </table:table-cell>
          <table:table-cell office:value-type="float" office:value="1787.58" calcext:value-type="float">
            <text:p>1787.58</text:p>
          </table:table-cell>
          <table:table-cell office:value-type="float" office:value="792.9998" calcext:value-type="float">
            <text:p>792.9998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string" calcext:value-type="string">
            <text:p>2026-07-04T16:17:09.849Z</text:p>
          </table:table-cell>
          <table:table-cell table:number-columns-repeated="2" office:value-type="float" office:value="62865.72" calcext:value-type="float">
            <text:p>62865.72</text:p>
          </table:table-cell>
          <table:table-cell office:value-type="float" office:value="62786" calcext:value-type="float">
            <text:p>62786</text:p>
          </table:table-cell>
          <table:table-cell office:value-type="float" office:value="62798.87" calcext:value-type="float">
            <text:p>62798.87</text:p>
          </table:table-cell>
          <table:table-cell office:value-type="float" office:value="28.99451" calcext:value-type="float">
            <text:p>28.99451</text:p>
          </table:table-cell>
          <table:table-cell office:value-type="float" office:value="9321" calcext:value-type="float">
            <text:p>9321</text:p>
          </table:table-cell>
          <table:table-cell table:number-columns-repeated="2" office:value-type="float" office:value="1787.66" calcext:value-type="float">
            <text:p>1787.66</text:p>
          </table:table-cell>
          <table:table-cell office:value-type="float" office:value="1783.32" calcext:value-type="float">
            <text:p>1783.32</text:p>
          </table:table-cell>
          <table:table-cell office:value-type="float" office:value="1785.28" calcext:value-type="float">
            <text:p>1785.28</text:p>
          </table:table-cell>
          <table:table-cell office:value-type="float" office:value="1415.5864" calcext:value-type="float">
            <text:p>1415.5864</text:p>
          </table:table-cell>
          <table:table-cell office:value-type="float" office:value="17007" calcext:value-type="float">
            <text:p>17007</text:p>
          </table:table-cell>
        </table:table-row>
        <table:table-row table:style-name="ro1">
          <table:table-cell office:value-type="string" calcext:value-type="string">
            <text:p>2026-07-04T16:22:09.876Z</text:p>
          </table:table-cell>
          <table:table-cell office:value-type="float" office:value="62798.87" calcext:value-type="float">
            <text:p>62798.87</text:p>
          </table:table-cell>
          <table:table-cell office:value-type="float" office:value="62858" calcext:value-type="float">
            <text:p>62858</text:p>
          </table:table-cell>
          <table:table-cell office:value-type="float" office:value="62798.87" calcext:value-type="float">
            <text:p>62798.87</text:p>
          </table:table-cell>
          <table:table-cell office:value-type="float" office:value="62847.99" calcext:value-type="float">
            <text:p>62847.99</text:p>
          </table:table-cell>
          <table:table-cell office:value-type="float" office:value="34.46564" calcext:value-type="float">
            <text:p>34.46564</text:p>
          </table:table-cell>
          <table:table-cell office:value-type="float" office:value="5675" calcext:value-type="float">
            <text:p>5675</text:p>
          </table:table-cell>
          <table:table-cell office:value-type="float" office:value="1785.41" calcext:value-type="float">
            <text:p>1785.41</text:p>
          </table:table-cell>
          <table:table-cell office:value-type="float" office:value="1787.23" calcext:value-type="float">
            <text:p>1787.23</text:p>
          </table:table-cell>
          <table:table-cell office:value-type="float" office:value="1785.27" calcext:value-type="float">
            <text:p>1785.27</text:p>
          </table:table-cell>
          <table:table-cell office:value-type="float" office:value="1786.26" calcext:value-type="float">
            <text:p>1786.26</text:p>
          </table:table-cell>
          <table:table-cell office:value-type="float" office:value="590.3532" calcext:value-type="float">
            <text:p>590.3532</text:p>
          </table:table-cell>
          <table:table-cell office:value-type="float" office:value="9546" calcext:value-type="float">
            <text:p>9546</text:p>
          </table:table-cell>
        </table:table-row>
        <table:table-row table:style-name="ro1">
          <table:table-cell office:value-type="string" calcext:value-type="string">
            <text:p>2026-07-04T16:27:09.904Z</text:p>
          </table:table-cell>
          <table:table-cell office:value-type="float" office:value="62847.1" calcext:value-type="float">
            <text:p>62847.1</text:p>
          </table:table-cell>
          <table:table-cell office:value-type="float" office:value="62873.63" calcext:value-type="float">
            <text:p>62873.63</text:p>
          </table:table-cell>
          <table:table-cell office:value-type="float" office:value="62826" calcext:value-type="float">
            <text:p>62826</text:p>
          </table:table-cell>
          <table:table-cell office:value-type="float" office:value="62873.05" calcext:value-type="float">
            <text:p>62873.05</text:p>
          </table:table-cell>
          <table:table-cell office:value-type="float" office:value="34.87704" calcext:value-type="float">
            <text:p>34.87704</text:p>
          </table:table-cell>
          <table:table-cell office:value-type="float" office:value="8642" calcext:value-type="float">
            <text:p>8642</text:p>
          </table:table-cell>
          <table:table-cell office:value-type="float" office:value="1785.89" calcext:value-type="float">
            <text:p>1785.89</text:p>
          </table:table-cell>
          <table:table-cell office:value-type="float" office:value="1789.69" calcext:value-type="float">
            <text:p>1789.69</text:p>
          </table:table-cell>
          <table:table-cell office:value-type="float" office:value="1785.74" calcext:value-type="float">
            <text:p>1785.74</text:p>
          </table:table-cell>
          <table:table-cell office:value-type="float" office:value="1789.45" calcext:value-type="float">
            <text:p>1789.45</text:p>
          </table:table-cell>
          <table:table-cell office:value-type="float" office:value="948.8341" calcext:value-type="float">
            <text:p>948.8341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1">
          <table:table-cell office:value-type="string" calcext:value-type="string">
            <text:p>2026-07-04T16:32:09.934Z</text:p>
          </table:table-cell>
          <table:table-cell office:value-type="float" office:value="62863.99" calcext:value-type="float">
            <text:p>62863.99</text:p>
          </table:table-cell>
          <table:table-cell office:value-type="float" office:value="62915.61" calcext:value-type="float">
            <text:p>62915.61</text:p>
          </table:table-cell>
          <table:table-cell office:value-type="float" office:value="62863.99" calcext:value-type="float">
            <text:p>62863.99</text:p>
          </table:table-cell>
          <table:table-cell office:value-type="float" office:value="62906.18" calcext:value-type="float">
            <text:p>62906.18</text:p>
          </table:table-cell>
          <table:table-cell office:value-type="float" office:value="39.49801" calcext:value-type="float">
            <text:p>39.49801</text:p>
          </table:table-cell>
          <table:table-cell office:value-type="float" office:value="5970" calcext:value-type="float">
            <text:p>5970</text:p>
          </table:table-cell>
          <table:table-cell office:value-type="float" office:value="1788.91" calcext:value-type="float">
            <text:p>1788.91</text:p>
          </table:table-cell>
          <table:table-cell office:value-type="float" office:value="1790.19" calcext:value-type="float">
            <text:p>1790.19</text:p>
          </table:table-cell>
          <table:table-cell office:value-type="float" office:value="1787.28" calcext:value-type="float">
            <text:p>1787.28</text:p>
          </table:table-cell>
          <table:table-cell office:value-type="float" office:value="1790.19" calcext:value-type="float">
            <text:p>1790.19</text:p>
          </table:table-cell>
          <table:table-cell office:value-type="float" office:value="1017.7536" calcext:value-type="float">
            <text:p>1017.7536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2026-07-04T16:37:09.937Z</text:p>
          </table:table-cell>
          <table:table-cell office:value-type="float" office:value="62908.9" calcext:value-type="float">
            <text:p>62908.9</text:p>
          </table:table-cell>
          <table:table-cell office:value-type="float" office:value="62931.96" calcext:value-type="float">
            <text:p>62931.96</text:p>
          </table:table-cell>
          <table:table-cell office:value-type="float" office:value="62902.02" calcext:value-type="float">
            <text:p>62902.02</text:p>
          </table:table-cell>
          <table:table-cell office:value-type="float" office:value="62914.01" calcext:value-type="float">
            <text:p>62914.01</text:p>
          </table:table-cell>
          <table:table-cell office:value-type="float" office:value="40.74715" calcext:value-type="float">
            <text:p>40.74715</text:p>
          </table:table-cell>
          <table:table-cell office:value-type="float" office:value="5685" calcext:value-type="float">
            <text:p>5685</text:p>
          </table:table-cell>
          <table:table-cell office:value-type="float" office:value="1790.19" calcext:value-type="float">
            <text:p>1790.19</text:p>
          </table:table-cell>
          <table:table-cell office:value-type="float" office:value="1791.35" calcext:value-type="float">
            <text:p>1791.35</text:p>
          </table:table-cell>
          <table:table-cell office:value-type="float" office:value="1789.06" calcext:value-type="float">
            <text:p>1789.06</text:p>
          </table:table-cell>
          <table:table-cell office:value-type="float" office:value="1790.8" calcext:value-type="float">
            <text:p>1790.8</text:p>
          </table:table-cell>
          <table:table-cell office:value-type="float" office:value="723.8192" calcext:value-type="float">
            <text:p>723.8192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2026-07-04T16:42:09.964Z</text:p>
          </table:table-cell>
          <table:table-cell office:value-type="float" office:value="62914.01" calcext:value-type="float">
            <text:p>62914.01</text:p>
          </table:table-cell>
          <table:table-cell office:value-type="float" office:value="62945.73" calcext:value-type="float">
            <text:p>62945.73</text:p>
          </table:table-cell>
          <table:table-cell office:value-type="float" office:value="62900" calcext:value-type="float">
            <text:p>62900</text:p>
          </table:table-cell>
          <table:table-cell office:value-type="float" office:value="62908.36" calcext:value-type="float">
            <text:p>62908.36</text:p>
          </table:table-cell>
          <table:table-cell office:value-type="float" office:value="14.49466" calcext:value-type="float">
            <text:p>14.49466</text:p>
          </table:table-cell>
          <table:table-cell office:value-type="float" office:value="4621" calcext:value-type="float">
            <text:p>4621</text:p>
          </table:table-cell>
          <table:table-cell office:value-type="float" office:value="1790.69" calcext:value-type="float">
            <text:p>1790.69</text:p>
          </table:table-cell>
          <table:table-cell office:value-type="float" office:value="1790.81" calcext:value-type="float">
            <text:p>1790.81</text:p>
          </table:table-cell>
          <table:table-cell office:value-type="float" office:value="1788.43" calcext:value-type="float">
            <text:p>1788.43</text:p>
          </table:table-cell>
          <table:table-cell office:value-type="float" office:value="1788.45" calcext:value-type="float">
            <text:p>1788.45</text:p>
          </table:table-cell>
          <table:table-cell office:value-type="float" office:value="256.2313" calcext:value-type="float">
            <text:p>256.2313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2026-07-04T16:47:09.992Z</text:p>
          </table:table-cell>
          <table:table-cell office:value-type="float" office:value="62908.36" calcext:value-type="float">
            <text:p>62908.36</text:p>
          </table:table-cell>
          <table:table-cell office:value-type="float" office:value="62928.96" calcext:value-type="float">
            <text:p>62928.96</text:p>
          </table:table-cell>
          <table:table-cell office:value-type="float" office:value="62880" calcext:value-type="float">
            <text:p>62880</text:p>
          </table:table-cell>
          <table:table-cell office:value-type="float" office:value="62882" calcext:value-type="float">
            <text:p>62882</text:p>
          </table:table-cell>
          <table:table-cell office:value-type="float" office:value="24.09097" calcext:value-type="float">
            <text:p>24.09097</text:p>
          </table:table-cell>
          <table:table-cell office:value-type="float" office:value="6179" calcext:value-type="float">
            <text:p>6179</text:p>
          </table:table-cell>
          <table:table-cell office:value-type="float" office:value="1788.44" calcext:value-type="float">
            <text:p>1788.44</text:p>
          </table:table-cell>
          <table:table-cell office:value-type="float" office:value="1788.96" calcext:value-type="float">
            <text:p>1788.96</text:p>
          </table:table-cell>
          <table:table-cell office:value-type="float" office:value="1787" calcext:value-type="float">
            <text:p>1787</text:p>
          </table:table-cell>
          <table:table-cell office:value-type="float" office:value="1787.09" calcext:value-type="float">
            <text:p>1787.09</text:p>
          </table:table-cell>
          <table:table-cell office:value-type="float" office:value="340.4643" calcext:value-type="float">
            <text:p>340.4643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string" calcext:value-type="string">
            <text:p>2026-07-04T16:52:10.021Z</text:p>
          </table:table-cell>
          <table:table-cell office:value-type="float" office:value="62880.01" calcext:value-type="float">
            <text:p>62880.01</text:p>
          </table:table-cell>
          <table:table-cell office:value-type="float" office:value="62956.52" calcext:value-type="float">
            <text:p>62956.52</text:p>
          </table:table-cell>
          <table:table-cell office:value-type="float" office:value="62866" calcext:value-type="float">
            <text:p>62866</text:p>
          </table:table-cell>
          <table:table-cell office:value-type="float" office:value="62956.52" calcext:value-type="float">
            <text:p>62956.52</text:p>
          </table:table-cell>
          <table:table-cell office:value-type="float" office:value="19.22452" calcext:value-type="float">
            <text:p>19.22452</text:p>
          </table:table-cell>
          <table:table-cell office:value-type="float" office:value="5917" calcext:value-type="float">
            <text:p>5917</text:p>
          </table:table-cell>
          <table:table-cell office:value-type="float" office:value="1787.01" calcext:value-type="float">
            <text:p>1787.01</text:p>
          </table:table-cell>
          <table:table-cell office:value-type="float" office:value="1788.96" calcext:value-type="float">
            <text:p>1788.96</text:p>
          </table:table-cell>
          <table:table-cell office:value-type="float" office:value="1786.39" calcext:value-type="float">
            <text:p>1786.39</text:p>
          </table:table-cell>
          <table:table-cell office:value-type="float" office:value="1788.94" calcext:value-type="float">
            <text:p>1788.94</text:p>
          </table:table-cell>
          <table:table-cell office:value-type="float" office:value="406.5908" calcext:value-type="float">
            <text:p>406.5908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2026-07-04T16:57:10.048Z</text:p>
          </table:table-cell>
          <table:table-cell office:value-type="float" office:value="62950.43" calcext:value-type="float">
            <text:p>62950.43</text:p>
          </table:table-cell>
          <table:table-cell office:value-type="float" office:value="62968.29" calcext:value-type="float">
            <text:p>62968.29</text:p>
          </table:table-cell>
          <table:table-cell office:value-type="float" office:value="62904.26" calcext:value-type="float">
            <text:p>62904.26</text:p>
          </table:table-cell>
          <table:table-cell office:value-type="float" office:value="62910.01" calcext:value-type="float">
            <text:p>62910.01</text:p>
          </table:table-cell>
          <table:table-cell office:value-type="float" office:value="49.42315" calcext:value-type="float">
            <text:p>49.42315</text:p>
          </table:table-cell>
          <table:table-cell office:value-type="float" office:value="6544" calcext:value-type="float">
            <text:p>6544</text:p>
          </table:table-cell>
          <table:table-cell office:value-type="float" office:value="1788.94" calcext:value-type="float">
            <text:p>1788.94</text:p>
          </table:table-cell>
          <table:table-cell office:value-type="float" office:value="1789.5" calcext:value-type="float">
            <text:p>1789.5</text:p>
          </table:table-cell>
          <table:table-cell table:number-columns-repeated="2" office:value-type="float" office:value="1786.53" calcext:value-type="float">
            <text:p>1786.53</text:p>
          </table:table-cell>
          <table:table-cell office:value-type="float" office:value="162.2545" calcext:value-type="float">
            <text:p>162.2545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2026-07-04T17:02:10.076Z</text:p>
          </table:table-cell>
          <table:table-cell office:value-type="float" office:value="62910.01" calcext:value-type="float">
            <text:p>62910.01</text:p>
          </table:table-cell>
          <table:table-cell office:value-type="float" office:value="62935.04" calcext:value-type="float">
            <text:p>62935.04</text:p>
          </table:table-cell>
          <table:table-cell office:value-type="float" office:value="62803" calcext:value-type="float">
            <text:p>62803</text:p>
          </table:table-cell>
          <table:table-cell office:value-type="float" office:value="62829.99" calcext:value-type="float">
            <text:p>62829.99</text:p>
          </table:table-cell>
          <table:table-cell office:value-type="float" office:value="87.35119" calcext:value-type="float">
            <text:p>87.35119</text:p>
          </table:table-cell>
          <table:table-cell office:value-type="float" office:value="9110" calcext:value-type="float">
            <text:p>9110</text:p>
          </table:table-cell>
          <table:table-cell office:value-type="float" office:value="1786.99" calcext:value-type="float">
            <text:p>1786.99</text:p>
          </table:table-cell>
          <table:table-cell office:value-type="float" office:value="1787.76" calcext:value-type="float">
            <text:p>1787.76</text:p>
          </table:table-cell>
          <table:table-cell office:value-type="float" office:value="1779" calcext:value-type="float">
            <text:p>1779</text:p>
          </table:table-cell>
          <table:table-cell office:value-type="float" office:value="1779.6" calcext:value-type="float">
            <text:p>1779.6</text:p>
          </table:table-cell>
          <table:table-cell office:value-type="float" office:value="2407.1332" calcext:value-type="float">
            <text:p>2407.1332</text:p>
          </table:table-cell>
          <table:table-cell office:value-type="float" office:value="18212" calcext:value-type="float">
            <text:p>18212</text:p>
          </table:table-cell>
        </table:table-row>
        <table:table-row table:style-name="ro1">
          <table:table-cell office:value-type="string" calcext:value-type="string">
            <text:p>2026-07-04T17:07:10.088Z</text:p>
          </table:table-cell>
          <table:table-cell office:value-type="float" office:value="62823.71" calcext:value-type="float">
            <text:p>62823.71</text:p>
          </table:table-cell>
          <table:table-cell office:value-type="float" office:value="62916" calcext:value-type="float">
            <text:p>62916</text:p>
          </table:table-cell>
          <table:table-cell office:value-type="float" office:value="62822" calcext:value-type="float">
            <text:p>62822</text:p>
          </table:table-cell>
          <table:table-cell office:value-type="float" office:value="62899.99" calcext:value-type="float">
            <text:p>62899.99</text:p>
          </table:table-cell>
          <table:table-cell office:value-type="float" office:value="68.17427" calcext:value-type="float">
            <text:p>68.17427</text:p>
          </table:table-cell>
          <table:table-cell office:value-type="float" office:value="7878" calcext:value-type="float">
            <text:p>7878</text:p>
          </table:table-cell>
          <table:table-cell office:value-type="float" office:value="1779.97" calcext:value-type="float">
            <text:p>1779.97</text:p>
          </table:table-cell>
          <table:table-cell office:value-type="float" office:value="1783.28" calcext:value-type="float">
            <text:p>1783.28</text:p>
          </table:table-cell>
          <table:table-cell office:value-type="float" office:value="1779.27" calcext:value-type="float">
            <text:p>1779.27</text:p>
          </table:table-cell>
          <table:table-cell office:value-type="float" office:value="1781.16" calcext:value-type="float">
            <text:p>1781.16</text:p>
          </table:table-cell>
          <table:table-cell office:value-type="float" office:value="2668.2542" calcext:value-type="float">
            <text:p>2668.2542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string" calcext:value-type="string">
            <text:p>2026-07-04T17:12:10.090Z</text:p>
          </table:table-cell>
          <table:table-cell office:value-type="float" office:value="62897.99" calcext:value-type="float">
            <text:p>62897.99</text:p>
          </table:table-cell>
          <table:table-cell office:value-type="float" office:value="62946.3" calcext:value-type="float">
            <text:p>62946.3</text:p>
          </table:table-cell>
          <table:table-cell office:value-type="float" office:value="62897.99" calcext:value-type="float">
            <text:p>62897.99</text:p>
          </table:table-cell>
          <table:table-cell office:value-type="float" office:value="62921.99" calcext:value-type="float">
            <text:p>62921.99</text:p>
          </table:table-cell>
          <table:table-cell office:value-type="float" office:value="22.35071" calcext:value-type="float">
            <text:p>22.35071</text:p>
          </table:table-cell>
          <table:table-cell office:value-type="float" office:value="4760" calcext:value-type="float">
            <text:p>4760</text:p>
          </table:table-cell>
          <table:table-cell office:value-type="float" office:value="1781.69" calcext:value-type="float">
            <text:p>1781.69</text:p>
          </table:table-cell>
          <table:table-cell office:value-type="float" office:value="1783.82" calcext:value-type="float">
            <text:p>1783.82</text:p>
          </table:table-cell>
          <table:table-cell office:value-type="float" office:value="1781.1" calcext:value-type="float">
            <text:p>1781.1</text:p>
          </table:table-cell>
          <table:table-cell office:value-type="float" office:value="1781.98" calcext:value-type="float">
            <text:p>1781.98</text:p>
          </table:table-cell>
          <table:table-cell office:value-type="float" office:value="2629.6204" calcext:value-type="float">
            <text:p>2629.6204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string" calcext:value-type="string">
            <text:p>2026-07-04T17:17:10.116Z</text:p>
          </table:table-cell>
          <table:table-cell office:value-type="float" office:value="62922" calcext:value-type="float">
            <text:p>62922</text:p>
          </table:table-cell>
          <table:table-cell office:value-type="float" office:value="62935.13" calcext:value-type="float">
            <text:p>62935.13</text:p>
          </table:table-cell>
          <table:table-cell office:value-type="float" office:value="62848.05" calcext:value-type="float">
            <text:p>62848.05</text:p>
          </table:table-cell>
          <table:table-cell office:value-type="float" office:value="62922.01" calcext:value-type="float">
            <text:p>62922.01</text:p>
          </table:table-cell>
          <table:table-cell office:value-type="float" office:value="35.29153" calcext:value-type="float">
            <text:p>35.29153</text:p>
          </table:table-cell>
          <table:table-cell office:value-type="float" office:value="6362" calcext:value-type="float">
            <text:p>6362</text:p>
          </table:table-cell>
          <table:table-cell office:value-type="float" office:value="1781.9" calcext:value-type="float">
            <text:p>1781.9</text:p>
          </table:table-cell>
          <table:table-cell office:value-type="float" office:value="1783" calcext:value-type="float">
            <text:p>1783</text:p>
          </table:table-cell>
          <table:table-cell office:value-type="float" office:value="1779.35" calcext:value-type="float">
            <text:p>1779.35</text:p>
          </table:table-cell>
          <table:table-cell office:value-type="float" office:value="1782.58" calcext:value-type="float">
            <text:p>1782.58</text:p>
          </table:table-cell>
          <table:table-cell office:value-type="float" office:value="2395.528" calcext:value-type="float">
            <text:p>2395.528</text:p>
          </table:table-cell>
          <table:table-cell office:value-type="float" office:value="15798" calcext:value-type="float">
            <text:p>15798</text:p>
          </table:table-cell>
        </table:table-row>
        <table:table-row table:style-name="ro1">
          <table:table-cell office:value-type="string" calcext:value-type="string">
            <text:p>2026-07-04T17:22:10.144Z</text:p>
          </table:table-cell>
          <table:table-cell table:number-columns-repeated="2" office:value-type="float" office:value="62924" calcext:value-type="float">
            <text:p>62924</text:p>
          </table:table-cell>
          <table:table-cell office:value-type="float" office:value="62892" calcext:value-type="float">
            <text:p>62892</text:p>
          </table:table-cell>
          <table:table-cell office:value-type="float" office:value="62923.88" calcext:value-type="float">
            <text:p>62923.88</text:p>
          </table:table-cell>
          <table:table-cell office:value-type="float" office:value="7.57634" calcext:value-type="float">
            <text:p>7.57634</text:p>
          </table:table-cell>
          <table:table-cell office:value-type="float" office:value="2808" calcext:value-type="float">
            <text:p>2808</text:p>
          </table:table-cell>
          <table:table-cell office:value-type="float" office:value="1782.45" calcext:value-type="float">
            <text:p>1782.45</text:p>
          </table:table-cell>
          <table:table-cell office:value-type="float" office:value="1785.49" calcext:value-type="float">
            <text:p>1785.49</text:p>
          </table:table-cell>
          <table:table-cell office:value-type="float" office:value="1781.01" calcext:value-type="float">
            <text:p>1781.01</text:p>
          </table:table-cell>
          <table:table-cell office:value-type="float" office:value="1785.34" calcext:value-type="float">
            <text:p>1785.34</text:p>
          </table:table-cell>
          <table:table-cell office:value-type="float" office:value="1311.266" calcext:value-type="float">
            <text:p>1311.266</text:p>
          </table:table-cell>
          <table:table-cell office:value-type="float" office:value="11848" calcext:value-type="float">
            <text:p>11848</text:p>
          </table:table-cell>
        </table:table-row>
        <table:table-row table:style-name="ro1">
          <table:table-cell office:value-type="string" calcext:value-type="string">
            <text:p>2026-07-04T17:27:10.172Z</text:p>
          </table:table-cell>
          <table:table-cell office:value-type="float" office:value="62923.88" calcext:value-type="float">
            <text:p>62923.88</text:p>
          </table:table-cell>
          <table:table-cell office:value-type="float" office:value="62980.13" calcext:value-type="float">
            <text:p>62980.13</text:p>
          </table:table-cell>
          <table:table-cell office:value-type="float" office:value="62912" calcext:value-type="float">
            <text:p>62912</text:p>
          </table:table-cell>
          <table:table-cell office:value-type="float" office:value="62980.13" calcext:value-type="float">
            <text:p>62980.13</text:p>
          </table:table-cell>
          <table:table-cell office:value-type="float" office:value="22.41222" calcext:value-type="float">
            <text:p>22.41222</text:p>
          </table:table-cell>
          <table:table-cell office:value-type="float" office:value="3910" calcext:value-type="float">
            <text:p>3910</text:p>
          </table:table-cell>
          <table:table-cell office:value-type="float" office:value="1784.81" calcext:value-type="float">
            <text:p>1784.81</text:p>
          </table:table-cell>
          <table:table-cell office:value-type="float" office:value="1787.47" calcext:value-type="float">
            <text:p>1787.47</text:p>
          </table:table-cell>
          <table:table-cell office:value-type="float" office:value="1784.36" calcext:value-type="float">
            <text:p>1784.36</text:p>
          </table:table-cell>
          <table:table-cell office:value-type="float" office:value="1787.33" calcext:value-type="float">
            <text:p>1787.33</text:p>
          </table:table-cell>
          <table:table-cell office:value-type="float" office:value="758.1052" calcext:value-type="float">
            <text:p>758.1052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2026-07-04T17:32:10.182Z</text:p>
          </table:table-cell>
          <table:table-cell office:value-type="float" office:value="62976" calcext:value-type="float">
            <text:p>62976</text:p>
          </table:table-cell>
          <table:table-cell office:value-type="float" office:value="63068" calcext:value-type="float">
            <text:p>63068</text:p>
          </table:table-cell>
          <table:table-cell office:value-type="float" office:value="62968.28" calcext:value-type="float">
            <text:p>62968.28</text:p>
          </table:table-cell>
          <table:table-cell office:value-type="float" office:value="63051.13" calcext:value-type="float">
            <text:p>63051.13</text:p>
          </table:table-cell>
          <table:table-cell office:value-type="float" office:value="40.63078" calcext:value-type="float">
            <text:p>40.63078</text:p>
          </table:table-cell>
          <table:table-cell office:value-type="float" office:value="8642" calcext:value-type="float">
            <text:p>8642</text:p>
          </table:table-cell>
          <table:table-cell office:value-type="float" office:value="1786.92" calcext:value-type="float">
            <text:p>1786.92</text:p>
          </table:table-cell>
          <table:table-cell office:value-type="float" office:value="1790.6" calcext:value-type="float">
            <text:p>1790.6</text:p>
          </table:table-cell>
          <table:table-cell office:value-type="float" office:value="1786.48" calcext:value-type="float">
            <text:p>1786.48</text:p>
          </table:table-cell>
          <table:table-cell office:value-type="float" office:value="1789.72" calcext:value-type="float">
            <text:p>1789.72</text:p>
          </table:table-cell>
          <table:table-cell office:value-type="float" office:value="1152.1484" calcext:value-type="float">
            <text:p>1152.1484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2026-07-04T17:37:10.210Z</text:p>
          </table:table-cell>
          <table:table-cell office:value-type="float" office:value="63053.9" calcext:value-type="float">
            <text:p>63053.9</text:p>
          </table:table-cell>
          <table:table-cell office:value-type="float" office:value="63187.9" calcext:value-type="float">
            <text:p>63187.9</text:p>
          </table:table-cell>
          <table:table-cell office:value-type="float" office:value="63044.82" calcext:value-type="float">
            <text:p>63044.82</text:p>
          </table:table-cell>
          <table:table-cell office:value-type="float" office:value="63120.04" calcext:value-type="float">
            <text:p>63120.04</text:p>
          </table:table-cell>
          <table:table-cell office:value-type="float" office:value="108.66215" calcext:value-type="float">
            <text:p>108.66215</text:p>
          </table:table-cell>
          <table:table-cell office:value-type="float" office:value="19669" calcext:value-type="float">
            <text:p>19669</text:p>
          </table:table-cell>
          <table:table-cell office:value-type="float" office:value="1789.86" calcext:value-type="float">
            <text:p>1789.86</text:p>
          </table:table-cell>
          <table:table-cell office:value-type="float" office:value="1794.4" calcext:value-type="float">
            <text:p>1794.4</text:p>
          </table:table-cell>
          <table:table-cell office:value-type="float" office:value="1788.75" calcext:value-type="float">
            <text:p>1788.75</text:p>
          </table:table-cell>
          <table:table-cell office:value-type="float" office:value="1788.87" calcext:value-type="float">
            <text:p>1788.87</text:p>
          </table:table-cell>
          <table:table-cell office:value-type="float" office:value="2347.0015" calcext:value-type="float">
            <text:p>2347.0015</text:p>
          </table:table-cell>
          <table:table-cell office:value-type="float" office:value="16216" calcext:value-type="float">
            <text:p>16216</text:p>
          </table:table-cell>
        </table:table-row>
        <table:table-row table:style-name="ro1">
          <table:table-cell office:value-type="string" calcext:value-type="string">
            <text:p>2026-07-04T17:42:10.236Z</text:p>
          </table:table-cell>
          <table:table-cell office:value-type="float" office:value="63120.04" calcext:value-type="float">
            <text:p>63120.04</text:p>
          </table:table-cell>
          <table:table-cell office:value-type="float" office:value="63194" calcext:value-type="float">
            <text:p>63194</text:p>
          </table:table-cell>
          <table:table-cell office:value-type="float" office:value="63092.06" calcext:value-type="float">
            <text:p>63092.06</text:p>
          </table:table-cell>
          <table:table-cell office:value-type="float" office:value="63134.01" calcext:value-type="float">
            <text:p>63134.01</text:p>
          </table:table-cell>
          <table:table-cell office:value-type="float" office:value="38.35647" calcext:value-type="float">
            <text:p>38.35647</text:p>
          </table:table-cell>
          <table:table-cell office:value-type="float" office:value="9828" calcext:value-type="float">
            <text:p>9828</text:p>
          </table:table-cell>
          <table:table-cell office:value-type="float" office:value="1788.76" calcext:value-type="float">
            <text:p>1788.76</text:p>
          </table:table-cell>
          <table:table-cell office:value-type="float" office:value="1792.27" calcext:value-type="float">
            <text:p>1792.27</text:p>
          </table:table-cell>
          <table:table-cell office:value-type="float" office:value="1787.99" calcext:value-type="float">
            <text:p>1787.99</text:p>
          </table:table-cell>
          <table:table-cell office:value-type="float" office:value="1789.66" calcext:value-type="float">
            <text:p>1789.66</text:p>
          </table:table-cell>
          <table:table-cell office:value-type="float" office:value="1154.0568" calcext:value-type="float">
            <text:p>1154.0568</text:p>
          </table:table-cell>
          <table:table-cell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2026-07-04T17:47:10.244Z</text:p>
          </table:table-cell>
          <table:table-cell office:value-type="float" office:value="63134.01" calcext:value-type="float">
            <text:p>63134.01</text:p>
          </table:table-cell>
          <table:table-cell office:value-type="float" office:value="63199.99" calcext:value-type="float">
            <text:p>63199.99</text:p>
          </table:table-cell>
          <table:table-cell office:value-type="float" office:value="63112.93" calcext:value-type="float">
            <text:p>63112.93</text:p>
          </table:table-cell>
          <table:table-cell office:value-type="float" office:value="63164.7" calcext:value-type="float">
            <text:p>63164.7</text:p>
          </table:table-cell>
          <table:table-cell office:value-type="float" office:value="77.61122" calcext:value-type="float">
            <text:p>77.61122</text:p>
          </table:table-cell>
          <table:table-cell office:value-type="float" office:value="8300" calcext:value-type="float">
            <text:p>8300</text:p>
          </table:table-cell>
          <table:table-cell office:value-type="float" office:value="1789.66" calcext:value-type="float">
            <text:p>1789.66</text:p>
          </table:table-cell>
          <table:table-cell office:value-type="float" office:value="1792.29" calcext:value-type="float">
            <text:p>1792.29</text:p>
          </table:table-cell>
          <table:table-cell office:value-type="float" office:value="1789" calcext:value-type="float">
            <text:p>1789</text:p>
          </table:table-cell>
          <table:table-cell office:value-type="float" office:value="1791.76" calcext:value-type="float">
            <text:p>1791.76</text:p>
          </table:table-cell>
          <table:table-cell office:value-type="float" office:value="1465.0732" calcext:value-type="float">
            <text:p>1465.0732</text:p>
          </table:table-cell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string" calcext:value-type="string">
            <text:p>2026-07-04T17:52:10.272Z</text:p>
          </table:table-cell>
          <table:table-cell office:value-type="float" office:value="63164.7" calcext:value-type="float">
            <text:p>63164.7</text:p>
          </table:table-cell>
          <table:table-cell office:value-type="float" office:value="63439.62" calcext:value-type="float">
            <text:p>63439.62</text:p>
          </table:table-cell>
          <table:table-cell office:value-type="float" office:value="63154" calcext:value-type="float">
            <text:p>63154</text:p>
          </table:table-cell>
          <table:table-cell office:value-type="float" office:value="63336.01" calcext:value-type="float">
            <text:p>63336.01</text:p>
          </table:table-cell>
          <table:table-cell office:value-type="float" office:value="182.18519" calcext:value-type="float">
            <text:p>182.18519</text:p>
          </table:table-cell>
          <table:table-cell office:value-type="float" office:value="25723" calcext:value-type="float">
            <text:p>25723</text:p>
          </table:table-cell>
          <table:table-cell office:value-type="float" office:value="1791.74" calcext:value-type="float">
            <text:p>1791.74</text:p>
          </table:table-cell>
          <table:table-cell office:value-type="float" office:value="1807.3" calcext:value-type="float">
            <text:p>1807.3</text:p>
          </table:table-cell>
          <table:table-cell office:value-type="float" office:value="1790.36" calcext:value-type="float">
            <text:p>1790.36</text:p>
          </table:table-cell>
          <table:table-cell office:value-type="float" office:value="1802.77" calcext:value-type="float">
            <text:p>1802.77</text:p>
          </table:table-cell>
          <table:table-cell office:value-type="float" office:value="6401.0942" calcext:value-type="float">
            <text:p>6401.0942</text:p>
          </table:table-cell>
          <table:table-cell office:value-type="float" office:value="34612" calcext:value-type="float">
            <text:p>34612</text:p>
          </table:table-cell>
        </table:table-row>
        <table:table-row table:style-name="ro1">
          <table:table-cell office:value-type="string" calcext:value-type="string">
            <text:p>2026-07-04T17:57:10.274Z</text:p>
          </table:table-cell>
          <table:table-cell office:value-type="float" office:value="63314" calcext:value-type="float">
            <text:p>63314</text:p>
          </table:table-cell>
          <table:table-cell office:value-type="float" office:value="63414" calcext:value-type="float">
            <text:p>63414</text:p>
          </table:table-cell>
          <table:table-cell office:value-type="float" office:value="63314" calcext:value-type="float">
            <text:p>63314</text:p>
          </table:table-cell>
          <table:table-cell office:value-type="float" office:value="63336.01" calcext:value-type="float">
            <text:p>63336.01</text:p>
          </table:table-cell>
          <table:table-cell office:value-type="float" office:value="84.96024" calcext:value-type="float">
            <text:p>84.96024</text:p>
          </table:table-cell>
          <table:table-cell office:value-type="float" office:value="18437" calcext:value-type="float">
            <text:p>18437</text:p>
          </table:table-cell>
          <table:table-cell office:value-type="float" office:value="1800.74" calcext:value-type="float">
            <text:p>1800.74</text:p>
          </table:table-cell>
          <table:table-cell office:value-type="float" office:value="1807.65" calcext:value-type="float">
            <text:p>1807.65</text:p>
          </table:table-cell>
          <table:table-cell office:value-type="float" office:value="1800" calcext:value-type="float">
            <text:p>1800</text:p>
          </table:table-cell>
          <table:table-cell office:value-type="float" office:value="1801.79" calcext:value-type="float">
            <text:p>1801.79</text:p>
          </table:table-cell>
          <table:table-cell office:value-type="float" office:value="4841.3667" calcext:value-type="float">
            <text:p>4841.3667</text:p>
          </table:table-cell>
          <table:table-cell office:value-type="float" office:value="36426" calcext:value-type="float">
            <text:p>36426</text:p>
          </table:table-cell>
        </table:table-row>
        <table:table-row table:style-name="ro1">
          <table:table-cell office:value-type="string" calcext:value-type="string">
            <text:p>2026-07-04T18:02:10.285Z</text:p>
          </table:table-cell>
          <table:table-cell office:value-type="float" office:value="63344" calcext:value-type="float">
            <text:p>63344</text:p>
          </table:table-cell>
          <table:table-cell office:value-type="float" office:value="63348" calcext:value-type="float">
            <text:p>63348</text:p>
          </table:table-cell>
          <table:table-cell office:value-type="float" office:value="63232" calcext:value-type="float">
            <text:p>63232</text:p>
          </table:table-cell>
          <table:table-cell office:value-type="float" office:value="63239.45" calcext:value-type="float">
            <text:p>63239.45</text:p>
          </table:table-cell>
          <table:table-cell office:value-type="float" office:value="78.79911" calcext:value-type="float">
            <text:p>78.79911</text:p>
          </table:table-cell>
          <table:table-cell office:value-type="float" office:value="10777" calcext:value-type="float">
            <text:p>10777</text:p>
          </table:table-cell>
          <table:table-cell office:value-type="float" office:value="1801.64" calcext:value-type="float">
            <text:p>1801.64</text:p>
          </table:table-cell>
          <table:table-cell office:value-type="float" office:value="1803.06" calcext:value-type="float">
            <text:p>1803.06</text:p>
          </table:table-cell>
          <table:table-cell office:value-type="float" office:value="1798.1" calcext:value-type="float">
            <text:p>1798.1</text:p>
          </table:table-cell>
          <table:table-cell office:value-type="float" office:value="1799.11" calcext:value-type="float">
            <text:p>1799.11</text:p>
          </table:table-cell>
          <table:table-cell office:value-type="float" office:value="2125.4682" calcext:value-type="float">
            <text:p>2125.4682</text:p>
          </table:table-cell>
          <table:table-cell office:value-type="float" office:value="18243" calcext:value-type="float">
            <text:p>18243</text:p>
          </table:table-cell>
        </table:table-row>
        <table:table-row table:style-name="ro1">
          <table:table-cell office:value-type="string" calcext:value-type="string">
            <text:p>2026-07-04T18:07:10.312Z</text:p>
          </table:table-cell>
          <table:table-cell office:value-type="float" office:value="63248.97" calcext:value-type="float">
            <text:p>63248.97</text:p>
          </table:table-cell>
          <table:table-cell office:value-type="float" office:value="63323.14" calcext:value-type="float">
            <text:p>63323.14</text:p>
          </table:table-cell>
          <table:table-cell office:value-type="float" office:value="63228" calcext:value-type="float">
            <text:p>63228</text:p>
          </table:table-cell>
          <table:table-cell office:value-type="float" office:value="63273.92" calcext:value-type="float">
            <text:p>63273.92</text:p>
          </table:table-cell>
          <table:table-cell office:value-type="float" office:value="18.99474" calcext:value-type="float">
            <text:p>18.99474</text:p>
          </table:table-cell>
          <table:table-cell office:value-type="float" office:value="7361" calcext:value-type="float">
            <text:p>7361</text:p>
          </table:table-cell>
          <table:table-cell office:value-type="float" office:value="1800" calcext:value-type="float">
            <text:p>1800</text:p>
          </table:table-cell>
          <table:table-cell office:value-type="float" office:value="1805" calcext:value-type="float">
            <text:p>1805</text:p>
          </table:table-cell>
          <table:table-cell office:value-type="float" office:value="1797.74" calcext:value-type="float">
            <text:p>1797.74</text:p>
          </table:table-cell>
          <table:table-cell office:value-type="float" office:value="1800.63" calcext:value-type="float">
            <text:p>1800.63</text:p>
          </table:table-cell>
          <table:table-cell office:value-type="float" office:value="2280.6949" calcext:value-type="float">
            <text:p>2280.6949</text:p>
          </table:table-cell>
          <table:table-cell office:value-type="float" office:value="19310" calcext:value-type="float">
            <text:p>19310</text:p>
          </table:table-cell>
        </table:table-row>
        <table:table-row table:style-name="ro1">
          <table:table-cell office:value-type="string" calcext:value-type="string">
            <text:p>2026-07-04T18:12:10.328Z</text:p>
          </table:table-cell>
          <table:table-cell table:number-columns-repeated="2" office:value-type="float" office:value="63285.39" calcext:value-type="float">
            <text:p>63285.39</text:p>
          </table:table-cell>
          <table:table-cell office:value-type="float" office:value="63180.01" calcext:value-type="float">
            <text:p>63180.01</text:p>
          </table:table-cell>
          <table:table-cell office:value-type="float" office:value="63259.99" calcext:value-type="float">
            <text:p>63259.99</text:p>
          </table:table-cell>
          <table:table-cell office:value-type="float" office:value="26.97585" calcext:value-type="float">
            <text:p>26.97585</text:p>
          </table:table-cell>
          <table:table-cell office:value-type="float" office:value="9373" calcext:value-type="float">
            <text:p>9373</text:p>
          </table:table-cell>
          <table:table-cell office:value-type="float" office:value="1802.16" calcext:value-type="float">
            <text:p>1802.16</text:p>
          </table:table-cell>
          <table:table-cell office:value-type="float" office:value="1802.61" calcext:value-type="float">
            <text:p>1802.61</text:p>
          </table:table-cell>
          <table:table-cell office:value-type="float" office:value="1798.72" calcext:value-type="float">
            <text:p>1798.72</text:p>
          </table:table-cell>
          <table:table-cell office:value-type="float" office:value="1802.6" calcext:value-type="float">
            <text:p>1802.6</text:p>
          </table:table-cell>
          <table:table-cell office:value-type="float" office:value="1334.0956" calcext:value-type="float">
            <text:p>1334.0956</text:p>
          </table:table-cell>
          <table:table-cell office:value-type="float" office:value="16304" calcext:value-type="float">
            <text:p>16304</text:p>
          </table:table-cell>
        </table:table-row>
        <table:table-row table:style-name="ro1">
          <table:table-cell office:value-type="string" calcext:value-type="string">
            <text:p>2026-07-04T18:17:10.352Z</text:p>
          </table:table-cell>
          <table:table-cell office:value-type="float" office:value="63256" calcext:value-type="float">
            <text:p>63256</text:p>
          </table:table-cell>
          <table:table-cell office:value-type="float" office:value="63346" calcext:value-type="float">
            <text:p>63346</text:p>
          </table:table-cell>
          <table:table-cell office:value-type="float" office:value="63254.18" calcext:value-type="float">
            <text:p>63254.18</text:p>
          </table:table-cell>
          <table:table-cell office:value-type="float" office:value="63271.49" calcext:value-type="float">
            <text:p>63271.49</text:p>
          </table:table-cell>
          <table:table-cell office:value-type="float" office:value="63.76073" calcext:value-type="float">
            <text:p>63.76073</text:p>
          </table:table-cell>
          <table:table-cell office:value-type="float" office:value="10477" calcext:value-type="float">
            <text:p>10477</text:p>
          </table:table-cell>
          <table:table-cell office:value-type="float" office:value="1802.18" calcext:value-type="float">
            <text:p>1802.18</text:p>
          </table:table-cell>
          <table:table-cell office:value-type="float" office:value="1805.84" calcext:value-type="float">
            <text:p>1805.84</text:p>
          </table:table-cell>
          <table:table-cell office:value-type="float" office:value="1801.46" calcext:value-type="float">
            <text:p>1801.46</text:p>
          </table:table-cell>
          <table:table-cell office:value-type="float" office:value="1802.63" calcext:value-type="float">
            <text:p>1802.63</text:p>
          </table:table-cell>
          <table:table-cell office:value-type="float" office:value="1099.9199" calcext:value-type="float">
            <text:p>1099.9199</text:p>
          </table:table-cell>
          <table:table-cell office:value-type="float" office:value="15402" calcext:value-type="float">
            <text:p>15402</text:p>
          </table:table-cell>
        </table:table-row>
        <table:table-row table:style-name="ro1">
          <table:table-cell office:value-type="string" calcext:value-type="string">
            <text:p>2026-07-04T18:22:10.376Z</text:p>
          </table:table-cell>
          <table:table-cell office:value-type="float" office:value="63271.48" calcext:value-type="float">
            <text:p>63271.48</text:p>
          </table:table-cell>
          <table:table-cell office:value-type="float" office:value="63310" calcext:value-type="float">
            <text:p>63310</text:p>
          </table:table-cell>
          <table:table-cell table:number-columns-repeated="2" office:value-type="float" office:value="63207.72" calcext:value-type="float">
            <text:p>63207.72</text:p>
          </table:table-cell>
          <table:table-cell office:value-type="float" office:value="18.796" calcext:value-type="float">
            <text:p>18.796</text:p>
          </table:table-cell>
          <table:table-cell office:value-type="float" office:value="7179" calcext:value-type="float">
            <text:p>7179</text:p>
          </table:table-cell>
          <table:table-cell office:value-type="float" office:value="1801.65" calcext:value-type="float">
            <text:p>1801.65</text:p>
          </table:table-cell>
          <table:table-cell office:value-type="float" office:value="1803.69" calcext:value-type="float">
            <text:p>1803.69</text:p>
          </table:table-cell>
          <table:table-cell office:value-type="float" office:value="1798.21" calcext:value-type="float">
            <text:p>1798.21</text:p>
          </table:table-cell>
          <table:table-cell office:value-type="float" office:value="1798.47" calcext:value-type="float">
            <text:p>1798.47</text:p>
          </table:table-cell>
          <table:table-cell office:value-type="float" office:value="991.0401" calcext:value-type="float">
            <text:p>991.0401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office:value-type="string" calcext:value-type="string">
            <text:p>2026-07-04T18:27:10.380Z</text:p>
          </table:table-cell>
          <table:table-cell table:number-columns-repeated="2" office:value-type="float" office:value="63222.01" calcext:value-type="float">
            <text:p>63222.01</text:p>
          </table:table-cell>
          <table:table-cell office:value-type="float" office:value="63144.58" calcext:value-type="float">
            <text:p>63144.58</text:p>
          </table:table-cell>
          <table:table-cell office:value-type="float" office:value="63178.38" calcext:value-type="float">
            <text:p>63178.38</text:p>
          </table:table-cell>
          <table:table-cell office:value-type="float" office:value="14.90883" calcext:value-type="float">
            <text:p>14.90883</text:p>
          </table:table-cell>
          <table:table-cell office:value-type="float" office:value="7368" calcext:value-type="float">
            <text:p>7368</text:p>
          </table:table-cell>
          <table:table-cell office:value-type="float" office:value="1798.88" calcext:value-type="float">
            <text:p>1798.88</text:p>
          </table:table-cell>
          <table:table-cell office:value-type="float" office:value="1799.23" calcext:value-type="float">
            <text:p>1799.23</text:p>
          </table:table-cell>
          <table:table-cell office:value-type="float" office:value="1796.08" calcext:value-type="float">
            <text:p>1796.08</text:p>
          </table:table-cell>
          <table:table-cell office:value-type="float" office:value="1796.34" calcext:value-type="float">
            <text:p>1796.34</text:p>
          </table:table-cell>
          <table:table-cell office:value-type="float" office:value="894.1777" calcext:value-type="float">
            <text:p>894.1777</text:p>
          </table:table-cell>
          <table:table-cell office:value-type="float" office:value="11717" calcext:value-type="float">
            <text:p>11717</text:p>
          </table:table-cell>
        </table:table-row>
        <table:table-row table:style-name="ro1">
          <table:table-cell office:value-type="string" calcext:value-type="string">
            <text:p>2026-07-04T18:32:10.404Z</text:p>
          </table:table-cell>
          <table:table-cell office:value-type="float" office:value="63178.39" calcext:value-type="float">
            <text:p>63178.39</text:p>
          </table:table-cell>
          <table:table-cell office:value-type="float" office:value="63189.1" calcext:value-type="float">
            <text:p>63189.1</text:p>
          </table:table-cell>
          <table:table-cell office:value-type="float" office:value="63136.73" calcext:value-type="float">
            <text:p>63136.73</text:p>
          </table:table-cell>
          <table:table-cell office:value-type="float" office:value="63137.45" calcext:value-type="float">
            <text:p>63137.45</text:p>
          </table:table-cell>
          <table:table-cell office:value-type="float" office:value="28.52244" calcext:value-type="float">
            <text:p>28.52244</text:p>
          </table:table-cell>
          <table:table-cell office:value-type="float" office:value="6998" calcext:value-type="float">
            <text:p>6998</text:p>
          </table:table-cell>
          <table:table-cell office:value-type="float" office:value="1796.51" calcext:value-type="float">
            <text:p>1796.51</text:p>
          </table:table-cell>
          <table:table-cell office:value-type="float" office:value="1796.74" calcext:value-type="float">
            <text:p>1796.74</text:p>
          </table:table-cell>
          <table:table-cell office:value-type="float" office:value="1794.82" calcext:value-type="float">
            <text:p>1794.82</text:p>
          </table:table-cell>
          <table:table-cell office:value-type="float" office:value="1795.43" calcext:value-type="float">
            <text:p>1795.43</text:p>
          </table:table-cell>
          <table:table-cell office:value-type="float" office:value="843.1918" calcext:value-type="float">
            <text:p>843.1918</text:p>
          </table:table-cell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string" calcext:value-type="string">
            <text:p>2026-07-04T18:37:10.406Z</text:p>
          </table:table-cell>
          <table:table-cell office:value-type="float" office:value="63137.45" calcext:value-type="float">
            <text:p>63137.45</text:p>
          </table:table-cell>
          <table:table-cell office:value-type="float" office:value="63142" calcext:value-type="float">
            <text:p>63142</text:p>
          </table:table-cell>
          <table:table-cell office:value-type="float" office:value="63122.19" calcext:value-type="float">
            <text:p>63122.19</text:p>
          </table:table-cell>
          <table:table-cell office:value-type="float" office:value="63127.68" calcext:value-type="float">
            <text:p>63127.68</text:p>
          </table:table-cell>
          <table:table-cell office:value-type="float" office:value="11.28461" calcext:value-type="float">
            <text:p>11.28461</text:p>
          </table:table-cell>
          <table:table-cell office:value-type="float" office:value="4807" calcext:value-type="float">
            <text:p>4807</text:p>
          </table:table-cell>
          <table:table-cell office:value-type="float" office:value="1795.08" calcext:value-type="float">
            <text:p>1795.08</text:p>
          </table:table-cell>
          <table:table-cell office:value-type="float" office:value="1796.31" calcext:value-type="float">
            <text:p>1796.31</text:p>
          </table:table-cell>
          <table:table-cell office:value-type="float" office:value="1793.96" calcext:value-type="float">
            <text:p>1793.96</text:p>
          </table:table-cell>
          <table:table-cell office:value-type="float" office:value="1794.04" calcext:value-type="float">
            <text:p>1794.04</text:p>
          </table:table-cell>
          <table:table-cell office:value-type="float" office:value="704.3563" calcext:value-type="float">
            <text:p>704.3563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2026-07-04T18:42:10.428Z</text:p>
          </table:table-cell>
          <table:table-cell office:value-type="float" office:value="63134" calcext:value-type="float">
            <text:p>63134</text:p>
          </table:table-cell>
          <table:table-cell office:value-type="float" office:value="63149.1" calcext:value-type="float">
            <text:p>63149.1</text:p>
          </table:table-cell>
          <table:table-cell office:value-type="float" office:value="63103.99" calcext:value-type="float">
            <text:p>63103.99</text:p>
          </table:table-cell>
          <table:table-cell office:value-type="float" office:value="63135.46" calcext:value-type="float">
            <text:p>63135.46</text:p>
          </table:table-cell>
          <table:table-cell office:value-type="float" office:value="81.44876" calcext:value-type="float">
            <text:p>81.44876</text:p>
          </table:table-cell>
          <table:table-cell office:value-type="float" office:value="8232" calcext:value-type="float">
            <text:p>8232</text:p>
          </table:table-cell>
          <table:table-cell office:value-type="float" office:value="1794.51" calcext:value-type="float">
            <text:p>1794.51</text:p>
          </table:table-cell>
          <table:table-cell office:value-type="float" office:value="1794.85" calcext:value-type="float">
            <text:p>1794.85</text:p>
          </table:table-cell>
          <table:table-cell office:value-type="float" office:value="1793.09" calcext:value-type="float">
            <text:p>1793.09</text:p>
          </table:table-cell>
          <table:table-cell office:value-type="float" office:value="1794.69" calcext:value-type="float">
            <text:p>1794.69</text:p>
          </table:table-cell>
          <table:table-cell office:value-type="float" office:value="872.8396" calcext:value-type="float">
            <text:p>872.8396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string" calcext:value-type="string">
            <text:p>2026-07-04T18:47:10.452Z</text:p>
          </table:table-cell>
          <table:table-cell office:value-type="float" office:value="63129.1" calcext:value-type="float">
            <text:p>63129.1</text:p>
          </table:table-cell>
          <table:table-cell office:value-type="float" office:value="63146" calcext:value-type="float">
            <text:p>63146</text:p>
          </table:table-cell>
          <table:table-cell office:value-type="float" office:value="63114.27" calcext:value-type="float">
            <text:p>63114.27</text:p>
          </table:table-cell>
          <table:table-cell office:value-type="float" office:value="63145.51" calcext:value-type="float">
            <text:p>63145.51</text:p>
          </table:table-cell>
          <table:table-cell office:value-type="float" office:value="28.48401" calcext:value-type="float">
            <text:p>28.48401</text:p>
          </table:table-cell>
          <table:table-cell office:value-type="float" office:value="4564" calcext:value-type="float">
            <text:p>4564</text:p>
          </table:table-cell>
          <table:table-cell office:value-type="float" office:value="1794.69" calcext:value-type="float">
            <text:p>1794.69</text:p>
          </table:table-cell>
          <table:table-cell office:value-type="float" office:value="1795.3" calcext:value-type="float">
            <text:p>1795.3</text:p>
          </table:table-cell>
          <table:table-cell office:value-type="float" office:value="1793.79" calcext:value-type="float">
            <text:p>1793.79</text:p>
          </table:table-cell>
          <table:table-cell office:value-type="float" office:value="1795.13" calcext:value-type="float">
            <text:p>1795.13</text:p>
          </table:table-cell>
          <table:table-cell office:value-type="float" office:value="370.4746" calcext:value-type="float">
            <text:p>370.4746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string" calcext:value-type="string">
            <text:p>2026-07-04T18:52:10.477Z</text:p>
          </table:table-cell>
          <table:table-cell office:value-type="float" office:value="63145.51" calcext:value-type="float">
            <text:p>63145.51</text:p>
          </table:table-cell>
          <table:table-cell office:value-type="float" office:value="63157.92" calcext:value-type="float">
            <text:p>63157.92</text:p>
          </table:table-cell>
          <table:table-cell office:value-type="float" office:value="63092.02" calcext:value-type="float">
            <text:p>63092.02</text:p>
          </table:table-cell>
          <table:table-cell office:value-type="float" office:value="63150" calcext:value-type="float">
            <text:p>63150</text:p>
          </table:table-cell>
          <table:table-cell office:value-type="float" office:value="15.60314" calcext:value-type="float">
            <text:p>15.60314</text:p>
          </table:table-cell>
          <table:table-cell office:value-type="float" office:value="5721" calcext:value-type="float">
            <text:p>5721</text:p>
          </table:table-cell>
          <table:table-cell office:value-type="float" office:value="1795.14" calcext:value-type="float">
            <text:p>1795.14</text:p>
          </table:table-cell>
          <table:table-cell office:value-type="float" office:value="1795.6" calcext:value-type="float">
            <text:p>1795.6</text:p>
          </table:table-cell>
          <table:table-cell office:value-type="float" office:value="1791.58" calcext:value-type="float">
            <text:p>1791.58</text:p>
          </table:table-cell>
          <table:table-cell office:value-type="float" office:value="1794.04" calcext:value-type="float">
            <text:p>1794.04</text:p>
          </table:table-cell>
          <table:table-cell office:value-type="float" office:value="653.5385" calcext:value-type="float">
            <text:p>653.5385</text:p>
          </table:table-cell>
          <table:table-cell office:value-type="float" office:value="11928" calcext:value-type="float">
            <text:p>11928</text:p>
          </table:table-cell>
        </table:table-row>
        <table:table-row table:style-name="ro1">
          <table:table-cell office:value-type="string" calcext:value-type="string">
            <text:p>2026-07-04T18:57:10.501Z</text:p>
          </table:table-cell>
          <table:table-cell office:value-type="float" office:value="63134.33" calcext:value-type="float">
            <text:p>63134.33</text:p>
          </table:table-cell>
          <table:table-cell office:value-type="float" office:value="63179.58" calcext:value-type="float">
            <text:p>63179.58</text:p>
          </table:table-cell>
          <table:table-cell office:value-type="float" office:value="63134.33" calcext:value-type="float">
            <text:p>63134.33</text:p>
          </table:table-cell>
          <table:table-cell office:value-type="float" office:value="63174.79" calcext:value-type="float">
            <text:p>63174.79</text:p>
          </table:table-cell>
          <table:table-cell office:value-type="float" office:value="8.13567" calcext:value-type="float">
            <text:p>8.13567</text:p>
          </table:table-cell>
          <table:table-cell office:value-type="float" office:value="3932" calcext:value-type="float">
            <text:p>3932</text:p>
          </table:table-cell>
          <table:table-cell office:value-type="float" office:value="1793.71" calcext:value-type="float">
            <text:p>1793.71</text:p>
          </table:table-cell>
          <table:table-cell office:value-type="float" office:value="1795.57" calcext:value-type="float">
            <text:p>1795.57</text:p>
          </table:table-cell>
          <table:table-cell office:value-type="float" office:value="1793.71" calcext:value-type="float">
            <text:p>1793.71</text:p>
          </table:table-cell>
          <table:table-cell office:value-type="float" office:value="1794.03" calcext:value-type="float">
            <text:p>1794.03</text:p>
          </table:table-cell>
          <table:table-cell office:value-type="float" office:value="311.4625" calcext:value-type="float">
            <text:p>311.4625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2026-07-04T19:02:10.525Z</text:p>
          </table:table-cell>
          <table:table-cell office:value-type="float" office:value="63174.8" calcext:value-type="float">
            <text:p>63174.8</text:p>
          </table:table-cell>
          <table:table-cell office:value-type="float" office:value="63241.96" calcext:value-type="float">
            <text:p>63241.96</text:p>
          </table:table-cell>
          <table:table-cell office:value-type="float" office:value="63158" calcext:value-type="float">
            <text:p>63158</text:p>
          </table:table-cell>
          <table:table-cell office:value-type="float" office:value="63224.38" calcext:value-type="float">
            <text:p>63224.38</text:p>
          </table:table-cell>
          <table:table-cell office:value-type="float" office:value="52.07247" calcext:value-type="float">
            <text:p>52.07247</text:p>
          </table:table-cell>
          <table:table-cell office:value-type="float" office:value="6413" calcext:value-type="float">
            <text:p>6413</text:p>
          </table:table-cell>
          <table:table-cell office:value-type="float" office:value="1794.21" calcext:value-type="float">
            <text:p>1794.21</text:p>
          </table:table-cell>
          <table:table-cell office:value-type="float" office:value="1795.05" calcext:value-type="float">
            <text:p>1795.05</text:p>
          </table:table-cell>
          <table:table-cell office:value-type="float" office:value="1793.12" calcext:value-type="float">
            <text:p>1793.12</text:p>
          </table:table-cell>
          <table:table-cell office:value-type="float" office:value="1794.73" calcext:value-type="float">
            <text:p>1794.73</text:p>
          </table:table-cell>
          <table:table-cell office:value-type="float" office:value="368.6842" calcext:value-type="float">
            <text:p>368.6842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2026-07-04T19:07:10.550Z</text:p>
          </table:table-cell>
          <table:table-cell office:value-type="float" office:value="63237.56" calcext:value-type="float">
            <text:p>63237.56</text:p>
          </table:table-cell>
          <table:table-cell office:value-type="float" office:value="63241.63" calcext:value-type="float">
            <text:p>63241.63</text:p>
          </table:table-cell>
          <table:table-cell office:value-type="float" office:value="63210.27" calcext:value-type="float">
            <text:p>63210.27</text:p>
          </table:table-cell>
          <table:table-cell office:value-type="float" office:value="63214.09" calcext:value-type="float">
            <text:p>63214.09</text:p>
          </table:table-cell>
          <table:table-cell office:value-type="float" office:value="11.84589" calcext:value-type="float">
            <text:p>11.84589</text:p>
          </table:table-cell>
          <table:table-cell office:value-type="float" office:value="5190" calcext:value-type="float">
            <text:p>5190</text:p>
          </table:table-cell>
          <table:table-cell office:value-type="float" office:value="1794.98" calcext:value-type="float">
            <text:p>1794.98</text:p>
          </table:table-cell>
          <table:table-cell office:value-type="float" office:value="1795.05" calcext:value-type="float">
            <text:p>1795.05</text:p>
          </table:table-cell>
          <table:table-cell table:number-columns-repeated="2" office:value-type="float" office:value="1793.04" calcext:value-type="float">
            <text:p>1793.04</text:p>
          </table:table-cell>
          <table:table-cell office:value-type="float" office:value="226.0873" calcext:value-type="float">
            <text:p>226.0873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2026-07-04T19:12:10.572Z</text:p>
          </table:table-cell>
          <table:table-cell office:value-type="float" office:value="63222.01" calcext:value-type="float">
            <text:p>63222.01</text:p>
          </table:table-cell>
          <table:table-cell office:value-type="float" office:value="63241.18" calcext:value-type="float">
            <text:p>63241.18</text:p>
          </table:table-cell>
          <table:table-cell office:value-type="float" office:value="63203.96" calcext:value-type="float">
            <text:p>63203.96</text:p>
          </table:table-cell>
          <table:table-cell office:value-type="float" office:value="63230.01" calcext:value-type="float">
            <text:p>63230.01</text:p>
          </table:table-cell>
          <table:table-cell office:value-type="float" office:value="19.89637" calcext:value-type="float">
            <text:p>19.89637</text:p>
          </table:table-cell>
          <table:table-cell office:value-type="float" office:value="5552" calcext:value-type="float">
            <text:p>5552</text:p>
          </table:table-cell>
          <table:table-cell table:number-columns-repeated="2" office:value-type="float" office:value="1793.63" calcext:value-type="float">
            <text:p>1793.63</text:p>
          </table:table-cell>
          <table:table-cell office:value-type="float" office:value="1790.94" calcext:value-type="float">
            <text:p>1790.94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351.5816" calcext:value-type="float">
            <text:p>351.5816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2026-07-04T19:17:10.575Z</text:p>
          </table:table-cell>
          <table:table-cell office:value-type="float" office:value="63220.49" calcext:value-type="float">
            <text:p>63220.49</text:p>
          </table:table-cell>
          <table:table-cell office:value-type="float" office:value="63230.01" calcext:value-type="float">
            <text:p>63230.01</text:p>
          </table:table-cell>
          <table:table-cell office:value-type="float" office:value="63123.49" calcext:value-type="float">
            <text:p>63123.49</text:p>
          </table:table-cell>
          <table:table-cell office:value-type="float" office:value="63211.44" calcext:value-type="float">
            <text:p>63211.44</text:p>
          </table:table-cell>
          <table:table-cell office:value-type="float" office:value="23.51421" calcext:value-type="float">
            <text:p>23.51421</text:p>
          </table:table-cell>
          <table:table-cell office:value-type="float" office:value="7875" calcext:value-type="float">
            <text:p>7875</text:p>
          </table:table-cell>
          <table:table-cell office:value-type="float" office:value="1791.45" calcext:value-type="float">
            <text:p>1791.45</text:p>
          </table:table-cell>
          <table:table-cell office:value-type="float" office:value="1791.56" calcext:value-type="float">
            <text:p>1791.56</text:p>
          </table:table-cell>
          <table:table-cell office:value-type="float" office:value="1788.47" calcext:value-type="float">
            <text:p>1788.47</text:p>
          </table:table-cell>
          <table:table-cell office:value-type="float" office:value="1790.54" calcext:value-type="float">
            <text:p>1790.54</text:p>
          </table:table-cell>
          <table:table-cell office:value-type="float" office:value="755.6425" calcext:value-type="float">
            <text:p>755.6425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2026-07-04T19:22:10.597Z</text:p>
          </table:table-cell>
          <table:table-cell office:value-type="float" office:value="63211.98" calcext:value-type="float">
            <text:p>63211.98</text:p>
          </table:table-cell>
          <table:table-cell office:value-type="float" office:value="63280" calcext:value-type="float">
            <text:p>63280</text:p>
          </table:table-cell>
          <table:table-cell office:value-type="float" office:value="63211.44" calcext:value-type="float">
            <text:p>63211.44</text:p>
          </table:table-cell>
          <table:table-cell office:value-type="float" office:value="63280" calcext:value-type="float">
            <text:p>63280</text:p>
          </table:table-cell>
          <table:table-cell office:value-type="float" office:value="25.48494" calcext:value-type="float">
            <text:p>25.48494</text:p>
          </table:table-cell>
          <table:table-cell office:value-type="float" office:value="5043" calcext:value-type="float">
            <text:p>5043</text:p>
          </table:table-cell>
          <table:table-cell office:value-type="float" office:value="1790.57" calcext:value-type="float">
            <text:p>1790.57</text:p>
          </table:table-cell>
          <table:table-cell office:value-type="float" office:value="1794.34" calcext:value-type="float">
            <text:p>1794.34</text:p>
          </table:table-cell>
          <table:table-cell office:value-type="float" office:value="1790.54" calcext:value-type="float">
            <text:p>1790.54</text:p>
          </table:table-cell>
          <table:table-cell office:value-type="float" office:value="1794.33" calcext:value-type="float">
            <text:p>1794.33</text:p>
          </table:table-cell>
          <table:table-cell office:value-type="float" office:value="804.6592" calcext:value-type="float">
            <text:p>804.6592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2026-07-04T19:27:10.620Z</text:p>
          </table:table-cell>
          <table:table-cell office:value-type="float" office:value="63270" calcext:value-type="float">
            <text:p>63270</text:p>
          </table:table-cell>
          <table:table-cell office:value-type="float" office:value="63326" calcext:value-type="float">
            <text:p>63326</text:p>
          </table:table-cell>
          <table:table-cell office:value-type="float" office:value="63269.99" calcext:value-type="float">
            <text:p>63269.99</text:p>
          </table:table-cell>
          <table:table-cell office:value-type="float" office:value="63297.42" calcext:value-type="float">
            <text:p>63297.42</text:p>
          </table:table-cell>
          <table:table-cell office:value-type="float" office:value="32.80271" calcext:value-type="float">
            <text:p>32.80271</text:p>
          </table:table-cell>
          <table:table-cell office:value-type="float" office:value="6508" calcext:value-type="float">
            <text:p>6508</text:p>
          </table:table-cell>
          <table:table-cell office:value-type="float" office:value="1793.87" calcext:value-type="float">
            <text:p>1793.87</text:p>
          </table:table-cell>
          <table:table-cell office:value-type="float" office:value="1795.53" calcext:value-type="float">
            <text:p>1795.53</text:p>
          </table:table-cell>
          <table:table-cell table:number-columns-repeated="2" office:value-type="float" office:value="1793.76" calcext:value-type="float">
            <text:p>1793.76</text:p>
          </table:table-cell>
          <table:table-cell office:value-type="float" office:value="1069.9889" calcext:value-type="float">
            <text:p>1069.9889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2026-07-04T19:32:10.640Z</text:p>
          </table:table-cell>
          <table:table-cell office:value-type="float" office:value="63308.4" calcext:value-type="float">
            <text:p>63308.4</text:p>
          </table:table-cell>
          <table:table-cell office:value-type="float" office:value="63374" calcext:value-type="float">
            <text:p>63374</text:p>
          </table:table-cell>
          <table:table-cell office:value-type="float" office:value="63297.41" calcext:value-type="float">
            <text:p>63297.41</text:p>
          </table:table-cell>
          <table:table-cell office:value-type="float" office:value="63359.99" calcext:value-type="float">
            <text:p>63359.99</text:p>
          </table:table-cell>
          <table:table-cell office:value-type="float" office:value="29.99674" calcext:value-type="float">
            <text:p>29.99674</text:p>
          </table:table-cell>
          <table:table-cell office:value-type="float" office:value="9136" calcext:value-type="float">
            <text:p>9136</text:p>
          </table:table-cell>
          <table:table-cell office:value-type="float" office:value="1794.51" calcext:value-type="float">
            <text:p>1794.51</text:p>
          </table:table-cell>
          <table:table-cell office:value-type="float" office:value="1796.36" calcext:value-type="float">
            <text:p>1796.36</text:p>
          </table:table-cell>
          <table:table-cell office:value-type="float" office:value="1791.49" calcext:value-type="float">
            <text:p>1791.49</text:p>
          </table:table-cell>
          <table:table-cell office:value-type="float" office:value="1794.34" calcext:value-type="float">
            <text:p>1794.34</text:p>
          </table:table-cell>
          <table:table-cell office:value-type="float" office:value="701.5362" calcext:value-type="float">
            <text:p>701.5362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string" calcext:value-type="string">
            <text:p>2026-07-04T19:37:10.660Z</text:p>
          </table:table-cell>
          <table:table-cell office:value-type="float" office:value="63344" calcext:value-type="float">
            <text:p>63344</text:p>
          </table:table-cell>
          <table:table-cell office:value-type="float" office:value="63461.99" calcext:value-type="float">
            <text:p>63461.99</text:p>
          </table:table-cell>
          <table:table-cell office:value-type="float" office:value="63306.56" calcext:value-type="float">
            <text:p>63306.56</text:p>
          </table:table-cell>
          <table:table-cell office:value-type="float" office:value="63306.57" calcext:value-type="float">
            <text:p>63306.57</text:p>
          </table:table-cell>
          <table:table-cell office:value-type="float" office:value="42.20439" calcext:value-type="float">
            <text:p>42.20439</text:p>
          </table:table-cell>
          <table:table-cell office:value-type="float" office:value="12453" calcext:value-type="float">
            <text:p>12453</text:p>
          </table:table-cell>
          <table:table-cell office:value-type="float" office:value="1793.75" calcext:value-type="float">
            <text:p>1793.75</text:p>
          </table:table-cell>
          <table:table-cell office:value-type="float" office:value="1797.66" calcext:value-type="float">
            <text:p>1797.66</text:p>
          </table:table-cell>
          <table:table-cell office:value-type="float" office:value="1793.61" calcext:value-type="float">
            <text:p>1793.61</text:p>
          </table:table-cell>
          <table:table-cell office:value-type="float" office:value="1794.19" calcext:value-type="float">
            <text:p>1794.19</text:p>
          </table:table-cell>
          <table:table-cell office:value-type="float" office:value="604.3824" calcext:value-type="float">
            <text:p>604.3824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2026-07-04T19:42:10.665Z</text:p>
          </table:table-cell>
          <table:table-cell office:value-type="float" office:value="63306.57" calcext:value-type="float">
            <text:p>63306.57</text:p>
          </table:table-cell>
          <table:table-cell office:value-type="float" office:value="63357.03" calcext:value-type="float">
            <text:p>63357.03</text:p>
          </table:table-cell>
          <table:table-cell office:value-type="float" office:value="63280.56" calcext:value-type="float">
            <text:p>63280.56</text:p>
          </table:table-cell>
          <table:table-cell office:value-type="float" office:value="63357.03" calcext:value-type="float">
            <text:p>63357.03</text:p>
          </table:table-cell>
          <table:table-cell office:value-type="float" office:value="15.56026" calcext:value-type="float">
            <text:p>15.56026</text:p>
          </table:table-cell>
          <table:table-cell office:value-type="float" office:value="6388" calcext:value-type="float">
            <text:p>6388</text:p>
          </table:table-cell>
          <table:table-cell office:value-type="float" office:value="1794.2" calcext:value-type="float">
            <text:p>1794.2</text:p>
          </table:table-cell>
          <table:table-cell office:value-type="float" office:value="1795.93" calcext:value-type="float">
            <text:p>1795.93</text:p>
          </table:table-cell>
          <table:table-cell office:value-type="float" office:value="1793.59" calcext:value-type="float">
            <text:p>1793.59</text:p>
          </table:table-cell>
          <table:table-cell office:value-type="float" office:value="1795.93" calcext:value-type="float">
            <text:p>1795.93</text:p>
          </table:table-cell>
          <table:table-cell office:value-type="float" office:value="170.3048" calcext:value-type="float">
            <text:p>170.304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2026-07-04T19:47:10.676Z</text:p>
          </table:table-cell>
          <table:table-cell office:value-type="float" office:value="63337.66" calcext:value-type="float">
            <text:p>63337.66</text:p>
          </table:table-cell>
          <table:table-cell office:value-type="float" office:value="63370" calcext:value-type="float">
            <text:p>63370</text:p>
          </table:table-cell>
          <table:table-cell office:value-type="float" office:value="63291.01" calcext:value-type="float">
            <text:p>63291.01</text:p>
          </table:table-cell>
          <table:table-cell office:value-type="float" office:value="63336" calcext:value-type="float">
            <text:p>63336</text:p>
          </table:table-cell>
          <table:table-cell office:value-type="float" office:value="67.70963" calcext:value-type="float">
            <text:p>67.70963</text:p>
          </table:table-cell>
          <table:table-cell office:value-type="float" office:value="5708" calcext:value-type="float">
            <text:p>5708</text:p>
          </table:table-cell>
          <table:table-cell office:value-type="float" office:value="1795.1" calcext:value-type="float">
            <text:p>1795.1</text:p>
          </table:table-cell>
          <table:table-cell office:value-type="float" office:value="1797" calcext:value-type="float">
            <text:p>1797</text:p>
          </table:table-cell>
          <table:table-cell office:value-type="float" office:value="1794.9" calcext:value-type="float">
            <text:p>1794.9</text:p>
          </table:table-cell>
          <table:table-cell office:value-type="float" office:value="1795.56" calcext:value-type="float">
            <text:p>1795.56</text:p>
          </table:table-cell>
          <table:table-cell office:value-type="float" office:value="187.9578" calcext:value-type="float">
            <text:p>187.9578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2026-07-04T19:52:10.678Z</text:p>
          </table:table-cell>
          <table:table-cell office:value-type="float" office:value="63301.72" calcext:value-type="float">
            <text:p>63301.72</text:p>
          </table:table-cell>
          <table:table-cell office:value-type="float" office:value="63336.68" calcext:value-type="float">
            <text:p>63336.68</text:p>
          </table:table-cell>
          <table:table-cell office:value-type="float" office:value="63298" calcext:value-type="float">
            <text:p>63298</text:p>
          </table:table-cell>
          <table:table-cell office:value-type="float" office:value="63323.92" calcext:value-type="float">
            <text:p>63323.92</text:p>
          </table:table-cell>
          <table:table-cell office:value-type="float" office:value="18.31934" calcext:value-type="float">
            <text:p>18.31934</text:p>
          </table:table-cell>
          <table:table-cell office:value-type="float" office:value="7165" calcext:value-type="float">
            <text:p>7165</text:p>
          </table:table-cell>
          <table:table-cell office:value-type="float" office:value="1794.91" calcext:value-type="float">
            <text:p>1794.91</text:p>
          </table:table-cell>
          <table:table-cell office:value-type="float" office:value="1796.42" calcext:value-type="float">
            <text:p>1796.42</text:p>
          </table:table-cell>
          <table:table-cell office:value-type="float" office:value="1793.68" calcext:value-type="float">
            <text:p>1793.68</text:p>
          </table:table-cell>
          <table:table-cell office:value-type="float" office:value="1793.94" calcext:value-type="float">
            <text:p>1793.94</text:p>
          </table:table-cell>
          <table:table-cell office:value-type="float" office:value="527.6583" calcext:value-type="float">
            <text:p>527.6583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2026-07-04T19:57:10.700Z</text:p>
          </table:table-cell>
          <table:table-cell office:value-type="float" office:value="63316.01" calcext:value-type="float">
            <text:p>63316.01</text:p>
          </table:table-cell>
          <table:table-cell office:value-type="float" office:value="63331.36" calcext:value-type="float">
            <text:p>63331.36</text:p>
          </table:table-cell>
          <table:table-cell office:value-type="float" office:value="63280.06" calcext:value-type="float">
            <text:p>63280.06</text:p>
          </table:table-cell>
          <table:table-cell office:value-type="float" office:value="63301.99" calcext:value-type="float">
            <text:p>63301.99</text:p>
          </table:table-cell>
          <table:table-cell office:value-type="float" office:value="12.95288" calcext:value-type="float">
            <text:p>12.95288</text:p>
          </table:table-cell>
          <table:table-cell office:value-type="float" office:value="4891" calcext:value-type="float">
            <text:p>4891</text:p>
          </table:table-cell>
          <table:table-cell office:value-type="float" office:value="1794.14" calcext:value-type="float">
            <text:p>1794.14</text:p>
          </table:table-cell>
          <table:table-cell office:value-type="float" office:value="1794.5" calcext:value-type="float">
            <text:p>1794.5</text:p>
          </table:table-cell>
          <table:table-cell office:value-type="float" office:value="1790.83" calcext:value-type="float">
            <text:p>1790.83</text:p>
          </table:table-cell>
          <table:table-cell office:value-type="float" office:value="1793.11" calcext:value-type="float">
            <text:p>1793.11</text:p>
          </table:table-cell>
          <table:table-cell office:value-type="float" office:value="438.3175" calcext:value-type="float">
            <text:p>438.317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2026-07-04T20:02:10.721Z</text:p>
          </table:table-cell>
          <table:table-cell office:value-type="float" office:value="63292" calcext:value-type="float">
            <text:p>63292</text:p>
          </table:table-cell>
          <table:table-cell office:value-type="float" office:value="63372" calcext:value-type="float">
            <text:p>63372</text:p>
          </table:table-cell>
          <table:table-cell office:value-type="float" office:value="63286" calcext:value-type="float">
            <text:p>63286</text:p>
          </table:table-cell>
          <table:table-cell office:value-type="float" office:value="63371.99" calcext:value-type="float">
            <text:p>63371.99</text:p>
          </table:table-cell>
          <table:table-cell office:value-type="float" office:value="20.59276" calcext:value-type="float">
            <text:p>20.59276</text:p>
          </table:table-cell>
          <table:table-cell office:value-type="float" office:value="5258" calcext:value-type="float">
            <text:p>5258</text:p>
          </table:table-cell>
          <table:table-cell office:value-type="float" office:value="1792.71" calcext:value-type="float">
            <text:p>1792.71</text:p>
          </table:table-cell>
          <table:table-cell office:value-type="float" office:value="1795.06" calcext:value-type="float">
            <text:p>1795.06</text:p>
          </table:table-cell>
          <table:table-cell office:value-type="float" office:value="1791.33" calcext:value-type="float">
            <text:p>1791.33</text:p>
          </table:table-cell>
          <table:table-cell office:value-type="float" office:value="1794.7" calcext:value-type="float">
            <text:p>1794.7</text:p>
          </table:table-cell>
          <table:table-cell office:value-type="float" office:value="284.793" calcext:value-type="float">
            <text:p>284.793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string" calcext:value-type="string">
            <text:p>2026-07-04T20:07:10.744Z</text:p>
          </table:table-cell>
          <table:table-cell office:value-type="float" office:value="63364" calcext:value-type="float">
            <text:p>63364</text:p>
          </table:table-cell>
          <table:table-cell office:value-type="float" office:value="63392" calcext:value-type="float">
            <text:p>63392</text:p>
          </table:table-cell>
          <table:table-cell table:number-columns-repeated="2" office:value-type="float" office:value="63328" calcext:value-type="float">
            <text:p>63328</text:p>
          </table:table-cell>
          <table:table-cell office:value-type="float" office:value="16.10604" calcext:value-type="float">
            <text:p>16.10604</text:p>
          </table:table-cell>
          <table:table-cell office:value-type="float" office:value="6898" calcext:value-type="float">
            <text:p>6898</text:p>
          </table:table-cell>
          <table:table-cell office:value-type="float" office:value="1794.3" calcext:value-type="float">
            <text:p>1794.3</text:p>
          </table:table-cell>
          <table:table-cell office:value-type="float" office:value="1795.81" calcext:value-type="float">
            <text:p>1795.81</text:p>
          </table:table-cell>
          <table:table-cell office:value-type="float" office:value="1793.33" calcext:value-type="float">
            <text:p>1793.33</text:p>
          </table:table-cell>
          <table:table-cell office:value-type="float" office:value="1793.92" calcext:value-type="float">
            <text:p>1793.92</text:p>
          </table:table-cell>
          <table:table-cell office:value-type="float" office:value="453.4658" calcext:value-type="float">
            <text:p>453.4658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2026-07-04T20:12:10.764Z</text:p>
          </table:table-cell>
          <table:table-cell office:value-type="float" office:value="63328" calcext:value-type="float">
            <text:p>63328</text:p>
          </table:table-cell>
          <table:table-cell office:value-type="float" office:value="63360.62" calcext:value-type="float">
            <text:p>63360.62</text:p>
          </table:table-cell>
          <table:table-cell office:value-type="float" office:value="63328" calcext:value-type="float">
            <text:p>63328</text:p>
          </table:table-cell>
          <table:table-cell office:value-type="float" office:value="63342.85" calcext:value-type="float">
            <text:p>63342.85</text:p>
          </table:table-cell>
          <table:table-cell office:value-type="float" office:value="8.80888" calcext:value-type="float">
            <text:p>8.80888</text:p>
          </table:table-cell>
          <table:table-cell office:value-type="float" office:value="3223" calcext:value-type="float">
            <text:p>3223</text:p>
          </table:table-cell>
          <table:table-cell office:value-type="float" office:value="1793.34" calcext:value-type="float">
            <text:p>1793.34</text:p>
          </table:table-cell>
          <table:table-cell office:value-type="float" office:value="1795.72" calcext:value-type="float">
            <text:p>1795.72</text:p>
          </table:table-cell>
          <table:table-cell office:value-type="float" office:value="1793.34" calcext:value-type="float">
            <text:p>1793.34</text:p>
          </table:table-cell>
          <table:table-cell office:value-type="float" office:value="1794.79" calcext:value-type="float">
            <text:p>1794.79</text:p>
          </table:table-cell>
          <table:table-cell office:value-type="float" office:value="253.1395" calcext:value-type="float">
            <text:p>253.1395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2026-07-04T20:17:10.784Z</text:p>
          </table:table-cell>
          <table:table-cell office:value-type="float" office:value="63342.85" calcext:value-type="float">
            <text:p>63342.85</text:p>
          </table:table-cell>
          <table:table-cell office:value-type="float" office:value="63365.96" calcext:value-type="float">
            <text:p>63365.96</text:p>
          </table:table-cell>
          <table:table-cell office:value-type="float" office:value="63328" calcext:value-type="float">
            <text:p>63328</text:p>
          </table:table-cell>
          <table:table-cell office:value-type="float" office:value="63328.01" calcext:value-type="float">
            <text:p>63328.01</text:p>
          </table:table-cell>
          <table:table-cell office:value-type="float" office:value="15.72414" calcext:value-type="float">
            <text:p>15.72414</text:p>
          </table:table-cell>
          <table:table-cell office:value-type="float" office:value="4093" calcext:value-type="float">
            <text:p>4093</text:p>
          </table:table-cell>
          <table:table-cell office:value-type="float" office:value="1794.78" calcext:value-type="float">
            <text:p>1794.78</text:p>
          </table:table-cell>
          <table:table-cell office:value-type="float" office:value="1795.77" calcext:value-type="float">
            <text:p>1795.77</text:p>
          </table:table-cell>
          <table:table-cell office:value-type="float" office:value="1793.59" calcext:value-type="float">
            <text:p>1793.59</text:p>
          </table:table-cell>
          <table:table-cell office:value-type="float" office:value="1793.6" calcext:value-type="float">
            <text:p>1793.6</text:p>
          </table:table-cell>
          <table:table-cell office:value-type="float" office:value="426.4646" calcext:value-type="float">
            <text:p>426.4646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2026-07-04T20:22:10.804Z</text:p>
          </table:table-cell>
          <table:table-cell table:number-columns-repeated="2" office:value-type="float" office:value="63332.83" calcext:value-type="float">
            <text:p>63332.83</text:p>
          </table:table-cell>
          <table:table-cell table:number-columns-repeated="2" office:value-type="float" office:value="63206.01" calcext:value-type="float">
            <text:p>63206.01</text:p>
          </table:table-cell>
          <table:table-cell office:value-type="float" office:value="54.20093" calcext:value-type="float">
            <text:p>54.20093</text:p>
          </table:table-cell>
          <table:table-cell office:value-type="float" office:value="13261" calcext:value-type="float">
            <text:p>13261</text:p>
          </table:table-cell>
          <table:table-cell office:value-type="float" office:value="1793.72" calcext:value-type="float">
            <text:p>1793.72</text:p>
          </table:table-cell>
          <table:table-cell office:value-type="float" office:value="1793.91" calcext:value-type="float">
            <text:p>1793.91</text:p>
          </table:table-cell>
          <table:table-cell table:number-columns-repeated="2" office:value-type="float" office:value="1784.63" calcext:value-type="float">
            <text:p>1784.63</text:p>
          </table:table-cell>
          <table:table-cell office:value-type="float" office:value="1336.0044" calcext:value-type="float">
            <text:p>1336.0044</text:p>
          </table:table-cell>
          <table:table-cell office:value-type="float" office:value="18374" calcext:value-type="float">
            <text:p>18374</text:p>
          </table:table-cell>
        </table:table-row>
        <table:table-row table:style-name="ro1">
          <table:table-cell office:value-type="string" calcext:value-type="string">
            <text:p>2026-07-04T20:27:10.811Z</text:p>
          </table:table-cell>
          <table:table-cell office:value-type="float" office:value="63215.3" calcext:value-type="float">
            <text:p>63215.3</text:p>
          </table:table-cell>
          <table:table-cell office:value-type="float" office:value="63215.31" calcext:value-type="float">
            <text:p>63215.31</text:p>
          </table:table-cell>
          <table:table-cell office:value-type="float" office:value="63160" calcext:value-type="float">
            <text:p>63160</text:p>
          </table:table-cell>
          <table:table-cell office:value-type="float" office:value="63182" calcext:value-type="float">
            <text:p>63182</text:p>
          </table:table-cell>
          <table:table-cell office:value-type="float" office:value="24.64713" calcext:value-type="float">
            <text:p>24.64713</text:p>
          </table:table-cell>
          <table:table-cell office:value-type="float" office:value="7144" calcext:value-type="float">
            <text:p>7144</text:p>
          </table:table-cell>
          <table:table-cell office:value-type="float" office:value="1785.2" calcext:value-type="float">
            <text:p>1785.2</text:p>
          </table:table-cell>
          <table:table-cell office:value-type="float" office:value="1786.15" calcext:value-type="float">
            <text:p>1786.15</text:p>
          </table:table-cell>
          <table:table-cell office:value-type="float" office:value="1783.9" calcext:value-type="float">
            <text:p>1783.9</text:p>
          </table:table-cell>
          <table:table-cell office:value-type="float" office:value="1784.85" calcext:value-type="float">
            <text:p>1784.85</text:p>
          </table:table-cell>
          <table:table-cell office:value-type="float" office:value="742.4143" calcext:value-type="float">
            <text:p>742.4143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string" calcext:value-type="string">
            <text:p>2026-07-04T20:32:10.832Z</text:p>
          </table:table-cell>
          <table:table-cell office:value-type="float" office:value="63179.38" calcext:value-type="float">
            <text:p>63179.38</text:p>
          </table:table-cell>
          <table:table-cell office:value-type="float" office:value="63202" calcext:value-type="float">
            <text:p>63202</text:p>
          </table:table-cell>
          <table:table-cell office:value-type="float" office:value="63155.37" calcext:value-type="float">
            <text:p>63155.37</text:p>
          </table:table-cell>
          <table:table-cell office:value-type="float" office:value="63194" calcext:value-type="float">
            <text:p>63194</text:p>
          </table:table-cell>
          <table:table-cell office:value-type="float" office:value="51.28439" calcext:value-type="float">
            <text:p>51.28439</text:p>
          </table:table-cell>
          <table:table-cell office:value-type="float" office:value="5701" calcext:value-type="float">
            <text:p>5701</text:p>
          </table:table-cell>
          <table:table-cell office:value-type="float" office:value="1784.81" calcext:value-type="float">
            <text:p>1784.81</text:p>
          </table:table-cell>
          <table:table-cell office:value-type="float" office:value="1786.84" calcext:value-type="float">
            <text:p>1786.84</text:p>
          </table:table-cell>
          <table:table-cell office:value-type="float" office:value="1783.84" calcext:value-type="float">
            <text:p>1783.84</text:p>
          </table:table-cell>
          <table:table-cell office:value-type="float" office:value="1786.08" calcext:value-type="float">
            <text:p>1786.08</text:p>
          </table:table-cell>
          <table:table-cell office:value-type="float" office:value="399.6266" calcext:value-type="float">
            <text:p>399.6266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2026-07-04T20:37:10.846Z</text:p>
          </table:table-cell>
          <table:table-cell office:value-type="float" office:value="63199.99" calcext:value-type="float">
            <text:p>63199.99</text:p>
          </table:table-cell>
          <table:table-cell office:value-type="float" office:value="63267.48" calcext:value-type="float">
            <text:p>63267.48</text:p>
          </table:table-cell>
          <table:table-cell office:value-type="float" office:value="63194" calcext:value-type="float">
            <text:p>63194</text:p>
          </table:table-cell>
          <table:table-cell office:value-type="float" office:value="63267.47" calcext:value-type="float">
            <text:p>63267.47</text:p>
          </table:table-cell>
          <table:table-cell office:value-type="float" office:value="7.6035" calcext:value-type="float">
            <text:p>7.6035</text:p>
          </table:table-cell>
          <table:table-cell office:value-type="float" office:value="5078" calcext:value-type="float">
            <text:p>5078</text:p>
          </table:table-cell>
          <table:table-cell office:value-type="float" office:value="1786.35" calcext:value-type="float">
            <text:p>1786.35</text:p>
          </table:table-cell>
          <table:table-cell office:value-type="float" office:value="1788.26" calcext:value-type="float">
            <text:p>1788.26</text:p>
          </table:table-cell>
          <table:table-cell office:value-type="float" office:value="1785.68" calcext:value-type="float">
            <text:p>1785.68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276.9768" calcext:value-type="float">
            <text:p>276.9768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2026-07-04T20:42:10.868Z</text:p>
          </table:table-cell>
          <table:table-cell office:value-type="float" office:value="63267.47" calcext:value-type="float">
            <text:p>63267.47</text:p>
          </table:table-cell>
          <table:table-cell office:value-type="float" office:value="63320" calcext:value-type="float">
            <text:p>63320</text:p>
          </table:table-cell>
          <table:table-cell office:value-type="float" office:value="63224.87" calcext:value-type="float">
            <text:p>63224.87</text:p>
          </table:table-cell>
          <table:table-cell office:value-type="float" office:value="63258.46" calcext:value-type="float">
            <text:p>63258.46</text:p>
          </table:table-cell>
          <table:table-cell office:value-type="float" office:value="43.06233" calcext:value-type="float">
            <text:p>43.06233</text:p>
          </table:table-cell>
          <table:table-cell office:value-type="float" office:value="8488" calcext:value-type="float">
            <text:p>8488</text:p>
          </table:table-cell>
          <table:table-cell office:value-type="float" office:value="1788.23" calcext:value-type="float">
            <text:p>1788.23</text:p>
          </table:table-cell>
          <table:table-cell office:value-type="float" office:value="1790" calcext:value-type="float">
            <text:p>1790</text:p>
          </table:table-cell>
          <table:table-cell office:value-type="float" office:value="1787.51" calcext:value-type="float">
            <text:p>1787.51</text:p>
          </table:table-cell>
          <table:table-cell office:value-type="float" office:value="1789.03" calcext:value-type="float">
            <text:p>1789.03</text:p>
          </table:table-cell>
          <table:table-cell office:value-type="float" office:value="507.1438" calcext:value-type="float">
            <text:p>507.1438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2026-07-04T20:47:10.869Z</text:p>
          </table:table-cell>
          <table:table-cell office:value-type="float" office:value="63262.01" calcext:value-type="float">
            <text:p>63262.01</text:p>
          </table:table-cell>
          <table:table-cell office:value-type="float" office:value="63320" calcext:value-type="float">
            <text:p>633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319.99" calcext:value-type="float">
            <text:p>63319.99</text:p>
          </table:table-cell>
          <table:table-cell office:value-type="float" office:value="27.21592" calcext:value-type="float">
            <text:p>27.21592</text:p>
          </table:table-cell>
          <table:table-cell office:value-type="float" office:value="5450" calcext:value-type="float">
            <text:p>5450</text:p>
          </table:table-cell>
          <table:table-cell office:value-type="float" office:value="1789.18" calcext:value-type="float">
            <text:p>1789.18</text:p>
          </table:table-cell>
          <table:table-cell office:value-type="float" office:value="1790.34" calcext:value-type="float">
            <text:p>1790.34</text:p>
          </table:table-cell>
          <table:table-cell office:value-type="float" office:value="1788.47" calcext:value-type="float">
            <text:p>1788.47</text:p>
          </table:table-cell>
          <table:table-cell office:value-type="float" office:value="1789.34" calcext:value-type="float">
            <text:p>1789.34</text:p>
          </table:table-cell>
          <table:table-cell office:value-type="float" office:value="241.6544" calcext:value-type="float">
            <text:p>241.654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2026-07-04T20:52:10.890Z</text:p>
          </table:table-cell>
          <table:table-cell office:value-type="float" office:value="63320" calcext:value-type="float">
            <text:p>63320</text:p>
          </table:table-cell>
          <table:table-cell office:value-type="float" office:value="63322" calcext:value-type="float">
            <text:p>63322</text:p>
          </table:table-cell>
          <table:table-cell office:value-type="float" office:value="63302.92" calcext:value-type="float">
            <text:p>63302.92</text:p>
          </table:table-cell>
          <table:table-cell office:value-type="float" office:value="63308.01" calcext:value-type="float">
            <text:p>63308.01</text:p>
          </table:table-cell>
          <table:table-cell office:value-type="float" office:value="5.88727" calcext:value-type="float">
            <text:p>5.88727</text:p>
          </table:table-cell>
          <table:table-cell office:value-type="float" office:value="2778" calcext:value-type="float">
            <text:p>2778</text:p>
          </table:table-cell>
          <table:table-cell office:value-type="float" office:value="1789.33" calcext:value-type="float">
            <text:p>1789.33</text:p>
          </table:table-cell>
          <table:table-cell office:value-type="float" office:value="1789.63" calcext:value-type="float">
            <text:p>1789.63</text:p>
          </table:table-cell>
          <table:table-cell office:value-type="float" office:value="1788.24" calcext:value-type="float">
            <text:p>1788.24</text:p>
          </table:table-cell>
          <table:table-cell office:value-type="float" office:value="1788.26" calcext:value-type="float">
            <text:p>1788.26</text:p>
          </table:table-cell>
          <table:table-cell office:value-type="float" office:value="171.0462" calcext:value-type="float">
            <text:p>171.046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2026-07-04T20:57:10.893Z</text:p>
          </table:table-cell>
          <table:table-cell office:value-type="float" office:value="63310" calcext:value-type="float">
            <text:p>63310</text:p>
          </table:table-cell>
          <table:table-cell office:value-type="float" office:value="63333.64" calcext:value-type="float">
            <text:p>63333.64</text:p>
          </table:table-cell>
          <table:table-cell office:value-type="float" office:value="63290" calcext:value-type="float">
            <text:p>63290</text:p>
          </table:table-cell>
          <table:table-cell office:value-type="float" office:value="63293.71" calcext:value-type="float">
            <text:p>63293.71</text:p>
          </table:table-cell>
          <table:table-cell office:value-type="float" office:value="26.66117" calcext:value-type="float">
            <text:p>26.66117</text:p>
          </table:table-cell>
          <table:table-cell office:value-type="float" office:value="5770" calcext:value-type="float">
            <text:p>5770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1789.55" calcext:value-type="float">
            <text:p>1789.55</text:p>
          </table:table-cell>
          <table:table-cell office:value-type="float" office:value="1787.84" calcext:value-type="float">
            <text:p>1787.84</text:p>
          </table:table-cell>
          <table:table-cell office:value-type="float" office:value="1788.56" calcext:value-type="float">
            <text:p>1788.56</text:p>
          </table:table-cell>
          <table:table-cell office:value-type="float" office:value="729.1062" calcext:value-type="float">
            <text:p>729.1062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026-07-04T21:02:10.913Z</text:p>
          </table:table-cell>
          <table:table-cell table:number-columns-repeated="2" office:value-type="float" office:value="63293.71" calcext:value-type="float">
            <text:p>63293.71</text:p>
          </table:table-cell>
          <table:table-cell table:number-columns-repeated="2" office:value-type="float" office:value="63206" calcext:value-type="float">
            <text:p>63206</text:p>
          </table:table-cell>
          <table:table-cell office:value-type="float" office:value="7.75506" calcext:value-type="float">
            <text:p>7.75506</text:p>
          </table:table-cell>
          <table:table-cell office:value-type="float" office:value="5274" calcext:value-type="float">
            <text:p>5274</text:p>
          </table:table-cell>
          <table:table-cell office:value-type="float" office:value="1788.27" calcext:value-type="float">
            <text:p>1788.27</text:p>
          </table:table-cell>
          <table:table-cell office:value-type="float" office:value="1788.61" calcext:value-type="float">
            <text:p>1788.61</text:p>
          </table:table-cell>
          <table:table-cell office:value-type="float" office:value="1786.24" calcext:value-type="float">
            <text:p>1786.24</text:p>
          </table:table-cell>
          <table:table-cell office:value-type="float" office:value="1786.99" calcext:value-type="float">
            <text:p>1786.99</text:p>
          </table:table-cell>
          <table:table-cell office:value-type="float" office:value="225.7931" calcext:value-type="float">
            <text:p>225.7931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2026-07-04T21:07:10.934Z</text:p>
          </table:table-cell>
          <table:table-cell office:value-type="float" office:value="63222.42" calcext:value-type="float">
            <text:p>63222.42</text:p>
          </table:table-cell>
          <table:table-cell office:value-type="float" office:value="63252" calcext:value-type="float">
            <text:p>63252</text:p>
          </table:table-cell>
          <table:table-cell office:value-type="float" office:value="63202" calcext:value-type="float">
            <text:p>63202</text:p>
          </table:table-cell>
          <table:table-cell office:value-type="float" office:value="63244" calcext:value-type="float">
            <text:p>63244</text:p>
          </table:table-cell>
          <table:table-cell office:value-type="float" office:value="21.92294" calcext:value-type="float">
            <text:p>21.92294</text:p>
          </table:table-cell>
          <table:table-cell office:value-type="float" office:value="5701" calcext:value-type="float">
            <text:p>5701</text:p>
          </table:table-cell>
          <table:table-cell office:value-type="float" office:value="1786.94" calcext:value-type="float">
            <text:p>1786.94</text:p>
          </table:table-cell>
          <table:table-cell office:value-type="float" office:value="1788.16" calcext:value-type="float">
            <text:p>1788.16</text:p>
          </table:table-cell>
          <table:table-cell office:value-type="float" office:value="1786.63" calcext:value-type="float">
            <text:p>1786.63</text:p>
          </table:table-cell>
          <table:table-cell office:value-type="float" office:value="1787.29" calcext:value-type="float">
            <text:p>1787.29</text:p>
          </table:table-cell>
          <table:table-cell office:value-type="float" office:value="432.7487" calcext:value-type="float">
            <text:p>432.748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2026-07-04T21:12:10.938Z</text:p>
          </table:table-cell>
          <table:table-cell office:value-type="float" office:value="63240.01" calcext:value-type="float">
            <text:p>63240.01</text:p>
          </table:table-cell>
          <table:table-cell office:value-type="float" office:value="63280" calcext:value-type="float">
            <text:p>63280</text:p>
          </table:table-cell>
          <table:table-cell office:value-type="float" office:value="63213.52" calcext:value-type="float">
            <text:p>63213.52</text:p>
          </table:table-cell>
          <table:table-cell office:value-type="float" office:value="63279.99" calcext:value-type="float">
            <text:p>63279.99</text:p>
          </table:table-cell>
          <table:table-cell office:value-type="float" office:value="18.1822" calcext:value-type="float">
            <text:p>18.1822</text:p>
          </table:table-cell>
          <table:table-cell office:value-type="float" office:value="4051" calcext:value-type="float">
            <text:p>4051</text:p>
          </table:table-cell>
          <table:table-cell office:value-type="float" office:value="1787.21" calcext:value-type="float">
            <text:p>1787.21</text:p>
          </table:table-cell>
          <table:table-cell office:value-type="float" office:value="1788.6" calcext:value-type="float">
            <text:p>1788.6</text:p>
          </table:table-cell>
          <table:table-cell office:value-type="float" office:value="1786.52" calcext:value-type="float">
            <text:p>1786.52</text:p>
          </table:table-cell>
          <table:table-cell office:value-type="float" office:value="1788.59" calcext:value-type="float">
            <text:p>1788.59</text:p>
          </table:table-cell>
          <table:table-cell office:value-type="float" office:value="237.1962" calcext:value-type="float">
            <text:p>237.19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2026-07-04T21:17:10.958Z</text:p>
          </table:table-cell>
          <table:table-cell office:value-type="float" office:value="63264" calcext:value-type="float">
            <text:p>63264</text:p>
          </table:table-cell>
          <table:table-cell office:value-type="float" office:value="63381.99" calcext:value-type="float">
            <text:p>63381.99</text:p>
          </table:table-cell>
          <table:table-cell office:value-type="float" office:value="63264" calcext:value-type="float">
            <text:p>63264</text:p>
          </table:table-cell>
          <table:table-cell office:value-type="float" office:value="63369.16" calcext:value-type="float">
            <text:p>63369.16</text:p>
          </table:table-cell>
          <table:table-cell office:value-type="float" office:value="15.09638" calcext:value-type="float">
            <text:p>15.09638</text:p>
          </table:table-cell>
          <table:table-cell office:value-type="float" office:value="7763" calcext:value-type="float">
            <text:p>7763</text:p>
          </table:table-cell>
          <table:table-cell office:value-type="float" office:value="1788" calcext:value-type="float">
            <text:p>1788</text:p>
          </table:table-cell>
          <table:table-cell office:value-type="float" office:value="1791.46" calcext:value-type="float">
            <text:p>1791.46</text:p>
          </table:table-cell>
          <table:table-cell office:value-type="float" office:value="1788" calcext:value-type="float">
            <text:p>1788</text:p>
          </table:table-cell>
          <table:table-cell office:value-type="float" office:value="1790.34" calcext:value-type="float">
            <text:p>1790.34</text:p>
          </table:table-cell>
          <table:table-cell office:value-type="float" office:value="377.1525" calcext:value-type="float">
            <text:p>377.152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2026-07-04T21:22:10.973Z</text:p>
          </table:table-cell>
          <table:table-cell office:value-type="float" office:value="63369.17" calcext:value-type="float">
            <text:p>63369.17</text:p>
          </table:table-cell>
          <table:table-cell office:value-type="float" office:value="63422" calcext:value-type="float">
            <text:p>63422</text:p>
          </table:table-cell>
          <table:table-cell office:value-type="float" office:value="63350.36" calcext:value-type="float">
            <text:p>63350.36</text:p>
          </table:table-cell>
          <table:table-cell office:value-type="float" office:value="63396.01" calcext:value-type="float">
            <text:p>63396.01</text:p>
          </table:table-cell>
          <table:table-cell office:value-type="float" office:value="21.65589" calcext:value-type="float">
            <text:p>21.65589</text:p>
          </table:table-cell>
          <table:table-cell office:value-type="float" office:value="5370" calcext:value-type="float">
            <text:p>5370</text:p>
          </table:table-cell>
          <table:table-cell office:value-type="float" office:value="1790.35" calcext:value-type="float">
            <text:p>1790.35</text:p>
          </table:table-cell>
          <table:table-cell office:value-type="float" office:value="1792.26" calcext:value-type="float">
            <text:p>1792.26</text:p>
          </table:table-cell>
          <table:table-cell office:value-type="float" office:value="1789.89" calcext:value-type="float">
            <text:p>1789.89</text:p>
          </table:table-cell>
          <table:table-cell office:value-type="float" office:value="1791.95" calcext:value-type="float">
            <text:p>1791.95</text:p>
          </table:table-cell>
          <table:table-cell office:value-type="float" office:value="128.0407" calcext:value-type="float">
            <text:p>128.04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6-07-04T21:27:10.975Z</text:p>
          </table:table-cell>
          <table:table-cell office:value-type="float" office:value="63396.01" calcext:value-type="float">
            <text:p>63396.01</text:p>
          </table:table-cell>
          <table:table-cell office:value-type="float" office:value="63446" calcext:value-type="float">
            <text:p>63446</text:p>
          </table:table-cell>
          <table:table-cell office:value-type="float" office:value="63382" calcext:value-type="float">
            <text:p>63382</text:p>
          </table:table-cell>
          <table:table-cell office:value-type="float" office:value="63402.5" calcext:value-type="float">
            <text:p>63402.5</text:p>
          </table:table-cell>
          <table:table-cell office:value-type="float" office:value="24.75205" calcext:value-type="float">
            <text:p>24.75205</text:p>
          </table:table-cell>
          <table:table-cell office:value-type="float" office:value="5999" calcext:value-type="float">
            <text:p>5999</text:p>
          </table:table-cell>
          <table:table-cell office:value-type="float" office:value="1791.88" calcext:value-type="float">
            <text:p>1791.88</text:p>
          </table:table-cell>
          <table:table-cell office:value-type="float" office:value="1793" calcext:value-type="float">
            <text:p>1793</text:p>
          </table:table-cell>
          <table:table-cell office:value-type="float" office:value="1790.94" calcext:value-type="float">
            <text:p>1790.94</text:p>
          </table:table-cell>
          <table:table-cell office:value-type="float" office:value="1792.67" calcext:value-type="float">
            <text:p>1792.67</text:p>
          </table:table-cell>
          <table:table-cell office:value-type="float" office:value="311.561" calcext:value-type="float">
            <text:p>311.561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2026-07-04T21:32:10.994Z</text:p>
          </table:table-cell>
          <table:table-cell office:value-type="float" office:value="63394" calcext:value-type="float">
            <text:p>63394</text:p>
          </table:table-cell>
          <table:table-cell office:value-type="float" office:value="63440" calcext:value-type="float">
            <text:p>63440</text:p>
          </table:table-cell>
          <table:table-cell office:value-type="float" office:value="63393.99" calcext:value-type="float">
            <text:p>63393.99</text:p>
          </table:table-cell>
          <table:table-cell office:value-type="float" office:value="63439.99" calcext:value-type="float">
            <text:p>63439.99</text:p>
          </table:table-cell>
          <table:table-cell office:value-type="float" office:value="32.18757" calcext:value-type="float">
            <text:p>32.18757</text:p>
          </table:table-cell>
          <table:table-cell office:value-type="float" office:value="3724" calcext:value-type="float">
            <text:p>3724</text:p>
          </table:table-cell>
          <table:table-cell office:value-type="float" office:value="1791.79" calcext:value-type="float">
            <text:p>1791.79</text:p>
          </table:table-cell>
          <table:table-cell office:value-type="float" office:value="1793.8" calcext:value-type="float">
            <text:p>1793.8</text:p>
          </table:table-cell>
          <table:table-cell office:value-type="float" office:value="1791.79" calcext:value-type="float">
            <text:p>1791.79</text:p>
          </table:table-cell>
          <table:table-cell office:value-type="float" office:value="1793.56" calcext:value-type="float">
            <text:p>1793.56</text:p>
          </table:table-cell>
          <table:table-cell office:value-type="float" office:value="284.3217" calcext:value-type="float">
            <text:p>284.3217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2026-07-04T21:37:11.014Z</text:p>
          </table:table-cell>
          <table:table-cell office:value-type="float" office:value="63440" calcext:value-type="float">
            <text:p>63440</text:p>
          </table:table-cell>
          <table:table-cell office:value-type="float" office:value="63448" calcext:value-type="float">
            <text:p>63448</text:p>
          </table:table-cell>
          <table:table-cell table:number-columns-repeated="2" office:value-type="float" office:value="63362.22" calcext:value-type="float">
            <text:p>63362.22</text:p>
          </table:table-cell>
          <table:table-cell office:value-type="float" office:value="29.29827" calcext:value-type="float">
            <text:p>29.29827</text:p>
          </table:table-cell>
          <table:table-cell office:value-type="float" office:value="4781" calcext:value-type="float">
            <text:p>4781</text:p>
          </table:table-cell>
          <table:table-cell office:value-type="float" office:value="1793.77" calcext:value-type="float">
            <text:p>1793.77</text:p>
          </table:table-cell>
          <table:table-cell office:value-type="float" office:value="1794.25" calcext:value-type="float">
            <text:p>1794.25</text:p>
          </table:table-cell>
          <table:table-cell office:value-type="float" office:value="1792.27" calcext:value-type="float">
            <text:p>1792.27</text:p>
          </table:table-cell>
          <table:table-cell office:value-type="float" office:value="1792.61" calcext:value-type="float">
            <text:p>1792.61</text:p>
          </table:table-cell>
          <table:table-cell office:value-type="float" office:value="161.7823" calcext:value-type="float">
            <text:p>161.782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2026-07-04T21:42:11.033Z</text:p>
          </table:table-cell>
          <table:table-cell office:value-type="float" office:value="63362.46" calcext:value-type="float">
            <text:p>63362.46</text:p>
          </table:table-cell>
          <table:table-cell office:value-type="float" office:value="63372.66" calcext:value-type="float">
            <text:p>63372.66</text:p>
          </table:table-cell>
          <table:table-cell table:number-columns-repeated="2" office:value-type="float" office:value="63339.33" calcext:value-type="float">
            <text:p>63339.33</text:p>
          </table:table-cell>
          <table:table-cell office:value-type="float" office:value="9.02692" calcext:value-type="float">
            <text:p>9.02692</text:p>
          </table:table-cell>
          <table:table-cell office:value-type="float" office:value="5516" calcext:value-type="float">
            <text:p>5516</text:p>
          </table:table-cell>
          <table:table-cell office:value-type="float" office:value="1792.61" calcext:value-type="float">
            <text:p>1792.61</text:p>
          </table:table-cell>
          <table:table-cell office:value-type="float" office:value="1793.27" calcext:value-type="float">
            <text:p>1793.27</text:p>
          </table:table-cell>
          <table:table-cell office:value-type="float" office:value="1791.71" calcext:value-type="float">
            <text:p>1791.71</text:p>
          </table:table-cell>
          <table:table-cell office:value-type="float" office:value="1791.98" calcext:value-type="float">
            <text:p>1791.98</text:p>
          </table:table-cell>
          <table:table-cell office:value-type="float" office:value="153.1922" calcext:value-type="float">
            <text:p>153.192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2026-07-04T21:47:11.052Z</text:p>
          </table:table-cell>
          <table:table-cell office:value-type="float" office:value="63339.34" calcext:value-type="float">
            <text:p>63339.34</text:p>
          </table:table-cell>
          <table:table-cell office:value-type="float" office:value="63345.35" calcext:value-type="float">
            <text:p>63345.35</text:p>
          </table:table-cell>
          <table:table-cell office:value-type="float" office:value="63290.96" calcext:value-type="float">
            <text:p>63290.96</text:p>
          </table:table-cell>
          <table:table-cell office:value-type="float" office:value="63298.35" calcext:value-type="float">
            <text:p>63298.35</text:p>
          </table:table-cell>
          <table:table-cell office:value-type="float" office:value="12.1926" calcext:value-type="float">
            <text:p>12.1926</text:p>
          </table:table-cell>
          <table:table-cell office:value-type="float" office:value="4854" calcext:value-type="float">
            <text:p>4854</text:p>
          </table:table-cell>
          <table:table-cell office:value-type="float" office:value="1791.78" calcext:value-type="float">
            <text:p>1791.78</text:p>
          </table:table-cell>
          <table:table-cell office:value-type="float" office:value="1792.37" calcext:value-type="float">
            <text:p>1792.37</text:p>
          </table:table-cell>
          <table:table-cell office:value-type="float" office:value="1789.49" calcext:value-type="float">
            <text:p>1789.49</text:p>
          </table:table-cell>
          <table:table-cell office:value-type="float" office:value="1790.6" calcext:value-type="float">
            <text:p>1790.6</text:p>
          </table:table-cell>
          <table:table-cell office:value-type="float" office:value="159.9737" calcext:value-type="float">
            <text:p>159.9737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2026-07-04T21:52:11.071Z</text:p>
          </table:table-cell>
          <table:table-cell office:value-type="float" office:value="63298.01" calcext:value-type="float">
            <text:p>63298.01</text:p>
          </table:table-cell>
          <table:table-cell office:value-type="float" office:value="63302.83" calcext:value-type="float">
            <text:p>63302.83</text:p>
          </table:table-cell>
          <table:table-cell office:value-type="float" office:value="63270.21" calcext:value-type="float">
            <text:p>63270.21</text:p>
          </table:table-cell>
          <table:table-cell office:value-type="float" office:value="63283.99" calcext:value-type="float">
            <text:p>63283.99</text:p>
          </table:table-cell>
          <table:table-cell office:value-type="float" office:value="27.03964" calcext:value-type="float">
            <text:p>27.03964</text:p>
          </table:table-cell>
          <table:table-cell office:value-type="float" office:value="4563" calcext:value-type="float">
            <text:p>4563</text:p>
          </table:table-cell>
          <table:table-cell office:value-type="float" office:value="1790.37" calcext:value-type="float">
            <text:p>1790.37</text:p>
          </table:table-cell>
          <table:table-cell office:value-type="float" office:value="1790.74" calcext:value-type="float">
            <text:p>1790.74</text:p>
          </table:table-cell>
          <table:table-cell table:number-columns-repeated="2" office:value-type="float" office:value="1788.6" calcext:value-type="float">
            <text:p>1788.6</text:p>
          </table:table-cell>
          <table:table-cell office:value-type="float" office:value="145.1435" calcext:value-type="float">
            <text:p>145.1435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2026-07-04T21:57:11.086Z</text:p>
          </table:table-cell>
          <table:table-cell office:value-type="float" office:value="63284" calcext:value-type="float">
            <text:p>63284</text:p>
          </table:table-cell>
          <table:table-cell office:value-type="float" office:value="63329.43" calcext:value-type="float">
            <text:p>63329.43</text:p>
          </table:table-cell>
          <table:table-cell office:value-type="float" office:value="63283.99" calcext:value-type="float">
            <text:p>63283.99</text:p>
          </table:table-cell>
          <table:table-cell office:value-type="float" office:value="63329.43" calcext:value-type="float">
            <text:p>63329.43</text:p>
          </table:table-cell>
          <table:table-cell office:value-type="float" office:value="18.09603" calcext:value-type="float">
            <text:p>18.09603</text:p>
          </table:table-cell>
          <table:table-cell office:value-type="float" office:value="3866" calcext:value-type="float">
            <text:p>3866</text:p>
          </table:table-cell>
          <table:table-cell office:value-type="float" office:value="1788.86" calcext:value-type="float">
            <text:p>1788.86</text:p>
          </table:table-cell>
          <table:table-cell office:value-type="float" office:value="1790.31" calcext:value-type="float">
            <text:p>1790.31</text:p>
          </table:table-cell>
          <table:table-cell office:value-type="float" office:value="1788.59" calcext:value-type="float">
            <text:p>1788.59</text:p>
          </table:table-cell>
          <table:table-cell office:value-type="float" office:value="1790.18" calcext:value-type="float">
            <text:p>1790.18</text:p>
          </table:table-cell>
          <table:table-cell office:value-type="float" office:value="267.8068" calcext:value-type="float">
            <text:p>267.8068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2026-07-04T22:02:11.086Z</text:p>
          </table:table-cell>
          <table:table-cell office:value-type="float" office:value="63329.42" calcext:value-type="float">
            <text:p>63329.42</text:p>
          </table:table-cell>
          <table:table-cell office:value-type="float" office:value="63329.43" calcext:value-type="float">
            <text:p>63329.43</text:p>
          </table:table-cell>
          <table:table-cell office:value-type="float" office:value="63294" calcext:value-type="float">
            <text:p>63294</text:p>
          </table:table-cell>
          <table:table-cell office:value-type="float" office:value="63298.01" calcext:value-type="float">
            <text:p>63298.01</text:p>
          </table:table-cell>
          <table:table-cell office:value-type="float" office:value="14.86008" calcext:value-type="float">
            <text:p>14.86008</text:p>
          </table:table-cell>
          <table:table-cell office:value-type="float" office:value="3024" calcext:value-type="float">
            <text:p>3024</text:p>
          </table:table-cell>
          <table:table-cell office:value-type="float" office:value="1789.83" calcext:value-type="float">
            <text:p>1789.83</text:p>
          </table:table-cell>
          <table:table-cell office:value-type="float" office:value="1790.59" calcext:value-type="float">
            <text:p>1790.59</text:p>
          </table:table-cell>
          <table:table-cell table:number-columns-repeated="2" office:value-type="float" office:value="1787.36" calcext:value-type="float">
            <text:p>1787.36</text:p>
          </table:table-cell>
          <table:table-cell office:value-type="float" office:value="171.0345" calcext:value-type="float">
            <text:p>171.034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2026-07-04T22:07:11.087Z</text:p>
          </table:table-cell>
          <table:table-cell table:number-columns-repeated="2" office:value-type="float" office:value="63302.01" calcext:value-type="float">
            <text:p>63302.01</text:p>
          </table:table-cell>
          <table:table-cell office:value-type="float" office:value="63246.36" calcext:value-type="float">
            <text:p>63246.36</text:p>
          </table:table-cell>
          <table:table-cell office:value-type="float" office:value="63254.01" calcext:value-type="float">
            <text:p>63254.01</text:p>
          </table:table-cell>
          <table:table-cell office:value-type="float" office:value="8.73832" calcext:value-type="float">
            <text:p>8.73832</text:p>
          </table:table-cell>
          <table:table-cell office:value-type="float" office:value="3698" calcext:value-type="float">
            <text:p>3698</text:p>
          </table:table-cell>
          <table:table-cell table:number-columns-repeated="2" office:value-type="float" office:value="1787.87" calcext:value-type="float">
            <text:p>1787.87</text:p>
          </table:table-cell>
          <table:table-cell office:value-type="float" office:value="1785.75" calcext:value-type="float">
            <text:p>1785.75</text:p>
          </table:table-cell>
          <table:table-cell office:value-type="float" office:value="1786.11" calcext:value-type="float">
            <text:p>1786.11</text:p>
          </table:table-cell>
          <table:table-cell office:value-type="float" office:value="362.4092" calcext:value-type="float">
            <text:p>362.409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string" calcext:value-type="string">
            <text:p>2026-07-04T22:12:11.105Z</text:p>
          </table:table-cell>
          <table:table-cell office:value-type="float" office:value="63254.01" calcext:value-type="float">
            <text:p>63254.01</text:p>
          </table:table-cell>
          <table:table-cell office:value-type="float" office:value="63277.16" calcext:value-type="float">
            <text:p>63277.16</text:p>
          </table:table-cell>
          <table:table-cell office:value-type="float" office:value="63216.6" calcext:value-type="float">
            <text:p>63216.6</text:p>
          </table:table-cell>
          <table:table-cell office:value-type="float" office:value="63216.61" calcext:value-type="float">
            <text:p>63216.61</text:p>
          </table:table-cell>
          <table:table-cell office:value-type="float" office:value="15.01984" calcext:value-type="float">
            <text:p>15.01984</text:p>
          </table:table-cell>
          <table:table-cell office:value-type="float" office:value="5101" calcext:value-type="float">
            <text:p>5101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1787.9" calcext:value-type="float">
            <text:p>1787.9</text:p>
          </table:table-cell>
          <table:table-cell office:value-type="float" office:value="1784.78" calcext:value-type="float">
            <text:p>1784.78</text:p>
          </table:table-cell>
          <table:table-cell office:value-type="float" office:value="1785.51" calcext:value-type="float">
            <text:p>1785.51</text:p>
          </table:table-cell>
          <table:table-cell office:value-type="float" office:value="180.6809" calcext:value-type="float">
            <text:p>180.6809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string" calcext:value-type="string">
            <text:p>2026-07-04T22:17:11.111Z</text:p>
          </table:table-cell>
          <table:table-cell office:value-type="float" office:value="63226" calcext:value-type="float">
            <text:p>63226</text:p>
          </table:table-cell>
          <table:table-cell office:value-type="float" office:value="63277.16" calcext:value-type="float">
            <text:p>63277.16</text:p>
          </table:table-cell>
          <table:table-cell office:value-type="float" office:value="63216.6" calcext:value-type="float">
            <text:p>63216.6</text:p>
          </table:table-cell>
          <table:table-cell office:value-type="float" office:value="63260" calcext:value-type="float">
            <text:p>63260</text:p>
          </table:table-cell>
          <table:table-cell office:value-type="float" office:value="22.79518" calcext:value-type="float">
            <text:p>22.79518</text:p>
          </table:table-cell>
          <table:table-cell office:value-type="float" office:value="4982" calcext:value-type="float">
            <text:p>4982</text:p>
          </table:table-cell>
          <table:table-cell office:value-type="float" office:value="1786.05" calcext:value-type="float">
            <text:p>1786.05</text:p>
          </table:table-cell>
          <table:table-cell office:value-type="float" office:value="1787.41" calcext:value-type="float">
            <text:p>1787.41</text:p>
          </table:table-cell>
          <table:table-cell office:value-type="float" office:value="1785.5" calcext:value-type="float">
            <text:p>1785.5</text:p>
          </table:table-cell>
          <table:table-cell office:value-type="float" office:value="1786.83" calcext:value-type="float">
            <text:p>1786.83</text:p>
          </table:table-cell>
          <table:table-cell office:value-type="float" office:value="168.9584" calcext:value-type="float">
            <text:p>168.9584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2026-07-04T22:22:11.113Z</text:p>
          </table:table-cell>
          <table:table-cell office:value-type="float" office:value="63252" calcext:value-type="float">
            <text:p>63252</text:p>
          </table:table-cell>
          <table:table-cell office:value-type="float" office:value="63303.87" calcext:value-type="float">
            <text:p>63303.87</text:p>
          </table:table-cell>
          <table:table-cell office:value-type="float" office:value="63251.99" calcext:value-type="float">
            <text:p>63251.99</text:p>
          </table:table-cell>
          <table:table-cell office:value-type="float" office:value="63256.3" calcext:value-type="float">
            <text:p>63256.3</text:p>
          </table:table-cell>
          <table:table-cell office:value-type="float" office:value="10.32485" calcext:value-type="float">
            <text:p>10.32485</text:p>
          </table:table-cell>
          <table:table-cell office:value-type="float" office:value="4674" calcext:value-type="float">
            <text:p>4674</text:p>
          </table:table-cell>
          <table:table-cell office:value-type="float" office:value="1786.55" calcext:value-type="float">
            <text:p>1786.55</text:p>
          </table:table-cell>
          <table:table-cell office:value-type="float" office:value="1788.97" calcext:value-type="float">
            <text:p>1788.97</text:p>
          </table:table-cell>
          <table:table-cell office:value-type="float" office:value="1786.14" calcext:value-type="float">
            <text:p>1786.14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218.2678" calcext:value-type="float">
            <text:p>218.2678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2026-07-04T22:27:11.131Z</text:p>
          </table:table-cell>
          <table:table-cell table:number-columns-repeated="2" office:value-type="float" office:value="63256.3" calcext:value-type="float">
            <text:p>63256.3</text:p>
          </table:table-cell>
          <table:table-cell table:number-columns-repeated="2" office:value-type="float" office:value="63206" calcext:value-type="float">
            <text:p>63206</text:p>
          </table:table-cell>
          <table:table-cell office:value-type="float" office:value="14.21942" calcext:value-type="float">
            <text:p>14.21942</text:p>
          </table:table-cell>
          <table:table-cell office:value-type="float" office:value="3908" calcext:value-type="float">
            <text:p>3908</text:p>
          </table:table-cell>
          <table:table-cell office:value-type="float" office:value="1786.49" calcext:value-type="float">
            <text:p>1786.49</text:p>
          </table:table-cell>
          <table:table-cell office:value-type="float" office:value="1786.5" calcext:value-type="float">
            <text:p>1786.5</text:p>
          </table:table-cell>
          <table:table-cell office:value-type="float" office:value="1784" calcext:value-type="float">
            <text:p>1784</text:p>
          </table:table-cell>
          <table:table-cell office:value-type="float" office:value="1784.42" calcext:value-type="float">
            <text:p>1784.42</text:p>
          </table:table-cell>
          <table:table-cell office:value-type="float" office:value="293.2411" calcext:value-type="float">
            <text:p>293.24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2026-07-04T22:32:11.149Z</text:p>
          </table:table-cell>
          <table:table-cell office:value-type="float" office:value="63206.01" calcext:value-type="float">
            <text:p>63206.01</text:p>
          </table:table-cell>
          <table:table-cell office:value-type="float" office:value="63230" calcext:value-type="float">
            <text:p>63230</text:p>
          </table:table-cell>
          <table:table-cell office:value-type="float" office:value="63200" calcext:value-type="float">
            <text:p>63200</text:p>
          </table:table-cell>
          <table:table-cell office:value-type="float" office:value="63229.28" calcext:value-type="float">
            <text:p>63229.28</text:p>
          </table:table-cell>
          <table:table-cell office:value-type="float" office:value="37.69143" calcext:value-type="float">
            <text:p>37.69143</text:p>
          </table:table-cell>
          <table:table-cell office:value-type="float" office:value="4329" calcext:value-type="float">
            <text:p>4329</text:p>
          </table:table-cell>
          <table:table-cell office:value-type="float" office:value="1784.43" calcext:value-type="float">
            <text:p>1784.43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1784.42" calcext:value-type="float">
            <text:p>1784.42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117.1329" calcext:value-type="float">
            <text:p>117.132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26-07-04T22:37:11.166Z</text:p>
          </table:table-cell>
          <table:table-cell office:value-type="float" office:value="63229.99" calcext:value-type="float">
            <text:p>63229.99</text:p>
          </table:table-cell>
          <table:table-cell office:value-type="float" office:value="63242.01" calcext:value-type="float">
            <text:p>63242.01</text:p>
          </table:table-cell>
          <table:table-cell office:value-type="float" office:value="63209.06" calcext:value-type="float">
            <text:p>63209.06</text:p>
          </table:table-cell>
          <table:table-cell office:value-type="float" office:value="63242" calcext:value-type="float">
            <text:p>63242</text:p>
          </table:table-cell>
          <table:table-cell office:value-type="float" office:value="27.96476" calcext:value-type="float">
            <text:p>27.96476</text:p>
          </table:table-cell>
          <table:table-cell office:value-type="float" office:value="2886" calcext:value-type="float">
            <text:p>2886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1786.22" calcext:value-type="float">
            <text:p>1786.22</text:p>
          </table:table-cell>
          <table:table-cell office:value-type="float" office:value="1785.3" calcext:value-type="float">
            <text:p>1785.3</text:p>
          </table:table-cell>
          <table:table-cell office:value-type="float" office:value="1786.05" calcext:value-type="float">
            <text:p>1786.05</text:p>
          </table:table-cell>
          <table:table-cell office:value-type="float" office:value="89.8535" calcext:value-type="float">
            <text:p>89.853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2026-07-04T22:42:11.183Z</text:p>
          </table:table-cell>
          <table:table-cell table:number-columns-repeated="2" office:value-type="float" office:value="63242.01" calcext:value-type="float">
            <text:p>63242.01</text:p>
          </table:table-cell>
          <table:table-cell office:value-type="float" office:value="63180" calcext:value-type="float">
            <text:p>63180</text:p>
          </table:table-cell>
          <table:table-cell office:value-type="float" office:value="63205.99" calcext:value-type="float">
            <text:p>63205.99</text:p>
          </table:table-cell>
          <table:table-cell office:value-type="float" office:value="7.51718" calcext:value-type="float">
            <text:p>7.51718</text:p>
          </table:table-cell>
          <table:table-cell office:value-type="float" office:value="3891" calcext:value-type="float">
            <text:p>3891</text:p>
          </table:table-cell>
          <table:table-cell office:value-type="float" office:value="1786.04" calcext:value-type="float">
            <text:p>1786.04</text:p>
          </table:table-cell>
          <table:table-cell office:value-type="float" office:value="1786.21" calcext:value-type="float">
            <text:p>1786.21</text:p>
          </table:table-cell>
          <table:table-cell office:value-type="float" office:value="1784.84" calcext:value-type="float">
            <text:p>1784.84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154.0931" calcext:value-type="float">
            <text:p>154.09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2026-07-04T22:47:11.200Z</text:p>
          </table:table-cell>
          <table:table-cell office:value-type="float" office:value="63202" calcext:value-type="float">
            <text:p>63202</text:p>
          </table:table-cell>
          <table:table-cell office:value-type="float" office:value="63218.01" calcext:value-type="float">
            <text:p>63218.01</text:p>
          </table:table-cell>
          <table:table-cell office:value-type="float" office:value="63168" calcext:value-type="float">
            <text:p>63168</text:p>
          </table:table-cell>
          <table:table-cell office:value-type="float" office:value="63168.01" calcext:value-type="float">
            <text:p>63168.01</text:p>
          </table:table-cell>
          <table:table-cell office:value-type="float" office:value="44.38857" calcext:value-type="float">
            <text:p>44.38857</text:p>
          </table:table-cell>
          <table:table-cell office:value-type="float" office:value="3544" calcext:value-type="float">
            <text:p>3544</text:p>
          </table:table-cell>
          <table:table-cell office:value-type="float" office:value="1785.6" calcext:value-type="float">
            <text:p>1785.6</text:p>
          </table:table-cell>
          <table:table-cell office:value-type="float" office:value="1785.82" calcext:value-type="float">
            <text:p>1785.82</text:p>
          </table:table-cell>
          <table:table-cell office:value-type="float" office:value="1782.19" calcext:value-type="float">
            <text:p>1782.19</text:p>
          </table:table-cell>
          <table:table-cell office:value-type="float" office:value="1782.61" calcext:value-type="float">
            <text:p>1782.61</text:p>
          </table:table-cell>
          <table:table-cell office:value-type="float" office:value="411.0748" calcext:value-type="float">
            <text:p>411.074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string" calcext:value-type="string">
            <text:p>2026-07-04T22:52:11.217Z</text:p>
          </table:table-cell>
          <table:table-cell office:value-type="float" office:value="63168" calcext:value-type="float">
            <text:p>63168</text:p>
          </table:table-cell>
          <table:table-cell office:value-type="float" office:value="63209.55" calcext:value-type="float">
            <text:p>63209.55</text:p>
          </table:table-cell>
          <table:table-cell office:value-type="float" office:value="63160" calcext:value-type="float">
            <text:p>63160</text:p>
          </table:table-cell>
          <table:table-cell office:value-type="float" office:value="63198.92" calcext:value-type="float">
            <text:p>63198.92</text:p>
          </table:table-cell>
          <table:table-cell office:value-type="float" office:value="112.02842" calcext:value-type="float">
            <text:p>112.02842</text:p>
          </table:table-cell>
          <table:table-cell office:value-type="float" office:value="5143" calcext:value-type="float">
            <text:p>5143</text:p>
          </table:table-cell>
          <table:table-cell office:value-type="float" office:value="1782.83" calcext:value-type="float">
            <text:p>1782.83</text:p>
          </table:table-cell>
          <table:table-cell office:value-type="float" office:value="1784.02" calcext:value-type="float">
            <text:p>1784.02</text:p>
          </table:table-cell>
          <table:table-cell office:value-type="float" office:value="1782.46" calcext:value-type="float">
            <text:p>1782.46</text:p>
          </table:table-cell>
          <table:table-cell office:value-type="float" office:value="1783.67" calcext:value-type="float">
            <text:p>1783.67</text:p>
          </table:table-cell>
          <table:table-cell office:value-type="float" office:value="175.5316" calcext:value-type="float">
            <text:p>175.531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2026-07-04T22:57:11.234Z</text:p>
          </table:table-cell>
          <table:table-cell office:value-type="float" office:value="63201.99" calcext:value-type="float">
            <text:p>63201.99</text:p>
          </table:table-cell>
          <table:table-cell office:value-type="float" office:value="63238.3" calcext:value-type="float">
            <text:p>63238.3</text:p>
          </table:table-cell>
          <table:table-cell table:number-columns-repeated="2" office:value-type="float" office:value="63190.39" calcext:value-type="float">
            <text:p>63190.39</text:p>
          </table:table-cell>
          <table:table-cell office:value-type="float" office:value="49.13226" calcext:value-type="float">
            <text:p>49.13226</text:p>
          </table:table-cell>
          <table:table-cell office:value-type="float" office:value="3120" calcext:value-type="float">
            <text:p>3120</text:p>
          </table:table-cell>
          <table:table-cell office:value-type="float" office:value="1783.67" calcext:value-type="float">
            <text:p>1783.67</text:p>
          </table:table-cell>
          <table:table-cell office:value-type="float" office:value="1784.18" calcext:value-type="float">
            <text:p>1784.18</text:p>
          </table:table-cell>
          <table:table-cell office:value-type="float" office:value="1783.5" calcext:value-type="float">
            <text:p>1783.5</text:p>
          </table:table-cell>
          <table:table-cell office:value-type="float" office:value="1784" calcext:value-type="float">
            <text:p>1784</text:p>
          </table:table-cell>
          <table:table-cell office:value-type="float" office:value="414.4094" calcext:value-type="float">
            <text:p>414.409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26-07-04T23:02:11.251Z</text:p>
          </table:table-cell>
          <table:table-cell office:value-type="float" office:value="63190.4" calcext:value-type="float">
            <text:p>63190.4</text:p>
          </table:table-cell>
          <table:table-cell office:value-type="float" office:value="63198.71" calcext:value-type="float">
            <text:p>63198.71</text:p>
          </table:table-cell>
          <table:table-cell table:number-columns-repeated="2" office:value-type="float" office:value="63122.58" calcext:value-type="float">
            <text:p>63122.58</text:p>
          </table:table-cell>
          <table:table-cell office:value-type="float" office:value="143.03967" calcext:value-type="float">
            <text:p>143.03967</text:p>
          </table:table-cell>
          <table:table-cell office:value-type="float" office:value="4433" calcext:value-type="float">
            <text:p>4433</text:p>
          </table:table-cell>
          <table:table-cell office:value-type="float" office:value="1784" calcext:value-type="float">
            <text:p>1784</text:p>
          </table:table-cell>
          <table:table-cell office:value-type="float" office:value="1784.94" calcext:value-type="float">
            <text:p>1784.94</text:p>
          </table:table-cell>
          <table:table-cell office:value-type="float" office:value="1782.01" calcext:value-type="float">
            <text:p>1782.01</text:p>
          </table:table-cell>
          <table:table-cell office:value-type="float" office:value="1782.08" calcext:value-type="float">
            <text:p>1782.08</text:p>
          </table:table-cell>
          <table:table-cell office:value-type="float" office:value="381.7211" calcext:value-type="float">
            <text:p>381.72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2026-07-04T23:07:11.252Z</text:p>
          </table:table-cell>
          <table:table-cell office:value-type="float" office:value="63164" calcext:value-type="float">
            <text:p>63164</text:p>
          </table:table-cell>
          <table:table-cell office:value-type="float" office:value="63210" calcext:value-type="float">
            <text:p>63210</text:p>
          </table:table-cell>
          <table:table-cell office:value-type="float" office:value="63112.52" calcext:value-type="float">
            <text:p>63112.52</text:p>
          </table:table-cell>
          <table:table-cell office:value-type="float" office:value="63204" calcext:value-type="float">
            <text:p>63204</text:p>
          </table:table-cell>
          <table:table-cell office:value-type="float" office:value="74.41984" calcext:value-type="float">
            <text:p>74.41984</text:p>
          </table:table-cell>
          <table:table-cell office:value-type="float" office:value="7551" calcext:value-type="float">
            <text:p>7551</text:p>
          </table:table-cell>
          <table:table-cell office:value-type="float" office:value="1783.12" calcext:value-type="float">
            <text:p>1783.12</text:p>
          </table:table-cell>
          <table:table-cell office:value-type="float" office:value="1784.38" calcext:value-type="float">
            <text:p>1784.38</text:p>
          </table:table-cell>
          <table:table-cell office:value-type="float" office:value="1781.7" calcext:value-type="float">
            <text:p>1781.7</text:p>
          </table:table-cell>
          <table:table-cell office:value-type="float" office:value="1784.36" calcext:value-type="float">
            <text:p>1784.36</text:p>
          </table:table-cell>
          <table:table-cell office:value-type="float" office:value="318.9461" calcext:value-type="float">
            <text:p>318.9461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string" calcext:value-type="string">
            <text:p>2026-07-04T23:12:11.265Z</text:p>
          </table:table-cell>
          <table:table-cell office:value-type="float" office:value="63197.86" calcext:value-type="float">
            <text:p>63197.86</text:p>
          </table:table-cell>
          <table:table-cell office:value-type="float" office:value="63234" calcext:value-type="float">
            <text:p>63234</text:p>
          </table:table-cell>
          <table:table-cell office:value-type="float" office:value="63156.3" calcext:value-type="float">
            <text:p>63156.3</text:p>
          </table:table-cell>
          <table:table-cell office:value-type="float" office:value="63156.31" calcext:value-type="float">
            <text:p>63156.31</text:p>
          </table:table-cell>
          <table:table-cell office:value-type="float" office:value="89.09794" calcext:value-type="float">
            <text:p>89.09794</text:p>
          </table:table-cell>
          <table:table-cell office:value-type="float" office:value="5812" calcext:value-type="float">
            <text:p>5812</text:p>
          </table:table-cell>
          <table:table-cell office:value-type="float" office:value="1783.77" calcext:value-type="float">
            <text:p>1783.77</text:p>
          </table:table-cell>
          <table:table-cell office:value-type="float" office:value="1785.59" calcext:value-type="float">
            <text:p>1785.59</text:p>
          </table:table-cell>
          <table:table-cell office:value-type="float" office:value="1783.77" calcext:value-type="float">
            <text:p>1783.77</text:p>
          </table:table-cell>
          <table:table-cell office:value-type="float" office:value="1783.99" calcext:value-type="float">
            <text:p>1783.99</text:p>
          </table:table-cell>
          <table:table-cell office:value-type="float" office:value="376.6674" calcext:value-type="float">
            <text:p>376.6674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2026-07-04T23:17:11.267Z</text:p>
          </table:table-cell>
          <table:table-cell table:number-columns-repeated="2" office:value-type="float" office:value="63168" calcext:value-type="float">
            <text:p>63168</text:p>
          </table:table-cell>
          <table:table-cell office:value-type="float" office:value="62927.98" calcext:value-type="float">
            <text:p>62927.98</text:p>
          </table:table-cell>
          <table:table-cell office:value-type="float" office:value="62967.67" calcext:value-type="float">
            <text:p>62967.67</text:p>
          </table:table-cell>
          <table:table-cell office:value-type="float" office:value="93.43868" calcext:value-type="float">
            <text:p>93.43868</text:p>
          </table:table-cell>
          <table:table-cell office:value-type="float" office:value="15228" calcext:value-type="float">
            <text:p>15228</text:p>
          </table:table-cell>
          <table:table-cell table:number-columns-repeated="2" office:value-type="float" office:value="1784.54" calcext:value-type="float">
            <text:p>1784.54</text:p>
          </table:table-cell>
          <table:table-cell office:value-type="float" office:value="1772.1" calcext:value-type="float">
            <text:p>1772.1</text:p>
          </table:table-cell>
          <table:table-cell office:value-type="float" office:value="1775.16" calcext:value-type="float">
            <text:p>1775.16</text:p>
          </table:table-cell>
          <table:table-cell office:value-type="float" office:value="5078.5288" calcext:value-type="float">
            <text:p>5078.5288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1">
          <table:table-cell office:value-type="string" calcext:value-type="string">
            <text:p>2026-07-04T23:22:11.274Z</text:p>
          </table:table-cell>
          <table:table-cell office:value-type="float" office:value="62971.68" calcext:value-type="float">
            <text:p>62971.68</text:p>
          </table:table-cell>
          <table:table-cell office:value-type="float" office:value="63063.43" calcext:value-type="float">
            <text:p>63063.43</text:p>
          </table:table-cell>
          <table:table-cell office:value-type="float" office:value="62965.11" calcext:value-type="float">
            <text:p>62965.11</text:p>
          </table:table-cell>
          <table:table-cell office:value-type="float" office:value="63054.89" calcext:value-type="float">
            <text:p>63054.89</text:p>
          </table:table-cell>
          <table:table-cell office:value-type="float" office:value="27.81171" calcext:value-type="float">
            <text:p>27.81171</text:p>
          </table:table-cell>
          <table:table-cell office:value-type="float" office:value="9264" calcext:value-type="float">
            <text:p>9264</text:p>
          </table:table-cell>
          <table:table-cell office:value-type="float" office:value="1775.5" calcext:value-type="float">
            <text:p>1775.5</text:p>
          </table:table-cell>
          <table:table-cell office:value-type="float" office:value="1777.63" calcext:value-type="float">
            <text:p>1777.63</text:p>
          </table:table-cell>
          <table:table-cell office:value-type="float" office:value="1775.03" calcext:value-type="float">
            <text:p>1775.03</text:p>
          </table:table-cell>
          <table:table-cell office:value-type="float" office:value="1777.59" calcext:value-type="float">
            <text:p>1777.59</text:p>
          </table:table-cell>
          <table:table-cell office:value-type="float" office:value="670.7519" calcext:value-type="float">
            <text:p>670.7519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string" calcext:value-type="string">
            <text:p>2026-07-04T23:27:11.278Z</text:p>
          </table:table-cell>
          <table:table-cell office:value-type="float" office:value="63054.89" calcext:value-type="float">
            <text:p>63054.89</text:p>
          </table:table-cell>
          <table:table-cell office:value-type="float" office:value="63094" calcext:value-type="float">
            <text:p>63094</text:p>
          </table:table-cell>
          <table:table-cell office:value-type="float" office:value="63054.89" calcext:value-type="float">
            <text:p>63054.89</text:p>
          </table:table-cell>
          <table:table-cell office:value-type="float" office:value="63093.99" calcext:value-type="float">
            <text:p>63093.99</text:p>
          </table:table-cell>
          <table:table-cell office:value-type="float" office:value="7.7989" calcext:value-type="float">
            <text:p>7.7989</text:p>
          </table:table-cell>
          <table:table-cell office:value-type="float" office:value="3856" calcext:value-type="float">
            <text:p>3856</text:p>
          </table:table-cell>
          <table:table-cell office:value-type="float" office:value="1777.48" calcext:value-type="float">
            <text:p>1777.48</text:p>
          </table:table-cell>
          <table:table-cell office:value-type="float" office:value="1778.67" calcext:value-type="float">
            <text:p>1778.67</text:p>
          </table:table-cell>
          <table:table-cell office:value-type="float" office:value="1777.48" calcext:value-type="float">
            <text:p>1777.48</text:p>
          </table:table-cell>
          <table:table-cell office:value-type="float" office:value="1778.42" calcext:value-type="float">
            <text:p>1778.42</text:p>
          </table:table-cell>
          <table:table-cell office:value-type="float" office:value="352.0634" calcext:value-type="float">
            <text:p>352.0634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2026-07-04T23:32:11.294Z</text:p>
          </table:table-cell>
          <table:table-cell office:value-type="float" office:value="63093.25" calcext:value-type="float">
            <text:p>63093.25</text:p>
          </table:table-cell>
          <table:table-cell office:value-type="float" office:value="63153.84" calcext:value-type="float">
            <text:p>63153.84</text:p>
          </table:table-cell>
          <table:table-cell office:value-type="float" office:value="63092" calcext:value-type="float">
            <text:p>63092</text:p>
          </table:table-cell>
          <table:table-cell office:value-type="float" office:value="63147.99" calcext:value-type="float">
            <text:p>63147.99</text:p>
          </table:table-cell>
          <table:table-cell office:value-type="float" office:value="17.38374" calcext:value-type="float">
            <text:p>17.38374</text:p>
          </table:table-cell>
          <table:table-cell office:value-type="float" office:value="6851" calcext:value-type="float">
            <text:p>6851</text:p>
          </table:table-cell>
          <table:table-cell office:value-type="float" office:value="1778.21" calcext:value-type="float">
            <text:p>1778.21</text:p>
          </table:table-cell>
          <table:table-cell office:value-type="float" office:value="1780.89" calcext:value-type="float">
            <text:p>1780.89</text:p>
          </table:table-cell>
          <table:table-cell office:value-type="float" office:value="1777.66" calcext:value-type="float">
            <text:p>1777.66</text:p>
          </table:table-cell>
          <table:table-cell office:value-type="float" office:value="1780.88" calcext:value-type="float">
            <text:p>1780.88</text:p>
          </table:table-cell>
          <table:table-cell office:value-type="float" office:value="469.3919" calcext:value-type="float">
            <text:p>469.3919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2026-07-04T23:37:11.295Z</text:p>
          </table:table-cell>
          <table:table-cell office:value-type="float" office:value="63136" calcext:value-type="float">
            <text:p>63136</text:p>
          </table:table-cell>
          <table:table-cell office:value-type="float" office:value="63164" calcext:value-type="float">
            <text:p>63164</text:p>
          </table:table-cell>
          <table:table-cell office:value-type="float" office:value="63132" calcext:value-type="float">
            <text:p>63132</text:p>
          </table:table-cell>
          <table:table-cell office:value-type="float" office:value="63140.4" calcext:value-type="float">
            <text:p>63140.4</text:p>
          </table:table-cell>
          <table:table-cell office:value-type="float" office:value="13.43043" calcext:value-type="float">
            <text:p>13.43043</text:p>
          </table:table-cell>
          <table:table-cell office:value-type="float" office:value="4154" calcext:value-type="float">
            <text:p>4154</text:p>
          </table:table-cell>
          <table:table-cell office:value-type="float" office:value="1780.26" calcext:value-type="float">
            <text:p>1780.26</text:p>
          </table:table-cell>
          <table:table-cell office:value-type="float" office:value="1780.89" calcext:value-type="float">
            <text:p>1780.89</text:p>
          </table:table-cell>
          <table:table-cell office:value-type="float" office:value="1779.73" calcext:value-type="float">
            <text:p>1779.73</text:p>
          </table:table-cell>
          <table:table-cell office:value-type="float" office:value="1780.05" calcext:value-type="float">
            <text:p>1780.05</text:p>
          </table:table-cell>
          <table:table-cell office:value-type="float" office:value="627.0247" calcext:value-type="float">
            <text:p>627.0247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string" calcext:value-type="string">
            <text:p>2026-07-04T23:42:11.310Z</text:p>
          </table:table-cell>
          <table:table-cell office:value-type="float" office:value="63140.41" calcext:value-type="float">
            <text:p>63140.41</text:p>
          </table:table-cell>
          <table:table-cell office:value-type="float" office:value="63156" calcext:value-type="float">
            <text:p>63156</text:p>
          </table:table-cell>
          <table:table-cell office:value-type="float" office:value="63134.94" calcext:value-type="float">
            <text:p>63134.94</text:p>
          </table:table-cell>
          <table:table-cell office:value-type="float" office:value="63148.01" calcext:value-type="float">
            <text:p>63148.01</text:p>
          </table:table-cell>
          <table:table-cell office:value-type="float" office:value="9.1189" calcext:value-type="float">
            <text:p>9.1189</text:p>
          </table:table-cell>
          <table:table-cell office:value-type="float" office:value="2628" calcext:value-type="float">
            <text:p>2628</text:p>
          </table:table-cell>
          <table:table-cell office:value-type="float" office:value="1780.05" calcext:value-type="float">
            <text:p>1780.05</text:p>
          </table:table-cell>
          <table:table-cell office:value-type="float" office:value="1781.93" calcext:value-type="float">
            <text:p>1781.93</text:p>
          </table:table-cell>
          <table:table-cell office:value-type="float" office:value="1780.02" calcext:value-type="float">
            <text:p>1780.02</text:p>
          </table:table-cell>
          <table:table-cell office:value-type="float" office:value="1781" calcext:value-type="float">
            <text:p>1781</text:p>
          </table:table-cell>
          <table:table-cell office:value-type="float" office:value="339.4389" calcext:value-type="float">
            <text:p>339.4389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2026-07-04T23:47:11.318Z</text:p>
          </table:table-cell>
          <table:table-cell office:value-type="float" office:value="63156" calcext:value-type="float">
            <text:p>63156</text:p>
          </table:table-cell>
          <table:table-cell office:value-type="float" office:value="63241.33" calcext:value-type="float">
            <text:p>63241.33</text:p>
          </table:table-cell>
          <table:table-cell office:value-type="float" office:value="63132" calcext:value-type="float">
            <text:p>63132</text:p>
          </table:table-cell>
          <table:table-cell office:value-type="float" office:value="63226" calcext:value-type="float">
            <text:p>63226</text:p>
          </table:table-cell>
          <table:table-cell office:value-type="float" office:value="32.75776" calcext:value-type="float">
            <text:p>32.75776</text:p>
          </table:table-cell>
          <table:table-cell office:value-type="float" office:value="8043" calcext:value-type="float">
            <text:p>8043</text:p>
          </table:table-cell>
          <table:table-cell office:value-type="float" office:value="1781.63" calcext:value-type="float">
            <text:p>1781.63</text:p>
          </table:table-cell>
          <table:table-cell office:value-type="float" office:value="1782.9" calcext:value-type="float">
            <text:p>1782.9</text:p>
          </table:table-cell>
          <table:table-cell office:value-type="float" office:value="1780.58" calcext:value-type="float">
            <text:p>1780.58</text:p>
          </table:table-cell>
          <table:table-cell office:value-type="float" office:value="1782.38" calcext:value-type="float">
            <text:p>1782.38</text:p>
          </table:table-cell>
          <table:table-cell office:value-type="float" office:value="351.9494" calcext:value-type="float">
            <text:p>351.9494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string" calcext:value-type="string">
            <text:p>2026-07-04T23:52:11.333Z</text:p>
          </table:table-cell>
          <table:table-cell office:value-type="float" office:value="63225.99" calcext:value-type="float">
            <text:p>63225.99</text:p>
          </table:table-cell>
          <table:table-cell office:value-type="float" office:value="63226" calcext:value-type="float">
            <text:p>63226</text:p>
          </table:table-cell>
          <table:table-cell table:number-columns-repeated="2" office:value-type="float" office:value="63178" calcext:value-type="float">
            <text:p>63178</text:p>
          </table:table-cell>
          <table:table-cell office:value-type="float" office:value="63.27374" calcext:value-type="float">
            <text:p>63.27374</text:p>
          </table:table-cell>
          <table:table-cell office:value-type="float" office:value="4105" calcext:value-type="float">
            <text:p>4105</text:p>
          </table:table-cell>
          <table:table-cell table:number-columns-repeated="2" office:value-type="float" office:value="1782.66" calcext:value-type="float">
            <text:p>1782.66</text:p>
          </table:table-cell>
          <table:table-cell office:value-type="float" office:value="1780.24" calcext:value-type="float">
            <text:p>1780.24</text:p>
          </table:table-cell>
          <table:table-cell office:value-type="float" office:value="1780.25" calcext:value-type="float">
            <text:p>1780.25</text:p>
          </table:table-cell>
          <table:table-cell office:value-type="float" office:value="162.1486" calcext:value-type="float">
            <text:p>162.148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2026-07-04T23:57:11.347Z</text:p>
          </table:table-cell>
          <table:table-cell office:value-type="float" office:value="63178.01" calcext:value-type="float">
            <text:p>63178.01</text:p>
          </table:table-cell>
          <table:table-cell office:value-type="float" office:value="63226.01" calcext:value-type="float">
            <text:p>63226.01</text:p>
          </table:table-cell>
          <table:table-cell office:value-type="float" office:value="63151.23" calcext:value-type="float">
            <text:p>63151.23</text:p>
          </table:table-cell>
          <table:table-cell office:value-type="float" office:value="63166.2" calcext:value-type="float">
            <text:p>63166.2</text:p>
          </table:table-cell>
          <table:table-cell office:value-type="float" office:value="154.28972" calcext:value-type="float">
            <text:p>154.28972</text:p>
          </table:table-cell>
          <table:table-cell office:value-type="float" office:value="6480" calcext:value-type="float">
            <text:p>6480</text:p>
          </table:table-cell>
          <table:table-cell office:value-type="float" office:value="1780.37" calcext:value-type="float">
            <text:p>1780.37</text:p>
          </table:table-cell>
          <table:table-cell office:value-type="float" office:value="1781.09" calcext:value-type="float">
            <text:p>1781.09</text:p>
          </table:table-cell>
          <table:table-cell office:value-type="float" office:value="1779.06" calcext:value-type="float">
            <text:p>1779.06</text:p>
          </table:table-cell>
          <table:table-cell office:value-type="float" office:value="1780.81" calcext:value-type="float">
            <text:p>1780.81</text:p>
          </table:table-cell>
          <table:table-cell office:value-type="float" office:value="289.6173" calcext:value-type="float">
            <text:p>289.6173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2026-07-05T00:02:11.360Z</text:p>
          </table:table-cell>
          <table:table-cell table:number-columns-repeated="2" office:value-type="float" office:value="63166.2" calcext:value-type="float">
            <text:p>63166.2</text:p>
          </table:table-cell>
          <table:table-cell office:value-type="float" office:value="63026.33" calcext:value-type="float">
            <text:p>63026.33</text:p>
          </table:table-cell>
          <table:table-cell office:value-type="float" office:value="63043.99" calcext:value-type="float">
            <text:p>63043.99</text:p>
          </table:table-cell>
          <table:table-cell office:value-type="float" office:value="21.40354" calcext:value-type="float">
            <text:p>21.40354</text:p>
          </table:table-cell>
          <table:table-cell office:value-type="float" office:value="6727" calcext:value-type="float">
            <text:p>6727</text:p>
          </table:table-cell>
          <table:table-cell office:value-type="float" office:value="1780.59" calcext:value-type="float">
            <text:p>1780.59</text:p>
          </table:table-cell>
          <table:table-cell office:value-type="float" office:value="1780.81" calcext:value-type="float">
            <text:p>1780.81</text:p>
          </table:table-cell>
          <table:table-cell office:value-type="float" office:value="1776.81" calcext:value-type="float">
            <text:p>1776.81</text:p>
          </table:table-cell>
          <table:table-cell office:value-type="float" office:value="1777.44" calcext:value-type="float">
            <text:p>1777.44</text:p>
          </table:table-cell>
          <table:table-cell office:value-type="float" office:value="347.6318" calcext:value-type="float">
            <text:p>347.6318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2026-07-05T00:07:11.375Z</text:p>
          </table:table-cell>
          <table:table-cell office:value-type="float" office:value="63026.34" calcext:value-type="float">
            <text:p>63026.34</text:p>
          </table:table-cell>
          <table:table-cell office:value-type="float" office:value="63088" calcext:value-type="float">
            <text:p>63088</text:p>
          </table:table-cell>
          <table:table-cell office:value-type="float" office:value="63026.33" calcext:value-type="float">
            <text:p>63026.33</text:p>
          </table:table-cell>
          <table:table-cell office:value-type="float" office:value="63071.61" calcext:value-type="float">
            <text:p>63071.61</text:p>
          </table:table-cell>
          <table:table-cell office:value-type="float" office:value="27.93725" calcext:value-type="float">
            <text:p>27.93725</text:p>
          </table:table-cell>
          <table:table-cell office:value-type="float" office:value="8044" calcext:value-type="float">
            <text:p>8044</text:p>
          </table:table-cell>
          <table:table-cell office:value-type="float" office:value="1776.81" calcext:value-type="float">
            <text:p>1776.81</text:p>
          </table:table-cell>
          <table:table-cell office:value-type="float" office:value="1778.2" calcext:value-type="float">
            <text:p>1778.2</text:p>
          </table:table-cell>
          <table:table-cell office:value-type="float" office:value="1776.71" calcext:value-type="float">
            <text:p>1776.71</text:p>
          </table:table-cell>
          <table:table-cell office:value-type="float" office:value="1777.54" calcext:value-type="float">
            <text:p>1777.54</text:p>
          </table:table-cell>
          <table:table-cell office:value-type="float" office:value="312.7242" calcext:value-type="float">
            <text:p>312.7242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string" calcext:value-type="string">
            <text:p>2026-07-05T00:12:11.380Z</text:p>
          </table:table-cell>
          <table:table-cell office:value-type="float" office:value="63044.27" calcext:value-type="float">
            <text:p>63044.27</text:p>
          </table:table-cell>
          <table:table-cell office:value-type="float" office:value="63077.88" calcext:value-type="float">
            <text:p>63077.88</text:p>
          </table:table-cell>
          <table:table-cell office:value-type="float" office:value="63029.51" calcext:value-type="float">
            <text:p>63029.51</text:p>
          </table:table-cell>
          <table:table-cell office:value-type="float" office:value="63037.48" calcext:value-type="float">
            <text:p>63037.48</text:p>
          </table:table-cell>
          <table:table-cell office:value-type="float" office:value="15.575" calcext:value-type="float">
            <text:p>15.575</text:p>
          </table:table-cell>
          <table:table-cell office:value-type="float" office:value="5581" calcext:value-type="float">
            <text:p>5581</text:p>
          </table:table-cell>
          <table:table-cell office:value-type="float" office:value="1776.72" calcext:value-type="float">
            <text:p>1776.72</text:p>
          </table:table-cell>
          <table:table-cell office:value-type="float" office:value="1777.8" calcext:value-type="float">
            <text:p>1777.8</text:p>
          </table:table-cell>
          <table:table-cell office:value-type="float" office:value="1775.79" calcext:value-type="float">
            <text:p>1775.79</text:p>
          </table:table-cell>
          <table:table-cell office:value-type="float" office:value="1775.99" calcext:value-type="float">
            <text:p>1775.99</text:p>
          </table:table-cell>
          <table:table-cell office:value-type="float" office:value="419.8667" calcext:value-type="float">
            <text:p>419.8667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2026-07-05T00:17:11.394Z</text:p>
          </table:table-cell>
          <table:table-cell office:value-type="float" office:value="63037.5" calcext:value-type="float">
            <text:p>63037.5</text:p>
          </table:table-cell>
          <table:table-cell office:value-type="float" office:value="63070.23" calcext:value-type="float">
            <text:p>63070.23</text:p>
          </table:table-cell>
          <table:table-cell office:value-type="float" office:value="63024.04" calcext:value-type="float">
            <text:p>63024.04</text:p>
          </table:table-cell>
          <table:table-cell office:value-type="float" office:value="63037.19" calcext:value-type="float">
            <text:p>63037.19</text:p>
          </table:table-cell>
          <table:table-cell office:value-type="float" office:value="24.86635" calcext:value-type="float">
            <text:p>24.86635</text:p>
          </table:table-cell>
          <table:table-cell office:value-type="float" office:value="5408" calcext:value-type="float">
            <text:p>5408</text:p>
          </table:table-cell>
          <table:table-cell office:value-type="float" office:value="1776.16" calcext:value-type="float">
            <text:p>1776.16</text:p>
          </table:table-cell>
          <table:table-cell office:value-type="float" office:value="1776.7" calcext:value-type="float">
            <text:p>1776.7</text:p>
          </table:table-cell>
          <table:table-cell office:value-type="float" office:value="1775.51" calcext:value-type="float">
            <text:p>1775.51</text:p>
          </table:table-cell>
          <table:table-cell office:value-type="float" office:value="1775.87" calcext:value-type="float">
            <text:p>1775.87</text:p>
          </table:table-cell>
          <table:table-cell office:value-type="float" office:value="460.014" calcext:value-type="float">
            <text:p>460.014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2026-07-05T00:22:11.399Z</text:p>
          </table:table-cell>
          <table:table-cell table:number-columns-repeated="2" office:value-type="float" office:value="63054" calcext:value-type="float">
            <text:p>63054</text:p>
          </table:table-cell>
          <table:table-cell office:value-type="float" office:value="62978.75" calcext:value-type="float">
            <text:p>62978.75</text:p>
          </table:table-cell>
          <table:table-cell office:value-type="float" office:value="62991.01" calcext:value-type="float">
            <text:p>62991.01</text:p>
          </table:table-cell>
          <table:table-cell office:value-type="float" office:value="21.7345" calcext:value-type="float">
            <text:p>21.7345</text:p>
          </table:table-cell>
          <table:table-cell office:value-type="float" office:value="7177" calcext:value-type="float">
            <text:p>7177</text:p>
          </table:table-cell>
          <table:table-cell office:value-type="float" office:value="1776.59" calcext:value-type="float">
            <text:p>1776.59</text:p>
          </table:table-cell>
          <table:table-cell office:value-type="float" office:value="1776.6" calcext:value-type="float">
            <text:p>1776.6</text:p>
          </table:table-cell>
          <table:table-cell office:value-type="float" office:value="1773.46" calcext:value-type="float">
            <text:p>1773.46</text:p>
          </table:table-cell>
          <table:table-cell office:value-type="float" office:value="1774.18" calcext:value-type="float">
            <text:p>1774.18</text:p>
          </table:table-cell>
          <table:table-cell office:value-type="float" office:value="538.454" calcext:value-type="float">
            <text:p>538.454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2026-07-05T00:27:11.413Z</text:p>
          </table:table-cell>
          <table:table-cell office:value-type="float" office:value="63000" calcext:value-type="float">
            <text:p>63000</text:p>
          </table:table-cell>
          <table:table-cell office:value-type="float" office:value="63050.36" calcext:value-type="float">
            <text:p>63050.36</text:p>
          </table:table-cell>
          <table:table-cell office:value-type="float" office:value="62978.75" calcext:value-type="float">
            <text:p>62978.75</text:p>
          </table:table-cell>
          <table:table-cell office:value-type="float" office:value="63047.99" calcext:value-type="float">
            <text:p>63047.99</text:p>
          </table:table-cell>
          <table:table-cell office:value-type="float" office:value="20.5636" calcext:value-type="float">
            <text:p>20.5636</text:p>
          </table:table-cell>
          <table:table-cell office:value-type="float" office:value="6987" calcext:value-type="float">
            <text:p>6987</text:p>
          </table:table-cell>
          <table:table-cell office:value-type="float" office:value="1774.47" calcext:value-type="float">
            <text:p>1774.47</text:p>
          </table:table-cell>
          <table:table-cell office:value-type="float" office:value="1775.89" calcext:value-type="float">
            <text:p>1775.89</text:p>
          </table:table-cell>
          <table:table-cell office:value-type="float" office:value="1773.46" calcext:value-type="float">
            <text:p>1773.46</text:p>
          </table:table-cell>
          <table:table-cell office:value-type="float" office:value="1775.2" calcext:value-type="float">
            <text:p>1775.2</text:p>
          </table:table-cell>
          <table:table-cell office:value-type="float" office:value="498.8896" calcext:value-type="float">
            <text:p>498.8896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2026-07-05T00:32:11.427Z</text:p>
          </table:table-cell>
          <table:table-cell office:value-type="float" office:value="63048" calcext:value-type="float">
            <text:p>63048</text:p>
          </table:table-cell>
          <table:table-cell office:value-type="float" office:value="63058" calcext:value-type="float">
            <text:p>63058</text:p>
          </table:table-cell>
          <table:table-cell office:value-type="float" office:value="63011.31" calcext:value-type="float">
            <text:p>63011.31</text:p>
          </table:table-cell>
          <table:table-cell office:value-type="float" office:value="63019.44" calcext:value-type="float">
            <text:p>63019.44</text:p>
          </table:table-cell>
          <table:table-cell office:value-type="float" office:value="20.81466" calcext:value-type="float">
            <text:p>20.81466</text:p>
          </table:table-cell>
          <table:table-cell office:value-type="float" office:value="7885" calcext:value-type="float">
            <text:p>7885</text:p>
          </table:table-cell>
          <table:table-cell office:value-type="float" office:value="1775.83" calcext:value-type="float">
            <text:p>1775.83</text:p>
          </table:table-cell>
          <table:table-cell office:value-type="float" office:value="1775.84" calcext:value-type="float">
            <text:p>1775.84</text:p>
          </table:table-cell>
          <table:table-cell office:value-type="float" office:value="1773.21" calcext:value-type="float">
            <text:p>1773.21</text:p>
          </table:table-cell>
          <table:table-cell office:value-type="float" office:value="1773.71" calcext:value-type="float">
            <text:p>1773.71</text:p>
          </table:table-cell>
          <table:table-cell office:value-type="float" office:value="585.1759" calcext:value-type="float">
            <text:p>585.1759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string" calcext:value-type="string">
            <text:p>2026-07-05T00:37:11.440Z</text:p>
          </table:table-cell>
          <table:table-cell office:value-type="float" office:value="63019.43" calcext:value-type="float">
            <text:p>63019.43</text:p>
          </table:table-cell>
          <table:table-cell office:value-type="float" office:value="63022" calcext:value-type="float">
            <text:p>63022</text:p>
          </table:table-cell>
          <table:table-cell office:value-type="float" office:value="62999.99" calcext:value-type="float">
            <text:p>62999.99</text:p>
          </table:table-cell>
          <table:table-cell office:value-type="float" office:value="63021.99" calcext:value-type="float">
            <text:p>63021.99</text:p>
          </table:table-cell>
          <table:table-cell office:value-type="float" office:value="12.96738" calcext:value-type="float">
            <text:p>12.96738</text:p>
          </table:table-cell>
          <table:table-cell office:value-type="float" office:value="4953" calcext:value-type="float">
            <text:p>4953</text:p>
          </table:table-cell>
          <table:table-cell office:value-type="float" office:value="1773.74" calcext:value-type="float">
            <text:p>1773.74</text:p>
          </table:table-cell>
          <table:table-cell office:value-type="float" office:value="1773.98" calcext:value-type="float">
            <text:p>1773.98</text:p>
          </table:table-cell>
          <table:table-cell office:value-type="float" office:value="1772.1" calcext:value-type="float">
            <text:p>1772.1</text:p>
          </table:table-cell>
          <table:table-cell office:value-type="float" office:value="1773.04" calcext:value-type="float">
            <text:p>1773.04</text:p>
          </table:table-cell>
          <table:table-cell office:value-type="float" office:value="833.3636" calcext:value-type="float">
            <text:p>833.3636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string" calcext:value-type="string">
            <text:p>2026-07-05T00:42:11.454Z</text:p>
          </table:table-cell>
          <table:table-cell office:value-type="float" office:value="63021.99" calcext:value-type="float">
            <text:p>63021.99</text:p>
          </table:table-cell>
          <table:table-cell office:value-type="float" office:value="63124" calcext:value-type="float">
            <text:p>63124</text:p>
          </table:table-cell>
          <table:table-cell office:value-type="float" office:value="63021.98" calcext:value-type="float">
            <text:p>63021.98</text:p>
          </table:table-cell>
          <table:table-cell office:value-type="float" office:value="63111.36" calcext:value-type="float">
            <text:p>63111.36</text:p>
          </table:table-cell>
          <table:table-cell office:value-type="float" office:value="17.43548" calcext:value-type="float">
            <text:p>17.43548</text:p>
          </table:table-cell>
          <table:table-cell office:value-type="float" office:value="7312" calcext:value-type="float">
            <text:p>7312</text:p>
          </table:table-cell>
          <table:table-cell office:value-type="float" office:value="1772.9" calcext:value-type="float">
            <text:p>1772.9</text:p>
          </table:table-cell>
          <table:table-cell office:value-type="float" office:value="1776.7" calcext:value-type="float">
            <text:p>1776.7</text:p>
          </table:table-cell>
          <table:table-cell office:value-type="float" office:value="1772.8" calcext:value-type="float">
            <text:p>1772.8</text:p>
          </table:table-cell>
          <table:table-cell office:value-type="float" office:value="1776.26" calcext:value-type="float">
            <text:p>1776.26</text:p>
          </table:table-cell>
          <table:table-cell office:value-type="float" office:value="376.1389" calcext:value-type="float">
            <text:p>376.1389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2026-07-05T00:47:11.467Z</text:p>
          </table:table-cell>
          <table:table-cell office:value-type="float" office:value="63111.36" calcext:value-type="float">
            <text:p>63111.36</text:p>
          </table:table-cell>
          <table:table-cell office:value-type="float" office:value="63117.13" calcext:value-type="float">
            <text:p>63117.13</text:p>
          </table:table-cell>
          <table:table-cell office:value-type="float" office:value="63089.79" calcext:value-type="float">
            <text:p>63089.79</text:p>
          </table:table-cell>
          <table:table-cell office:value-type="float" office:value="63098.01" calcext:value-type="float">
            <text:p>63098.01</text:p>
          </table:table-cell>
          <table:table-cell office:value-type="float" office:value="42.9607" calcext:value-type="float">
            <text:p>42.9607</text:p>
          </table:table-cell>
          <table:table-cell office:value-type="float" office:value="3991" calcext:value-type="float">
            <text:p>3991</text:p>
          </table:table-cell>
          <table:table-cell office:value-type="float" office:value="1776.45" calcext:value-type="float">
            <text:p>1776.45</text:p>
          </table:table-cell>
          <table:table-cell office:value-type="float" office:value="1776.7" calcext:value-type="float">
            <text:p>1776.7</text:p>
          </table:table-cell>
          <table:table-cell office:value-type="float" office:value="1775.25" calcext:value-type="float">
            <text:p>1775.25</text:p>
          </table:table-cell>
          <table:table-cell office:value-type="float" office:value="1775.8" calcext:value-type="float">
            <text:p>1775.8</text:p>
          </table:table-cell>
          <table:table-cell office:value-type="float" office:value="519.4111" calcext:value-type="float">
            <text:p>519.4111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string" calcext:value-type="string">
            <text:p>2026-07-06T09:04:41.100Z</text:p>
          </table:table-cell>
          <table:table-cell office:value-type="float" office:value="62906" calcext:value-type="float">
            <text:p>62906</text:p>
          </table:table-cell>
          <table:table-cell office:value-type="float" office:value="62914" calcext:value-type="float">
            <text:p>62914</text:p>
          </table:table-cell>
          <table:table-cell office:value-type="float" office:value="62876.91" calcext:value-type="float">
            <text:p>62876.91</text:p>
          </table:table-cell>
          <table:table-cell office:value-type="float" office:value="62882.53" calcext:value-type="float">
            <text:p>62882.53</text:p>
          </table:table-cell>
          <table:table-cell office:value-type="float" office:value="20.86451" calcext:value-type="float">
            <text:p>20.86451</text:p>
          </table:table-cell>
          <table:table-cell office:value-type="float" office:value="6628" calcext:value-type="float">
            <text:p>6628</text:p>
          </table:table-cell>
          <table:table-cell office:value-type="float" office:value="1765.8" calcext:value-type="float">
            <text:p>1765.8</text:p>
          </table:table-cell>
          <table:table-cell office:value-type="float" office:value="1766.3" calcext:value-type="float">
            <text:p>1766.3</text:p>
          </table:table-cell>
          <table:table-cell office:value-type="float" office:value="1764.99" calcext:value-type="float">
            <text:p>1764.99</text:p>
          </table:table-cell>
          <table:table-cell office:value-type="float" office:value="1765" calcext:value-type="float">
            <text:p>1765</text:p>
          </table:table-cell>
          <table:table-cell office:value-type="float" office:value="742.1542" calcext:value-type="float">
            <text:p>742.1542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2026-07-06T09:09:41.419Z</text:p>
          </table:table-cell>
          <table:table-cell office:value-type="float" office:value="62912" calcext:value-type="float">
            <text:p>62912</text:p>
          </table:table-cell>
          <table:table-cell office:value-type="float" office:value="62914" calcext:value-type="float">
            <text:p>62914</text:p>
          </table:table-cell>
          <table:table-cell table:number-columns-repeated="2" office:value-type="float" office:value="62868.58" calcext:value-type="float">
            <text:p>62868.58</text:p>
          </table:table-cell>
          <table:table-cell office:value-type="float" office:value="21.11398" calcext:value-type="float">
            <text:p>21.11398</text:p>
          </table:table-cell>
          <table:table-cell office:value-type="float" office:value="5159" calcext:value-type="float">
            <text:p>5159</text:p>
          </table:table-cell>
          <table:table-cell table:number-columns-repeated="2" office:value-type="float" office:value="1765.96" calcext:value-type="float">
            <text:p>1765.96</text:p>
          </table:table-cell>
          <table:table-cell table:number-columns-repeated="2" office:value-type="float" office:value="1764.21" calcext:value-type="float">
            <text:p>1764.21</text:p>
          </table:table-cell>
          <table:table-cell office:value-type="float" office:value="289.9734" calcext:value-type="float">
            <text:p>289.9734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2026-07-06T09:14:41.426Z</text:p>
          </table:table-cell>
          <table:table-cell office:value-type="float" office:value="62868.59" calcext:value-type="float">
            <text:p>62868.59</text:p>
          </table:table-cell>
          <table:table-cell office:value-type="float" office:value="62882" calcext:value-type="float">
            <text:p>62882</text:p>
          </table:table-cell>
          <table:table-cell office:value-type="float" office:value="62844.93" calcext:value-type="float">
            <text:p>62844.93</text:p>
          </table:table-cell>
          <table:table-cell office:value-type="float" office:value="62877.39" calcext:value-type="float">
            <text:p>62877.39</text:p>
          </table:table-cell>
          <table:table-cell office:value-type="float" office:value="18.80016" calcext:value-type="float">
            <text:p>18.80016</text:p>
          </table:table-cell>
          <table:table-cell office:value-type="float" office:value="4450" calcext:value-type="float">
            <text:p>4450</text:p>
          </table:table-cell>
          <table:table-cell table:number-columns-repeated="2" office:value-type="float" office:value="1764.36" calcext:value-type="float">
            <text:p>1764.36</text:p>
          </table:table-cell>
          <table:table-cell office:value-type="float" office:value="1763.15" calcext:value-type="float">
            <text:p>1763.15</text:p>
          </table:table-cell>
          <table:table-cell office:value-type="float" office:value="1764.12" calcext:value-type="float">
            <text:p>1764.12</text:p>
          </table:table-cell>
          <table:table-cell office:value-type="float" office:value="350.6245" calcext:value-type="float">
            <text:p>350.6245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2026-07-06T09:19:41.455Z</text:p>
          </table:table-cell>
          <table:table-cell office:value-type="float" office:value="62877.39" calcext:value-type="float">
            <text:p>62877.39</text:p>
          </table:table-cell>
          <table:table-cell office:value-type="float" office:value="62880.58" calcext:value-type="float">
            <text:p>62880.58</text:p>
          </table:table-cell>
          <table:table-cell office:value-type="float" office:value="62847.27" calcext:value-type="float">
            <text:p>62847.27</text:p>
          </table:table-cell>
          <table:table-cell office:value-type="float" office:value="62850" calcext:value-type="float">
            <text:p>62850</text:p>
          </table:table-cell>
          <table:table-cell office:value-type="float" office:value="16.18172" calcext:value-type="float">
            <text:p>16.18172</text:p>
          </table:table-cell>
          <table:table-cell office:value-type="float" office:value="4284" calcext:value-type="float">
            <text:p>4284</text:p>
          </table:table-cell>
          <table:table-cell office:value-type="float" office:value="1764.11" calcext:value-type="float">
            <text:p>1764.11</text:p>
          </table:table-cell>
          <table:table-cell office:value-type="float" office:value="1765.64" calcext:value-type="float">
            <text:p>1765.64</text:p>
          </table:table-cell>
          <table:table-cell office:value-type="float" office:value="1763.26" calcext:value-type="float">
            <text:p>1763.26</text:p>
          </table:table-cell>
          <table:table-cell office:value-type="float" office:value="1764.77" calcext:value-type="float">
            <text:p>1764.77</text:p>
          </table:table-cell>
          <table:table-cell office:value-type="float" office:value="432.3151" calcext:value-type="float">
            <text:p>432.3151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2026-07-06T09:24:41.484Z</text:p>
          </table:table-cell>
          <table:table-cell office:value-type="float" office:value="62870.35" calcext:value-type="float">
            <text:p>62870.35</text:p>
          </table:table-cell>
          <table:table-cell office:value-type="float" office:value="62870.36" calcext:value-type="float">
            <text:p>62870.36</text:p>
          </table:table-cell>
          <table:table-cell office:value-type="float" office:value="62750" calcext:value-type="float">
            <text:p>62750</text:p>
          </table:table-cell>
          <table:table-cell office:value-type="float" office:value="62793.75" calcext:value-type="float">
            <text:p>62793.75</text:p>
          </table:table-cell>
          <table:table-cell office:value-type="float" office:value="57.18471" calcext:value-type="float">
            <text:p>57.18471</text:p>
          </table:table-cell>
          <table:table-cell office:value-type="float" office:value="12288" calcext:value-type="float">
            <text:p>12288</text:p>
          </table:table-cell>
          <table:table-cell office:value-type="float" office:value="1765.36" calcext:value-type="float">
            <text:p>1765.36</text:p>
          </table:table-cell>
          <table:table-cell office:value-type="float" office:value="1765.64" calcext:value-type="float">
            <text:p>1765.64</text:p>
          </table:table-cell>
          <table:table-cell office:value-type="float" office:value="1761.19" calcext:value-type="float">
            <text:p>1761.19</text:p>
          </table:table-cell>
          <table:table-cell office:value-type="float" office:value="1763.07" calcext:value-type="float">
            <text:p>1763.07</text:p>
          </table:table-cell>
          <table:table-cell office:value-type="float" office:value="1032.5077" calcext:value-type="float">
            <text:p>1032.5077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string" calcext:value-type="string">
            <text:p>2026-07-06T09:29:41.512Z</text:p>
          </table:table-cell>
          <table:table-cell office:value-type="float" office:value="62793.76" calcext:value-type="float">
            <text:p>62793.76</text:p>
          </table:table-cell>
          <table:table-cell office:value-type="float" office:value="62793.77" calcext:value-type="float">
            <text:p>62793.77</text:p>
          </table:table-cell>
          <table:table-cell office:value-type="float" office:value="62742" calcext:value-type="float">
            <text:p>62742</text:p>
          </table:table-cell>
          <table:table-cell office:value-type="float" office:value="62745.22" calcext:value-type="float">
            <text:p>62745.22</text:p>
          </table:table-cell>
          <table:table-cell office:value-type="float" office:value="48.80751" calcext:value-type="float">
            <text:p>48.80751</text:p>
          </table:table-cell>
          <table:table-cell office:value-type="float" office:value="6145" calcext:value-type="float">
            <text:p>6145</text:p>
          </table:table-cell>
          <table:table-cell office:value-type="float" office:value="1763.12" calcext:value-type="float">
            <text:p>1763.12</text:p>
          </table:table-cell>
          <table:table-cell office:value-type="float" office:value="1763.6" calcext:value-type="float">
            <text:p>1763.6</text:p>
          </table:table-cell>
          <table:table-cell office:value-type="float" office:value="1760.66" calcext:value-type="float">
            <text:p>1760.66</text:p>
          </table:table-cell>
          <table:table-cell office:value-type="float" office:value="1762.28" calcext:value-type="float">
            <text:p>1762.28</text:p>
          </table:table-cell>
          <table:table-cell office:value-type="float" office:value="493.6931" calcext:value-type="float">
            <text:p>493.693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string" calcext:value-type="string">
            <text:p>2026-07-06T09:34:41.540Z</text:p>
          </table:table-cell>
          <table:table-cell office:value-type="float" office:value="62742.08" calcext:value-type="float">
            <text:p>62742.08</text:p>
          </table:table-cell>
          <table:table-cell office:value-type="float" office:value="62764" calcext:value-type="float">
            <text:p>62764</text:p>
          </table:table-cell>
          <table:table-cell office:value-type="float" office:value="62672.19" calcext:value-type="float">
            <text:p>62672.19</text:p>
          </table:table-cell>
          <table:table-cell office:value-type="float" office:value="62690.01" calcext:value-type="float">
            <text:p>62690.01</text:p>
          </table:table-cell>
          <table:table-cell office:value-type="float" office:value="69.36906" calcext:value-type="float">
            <text:p>69.36906</text:p>
          </table:table-cell>
          <table:table-cell office:value-type="float" office:value="14176" calcext:value-type="float">
            <text:p>14176</text:p>
          </table:table-cell>
          <table:table-cell office:value-type="float" office:value="1762.44" calcext:value-type="float">
            <text:p>1762.44</text:p>
          </table:table-cell>
          <table:table-cell office:value-type="float" office:value="1762.61" calcext:value-type="float">
            <text:p>1762.61</text:p>
          </table:table-cell>
          <table:table-cell office:value-type="float" office:value="1758.31" calcext:value-type="float">
            <text:p>1758.31</text:p>
          </table:table-cell>
          <table:table-cell office:value-type="float" office:value="1758.73" calcext:value-type="float">
            <text:p>1758.73</text:p>
          </table:table-cell>
          <table:table-cell office:value-type="float" office:value="1195.1329" calcext:value-type="float">
            <text:p>1195.1329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string" calcext:value-type="string">
            <text:p>2026-07-06T09:39:41.568Z</text:p>
          </table:table-cell>
          <table:table-cell office:value-type="float" office:value="62712.01" calcext:value-type="float">
            <text:p>62712.01</text:p>
          </table:table-cell>
          <table:table-cell office:value-type="float" office:value="62712.04" calcext:value-type="float">
            <text:p>62712.04</text:p>
          </table:table-cell>
          <table:table-cell office:value-type="float" office:value="62630.85" calcext:value-type="float">
            <text:p>62630.85</text:p>
          </table:table-cell>
          <table:table-cell office:value-type="float" office:value="62630.86" calcext:value-type="float">
            <text:p>62630.86</text:p>
          </table:table-cell>
          <table:table-cell office:value-type="float" office:value="99.60556" calcext:value-type="float">
            <text:p>99.60556</text:p>
          </table:table-cell>
          <table:table-cell office:value-type="float" office:value="10939" calcext:value-type="float">
            <text:p>10939</text:p>
          </table:table-cell>
          <table:table-cell office:value-type="float" office:value="1759.06" calcext:value-type="float">
            <text:p>1759.06</text:p>
          </table:table-cell>
          <table:table-cell office:value-type="float" office:value="1759.15" calcext:value-type="float">
            <text:p>1759.15</text:p>
          </table:table-cell>
          <table:table-cell office:value-type="float" office:value="1756" calcext:value-type="float">
            <text:p>1756</text:p>
          </table:table-cell>
          <table:table-cell office:value-type="float" office:value="1756.27" calcext:value-type="float">
            <text:p>1756.27</text:p>
          </table:table-cell>
          <table:table-cell office:value-type="float" office:value="1491.5498" calcext:value-type="float">
            <text:p>1491.5498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2026-07-06T09:44:41.569Z</text:p>
          </table:table-cell>
          <table:table-cell office:value-type="float" office:value="62640.01" calcext:value-type="float">
            <text:p>62640.01</text:p>
          </table:table-cell>
          <table:table-cell office:value-type="float" office:value="62717.31" calcext:value-type="float">
            <text:p>62717.31</text:p>
          </table:table-cell>
          <table:table-cell office:value-type="float" office:value="62630.85" calcext:value-type="float">
            <text:p>62630.85</text:p>
          </table:table-cell>
          <table:table-cell office:value-type="float" office:value="62688.01" calcext:value-type="float">
            <text:p>62688.01</text:p>
          </table:table-cell>
          <table:table-cell office:value-type="float" office:value="58.06688" calcext:value-type="float">
            <text:p>58.06688</text:p>
          </table:table-cell>
          <table:table-cell office:value-type="float" office:value="10417" calcext:value-type="float">
            <text:p>10417</text:p>
          </table:table-cell>
          <table:table-cell office:value-type="float" office:value="1757.16" calcext:value-type="float">
            <text:p>1757.16</text:p>
          </table:table-cell>
          <table:table-cell office:value-type="float" office:value="1758.59" calcext:value-type="float">
            <text:p>1758.59</text:p>
          </table:table-cell>
          <table:table-cell office:value-type="float" office:value="1756" calcext:value-type="float">
            <text:p>1756</text:p>
          </table:table-cell>
          <table:table-cell office:value-type="float" office:value="1757.43" calcext:value-type="float">
            <text:p>1757.43</text:p>
          </table:table-cell>
          <table:table-cell office:value-type="float" office:value="848.0319" calcext:value-type="float">
            <text:p>848.031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2026-07-06T09:49:41.598Z</text:p>
          </table:table-cell>
          <table:table-cell office:value-type="float" office:value="62697.33" calcext:value-type="float">
            <text:p>62697.33</text:p>
          </table:table-cell>
          <table:table-cell office:value-type="float" office:value="62698.19" calcext:value-type="float">
            <text:p>62698.19</text:p>
          </table:table-cell>
          <table:table-cell office:value-type="float" office:value="62637.52" calcext:value-type="float">
            <text:p>62637.52</text:p>
          </table:table-cell>
          <table:table-cell office:value-type="float" office:value="62637.53" calcext:value-type="float">
            <text:p>62637.53</text:p>
          </table:table-cell>
          <table:table-cell office:value-type="float" office:value="27.62921" calcext:value-type="float">
            <text:p>27.62921</text:p>
          </table:table-cell>
          <table:table-cell office:value-type="float" office:value="6707" calcext:value-type="float">
            <text:p>6707</text:p>
          </table:table-cell>
          <table:table-cell office:value-type="float" office:value="1757.93" calcext:value-type="float">
            <text:p>1757.93</text:p>
          </table:table-cell>
          <table:table-cell office:value-type="float" office:value="1757.94" calcext:value-type="float">
            <text:p>1757.94</text:p>
          </table:table-cell>
          <table:table-cell office:value-type="float" office:value="1755.77" calcext:value-type="float">
            <text:p>1755.77</text:p>
          </table:table-cell>
          <table:table-cell office:value-type="float" office:value="1755.96" calcext:value-type="float">
            <text:p>1755.96</text:p>
          </table:table-cell>
          <table:table-cell office:value-type="float" office:value="985.7807" calcext:value-type="float">
            <text:p>985.7807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2026-07-06T09:54:41.624Z</text:p>
          </table:table-cell>
          <table:table-cell office:value-type="float" office:value="62665.3" calcext:value-type="float">
            <text:p>62665.3</text:p>
          </table:table-cell>
          <table:table-cell office:value-type="float" office:value="62688" calcext:value-type="float">
            <text:p>62688</text:p>
          </table:table-cell>
          <table:table-cell office:value-type="float" office:value="62632.01" calcext:value-type="float">
            <text:p>62632.01</text:p>
          </table:table-cell>
          <table:table-cell office:value-type="float" office:value="62676.13" calcext:value-type="float">
            <text:p>62676.13</text:p>
          </table:table-cell>
          <table:table-cell office:value-type="float" office:value="36.23219" calcext:value-type="float">
            <text:p>36.23219</text:p>
          </table:table-cell>
          <table:table-cell office:value-type="float" office:value="7592" calcext:value-type="float">
            <text:p>7592</text:p>
          </table:table-cell>
          <table:table-cell office:value-type="float" office:value="1756.53" calcext:value-type="float">
            <text:p>1756.53</text:p>
          </table:table-cell>
          <table:table-cell office:value-type="float" office:value="1759.38" calcext:value-type="float">
            <text:p>1759.38</text:p>
          </table:table-cell>
          <table:table-cell office:value-type="float" office:value="1755.78" calcext:value-type="float">
            <text:p>1755.78</text:p>
          </table:table-cell>
          <table:table-cell office:value-type="float" office:value="1759.1" calcext:value-type="float">
            <text:p>1759.1</text:p>
          </table:table-cell>
          <table:table-cell office:value-type="float" office:value="1473.516" calcext:value-type="float">
            <text:p>1473.516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2026-07-06T09:59:41.653Z</text:p>
          </table:table-cell>
          <table:table-cell office:value-type="float" office:value="62685.99" calcext:value-type="float">
            <text:p>62685.99</text:p>
          </table:table-cell>
          <table:table-cell office:value-type="float" office:value="62686" calcext:value-type="float">
            <text:p>62686</text:p>
          </table:table-cell>
          <table:table-cell office:value-type="float" office:value="62657.88" calcext:value-type="float">
            <text:p>62657.88</text:p>
          </table:table-cell>
          <table:table-cell office:value-type="float" office:value="62664.76" calcext:value-type="float">
            <text:p>62664.76</text:p>
          </table:table-cell>
          <table:table-cell office:value-type="float" office:value="24.68841" calcext:value-type="float">
            <text:p>24.68841</text:p>
          </table:table-cell>
          <table:table-cell office:value-type="float" office:value="5229" calcext:value-type="float">
            <text:p>5229</text:p>
          </table:table-cell>
          <table:table-cell office:value-type="float" office:value="1758.93" calcext:value-type="float">
            <text:p>1758.93</text:p>
          </table:table-cell>
          <table:table-cell office:value-type="float" office:value="1760.19" calcext:value-type="float">
            <text:p>1760.19</text:p>
          </table:table-cell>
          <table:table-cell office:value-type="float" office:value="1758.27" calcext:value-type="float">
            <text:p>1758.27</text:p>
          </table:table-cell>
          <table:table-cell office:value-type="float" office:value="1758.67" calcext:value-type="float">
            <text:p>1758.67</text:p>
          </table:table-cell>
          <table:table-cell office:value-type="float" office:value="879.9247" calcext:value-type="float">
            <text:p>879.9247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2026-07-06T10:04:41.655Z</text:p>
          </table:table-cell>
          <table:table-cell office:value-type="float" office:value="62676" calcext:value-type="float">
            <text:p>62676</text:p>
          </table:table-cell>
          <table:table-cell office:value-type="float" office:value="62777" calcext:value-type="float">
            <text:p>62777</text:p>
          </table:table-cell>
          <table:table-cell office:value-type="float" office:value="62664.76" calcext:value-type="float">
            <text:p>62664.76</text:p>
          </table:table-cell>
          <table:table-cell office:value-type="float" office:value="62771.98" calcext:value-type="float">
            <text:p>62771.98</text:p>
          </table:table-cell>
          <table:table-cell office:value-type="float" office:value="66.79438" calcext:value-type="float">
            <text:p>66.79438</text:p>
          </table:table-cell>
          <table:table-cell office:value-type="float" office:value="11070" calcext:value-type="float">
            <text:p>11070</text:p>
          </table:table-cell>
          <table:table-cell office:value-type="float" office:value="1759.36" calcext:value-type="float">
            <text:p>1759.36</text:p>
          </table:table-cell>
          <table:table-cell office:value-type="float" office:value="1762.93" calcext:value-type="float">
            <text:p>1762.93</text:p>
          </table:table-cell>
          <table:table-cell office:value-type="float" office:value="1758.24" calcext:value-type="float">
            <text:p>1758.24</text:p>
          </table:table-cell>
          <table:table-cell office:value-type="float" office:value="1762.49" calcext:value-type="float">
            <text:p>1762.49</text:p>
          </table:table-cell>
          <table:table-cell office:value-type="float" office:value="1842.6025" calcext:value-type="float">
            <text:p>1842.6025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string" calcext:value-type="string">
            <text:p>2026-07-06T10:09:41.680Z</text:p>
          </table:table-cell>
          <table:table-cell office:value-type="float" office:value="62754.46" calcext:value-type="float">
            <text:p>62754.46</text:p>
          </table:table-cell>
          <table:table-cell office:value-type="float" office:value="62839.4" calcext:value-type="float">
            <text:p>62839.4</text:p>
          </table:table-cell>
          <table:table-cell office:value-type="float" office:value="62754.46" calcext:value-type="float">
            <text:p>62754.46</text:p>
          </table:table-cell>
          <table:table-cell office:value-type="float" office:value="62826" calcext:value-type="float">
            <text:p>62826</text:p>
          </table:table-cell>
          <table:table-cell office:value-type="float" office:value="84.31517" calcext:value-type="float">
            <text:p>84.31517</text:p>
          </table:table-cell>
          <table:table-cell office:value-type="float" office:value="14794" calcext:value-type="float">
            <text:p>14794</text:p>
          </table:table-cell>
          <table:table-cell office:value-type="float" office:value="1761.26" calcext:value-type="float">
            <text:p>1761.26</text:p>
          </table:table-cell>
          <table:table-cell office:value-type="float" office:value="1766.86" calcext:value-type="float">
            <text:p>1766.86</text:p>
          </table:table-cell>
          <table:table-cell office:value-type="float" office:value="1761.25" calcext:value-type="float">
            <text:p>1761.25</text:p>
          </table:table-cell>
          <table:table-cell office:value-type="float" office:value="1766.53" calcext:value-type="float">
            <text:p>1766.53</text:p>
          </table:table-cell>
          <table:table-cell office:value-type="float" office:value="1845.5877" calcext:value-type="float">
            <text:p>1845.5877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string" calcext:value-type="string">
            <text:p>2026-07-06T10:14:41.706Z</text:p>
          </table:table-cell>
          <table:table-cell office:value-type="float" office:value="62797.54" calcext:value-type="float">
            <text:p>62797.54</text:p>
          </table:table-cell>
          <table:table-cell office:value-type="float" office:value="62844" calcext:value-type="float">
            <text:p>62844</text:p>
          </table:table-cell>
          <table:table-cell office:value-type="float" office:value="62797.54" calcext:value-type="float">
            <text:p>62797.54</text:p>
          </table:table-cell>
          <table:table-cell office:value-type="float" office:value="62840" calcext:value-type="float">
            <text:p>62840</text:p>
          </table:table-cell>
          <table:table-cell office:value-type="float" office:value="37.28627" calcext:value-type="float">
            <text:p>37.28627</text:p>
          </table:table-cell>
          <table:table-cell office:value-type="float" office:value="6036" calcext:value-type="float">
            <text:p>6036</text:p>
          </table:table-cell>
          <table:table-cell office:value-type="float" office:value="1764.63" calcext:value-type="float">
            <text:p>1764.63</text:p>
          </table:table-cell>
          <table:table-cell office:value-type="float" office:value="1766.64" calcext:value-type="float">
            <text:p>1766.64</text:p>
          </table:table-cell>
          <table:table-cell office:value-type="float" office:value="1764.63" calcext:value-type="float">
            <text:p>1764.63</text:p>
          </table:table-cell>
          <table:table-cell office:value-type="float" office:value="1766.14" calcext:value-type="float">
            <text:p>1766.14</text:p>
          </table:table-cell>
          <table:table-cell office:value-type="float" office:value="815.0797" calcext:value-type="float">
            <text:p>815.079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string" calcext:value-type="string">
            <text:p>2026-07-06T10:19:41.734Z</text:p>
          </table:table-cell>
          <table:table-cell office:value-type="float" office:value="62842.7" calcext:value-type="float">
            <text:p>62842.7</text:p>
          </table:table-cell>
          <table:table-cell office:value-type="float" office:value="62869.65" calcext:value-type="float">
            <text:p>62869.65</text:p>
          </table:table-cell>
          <table:table-cell office:value-type="float" office:value="62840" calcext:value-type="float">
            <text:p>62840</text:p>
          </table:table-cell>
          <table:table-cell office:value-type="float" office:value="62850.59" calcext:value-type="float">
            <text:p>62850.59</text:p>
          </table:table-cell>
          <table:table-cell office:value-type="float" office:value="50.92393" calcext:value-type="float">
            <text:p>50.92393</text:p>
          </table:table-cell>
          <table:table-cell office:value-type="float" office:value="6849" calcext:value-type="float">
            <text:p>6849</text:p>
          </table:table-cell>
          <table:table-cell office:value-type="float" office:value="1766.31" calcext:value-type="float">
            <text:p>1766.31</text:p>
          </table:table-cell>
          <table:table-cell office:value-type="float" office:value="1767.64" calcext:value-type="float">
            <text:p>1767.64</text:p>
          </table:table-cell>
          <table:table-cell office:value-type="float" office:value="1765.61" calcext:value-type="float">
            <text:p>1765.61</text:p>
          </table:table-cell>
          <table:table-cell office:value-type="float" office:value="1766.84" calcext:value-type="float">
            <text:p>1766.84</text:p>
          </table:table-cell>
          <table:table-cell office:value-type="float" office:value="879.1333" calcext:value-type="float">
            <text:p>879.1333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2026-07-06T10:24:41.737Z</text:p>
          </table:table-cell>
          <table:table-cell office:value-type="float" office:value="62856" calcext:value-type="float">
            <text:p>62856</text:p>
          </table:table-cell>
          <table:table-cell office:value-type="float" office:value="62870" calcext:value-type="float">
            <text:p>62870</text:p>
          </table:table-cell>
          <table:table-cell office:value-type="float" office:value="62836.75" calcext:value-type="float">
            <text:p>62836.75</text:p>
          </table:table-cell>
          <table:table-cell office:value-type="float" office:value="62859.45" calcext:value-type="float">
            <text:p>62859.45</text:p>
          </table:table-cell>
          <table:table-cell office:value-type="float" office:value="35.09387" calcext:value-type="float">
            <text:p>35.09387</text:p>
          </table:table-cell>
          <table:table-cell office:value-type="float" office:value="6735" calcext:value-type="float">
            <text:p>6735</text:p>
          </table:table-cell>
          <table:table-cell office:value-type="float" office:value="1766.96" calcext:value-type="float">
            <text:p>1766.96</text:p>
          </table:table-cell>
          <table:table-cell office:value-type="float" office:value="1768" calcext:value-type="float">
            <text:p>1768</text:p>
          </table:table-cell>
          <table:table-cell office:value-type="float" office:value="1766.12" calcext:value-type="float">
            <text:p>1766.12</text:p>
          </table:table-cell>
          <table:table-cell office:value-type="float" office:value="1767.15" calcext:value-type="float">
            <text:p>1767.15</text:p>
          </table:table-cell>
          <table:table-cell office:value-type="float" office:value="756.0243" calcext:value-type="float">
            <text:p>756.0243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string" calcext:value-type="string">
            <text:p>2026-07-06T10:29:41.764Z</text:p>
          </table:table-cell>
          <table:table-cell office:value-type="float" office:value="62859.45" calcext:value-type="float">
            <text:p>62859.45</text:p>
          </table:table-cell>
          <table:table-cell office:value-type="float" office:value="62883.54" calcext:value-type="float">
            <text:p>62883.54</text:p>
          </table:table-cell>
          <table:table-cell office:value-type="float" office:value="62859.43" calcext:value-type="float">
            <text:p>62859.43</text:p>
          </table:table-cell>
          <table:table-cell office:value-type="float" office:value="62882.02" calcext:value-type="float">
            <text:p>62882.02</text:p>
          </table:table-cell>
          <table:table-cell office:value-type="float" office:value="31.41297" calcext:value-type="float">
            <text:p>31.41297</text:p>
          </table:table-cell>
          <table:table-cell office:value-type="float" office:value="3080" calcext:value-type="float">
            <text:p>3080</text:p>
          </table:table-cell>
          <table:table-cell office:value-type="float" office:value="1767.07" calcext:value-type="float">
            <text:p>1767.07</text:p>
          </table:table-cell>
          <table:table-cell office:value-type="float" office:value="1767.82" calcext:value-type="float">
            <text:p>1767.82</text:p>
          </table:table-cell>
          <table:table-cell office:value-type="float" office:value="1766.97" calcext:value-type="float">
            <text:p>1766.97</text:p>
          </table:table-cell>
          <table:table-cell office:value-type="float" office:value="1767.09" calcext:value-type="float">
            <text:p>1767.09</text:p>
          </table:table-cell>
          <table:table-cell office:value-type="float" office:value="444.3614" calcext:value-type="float">
            <text:p>444.3614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2026-07-06T10:34:41.791Z</text:p>
          </table:table-cell>
          <table:table-cell office:value-type="float" office:value="62876.56" calcext:value-type="float">
            <text:p>62876.56</text:p>
          </table:table-cell>
          <table:table-cell office:value-type="float" office:value="62982" calcext:value-type="float">
            <text:p>62982</text:p>
          </table:table-cell>
          <table:table-cell office:value-type="float" office:value="62871.45" calcext:value-type="float">
            <text:p>62871.45</text:p>
          </table:table-cell>
          <table:table-cell office:value-type="float" office:value="62940.3" calcext:value-type="float">
            <text:p>62940.3</text:p>
          </table:table-cell>
          <table:table-cell office:value-type="float" office:value="40.61021" calcext:value-type="float">
            <text:p>40.61021</text:p>
          </table:table-cell>
          <table:table-cell office:value-type="float" office:value="7942" calcext:value-type="float">
            <text:p>7942</text:p>
          </table:table-cell>
          <table:table-cell office:value-type="float" office:value="1767.28" calcext:value-type="float">
            <text:p>1767.28</text:p>
          </table:table-cell>
          <table:table-cell office:value-type="float" office:value="1771.38" calcext:value-type="float">
            <text:p>1771.38</text:p>
          </table:table-cell>
          <table:table-cell office:value-type="float" office:value="1766.53" calcext:value-type="float">
            <text:p>1766.53</text:p>
          </table:table-cell>
          <table:table-cell office:value-type="float" office:value="1769.65" calcext:value-type="float">
            <text:p>1769.65</text:p>
          </table:table-cell>
          <table:table-cell office:value-type="float" office:value="704.0683" calcext:value-type="float">
            <text:p>704.0683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2026-07-06T10:39:41.791Z</text:p>
          </table:table-cell>
          <table:table-cell office:value-type="float" office:value="62960" calcext:value-type="float">
            <text:p>62960</text:p>
          </table:table-cell>
          <table:table-cell office:value-type="float" office:value="63007.59" calcext:value-type="float">
            <text:p>63007.59</text:p>
          </table:table-cell>
          <table:table-cell office:value-type="float" office:value="62926" calcext:value-type="float">
            <text:p>62926</text:p>
          </table:table-cell>
          <table:table-cell office:value-type="float" office:value="63007.34" calcext:value-type="float">
            <text:p>63007.34</text:p>
          </table:table-cell>
          <table:table-cell office:value-type="float" office:value="43.23483" calcext:value-type="float">
            <text:p>43.23483</text:p>
          </table:table-cell>
          <table:table-cell office:value-type="float" office:value="11540" calcext:value-type="float">
            <text:p>11540</text:p>
          </table:table-cell>
          <table:table-cell office:value-type="float" office:value="1770.97" calcext:value-type="float">
            <text:p>1770.97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1769.29" calcext:value-type="float">
            <text:p>1769.29</text:p>
          </table:table-cell>
          <table:table-cell office:value-type="float" office:value="1774.16" calcext:value-type="float">
            <text:p>1774.16</text:p>
          </table:table-cell>
          <table:table-cell office:value-type="float" office:value="1225.7396" calcext:value-type="float">
            <text:p>1225.7396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string" calcext:value-type="string">
            <text:p>2026-07-06T10:44:41.795Z</text:p>
          </table:table-cell>
          <table:table-cell office:value-type="float" office:value="62988.12" calcext:value-type="float">
            <text:p>62988.12</text:p>
          </table:table-cell>
          <table:table-cell office:value-type="float" office:value="63030" calcext:value-type="float">
            <text:p>63030</text:p>
          </table:table-cell>
          <table:table-cell office:value-type="float" office:value="62904" calcext:value-type="float">
            <text:p>62904</text:p>
          </table:table-cell>
          <table:table-cell office:value-type="float" office:value="62926.79" calcext:value-type="float">
            <text:p>62926.79</text:p>
          </table:table-cell>
          <table:table-cell office:value-type="float" office:value="43.03432" calcext:value-type="float">
            <text:p>43.03432</text:p>
          </table:table-cell>
          <table:table-cell office:value-type="float" office:value="13466" calcext:value-type="float">
            <text:p>13466</text:p>
          </table:table-cell>
          <table:table-cell office:value-type="float" office:value="1771.38" calcext:value-type="float">
            <text:p>1771.38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1770.92" calcext:value-type="float">
            <text:p>1770.92</text:p>
          </table:table-cell>
          <table:table-cell office:value-type="float" office:value="1772.7" calcext:value-type="float">
            <text:p>1772.7</text:p>
          </table:table-cell>
          <table:table-cell office:value-type="float" office:value="983.806" calcext:value-type="float">
            <text:p>983.806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string" calcext:value-type="string">
            <text:p>2026-07-06T10:49:41.820Z</text:p>
          </table:table-cell>
          <table:table-cell office:value-type="float" office:value="62904.01" calcext:value-type="float">
            <text:p>62904.01</text:p>
          </table:table-cell>
          <table:table-cell office:value-type="float" office:value="62934.12" calcext:value-type="float">
            <text:p>62934.12</text:p>
          </table:table-cell>
          <table:table-cell office:value-type="float" office:value="62846.08" calcext:value-type="float">
            <text:p>62846.08</text:p>
          </table:table-cell>
          <table:table-cell office:value-type="float" office:value="62867.81" calcext:value-type="float">
            <text:p>62867.81</text:p>
          </table:table-cell>
          <table:table-cell office:value-type="float" office:value="41.59615" calcext:value-type="float">
            <text:p>41.59615</text:p>
          </table:table-cell>
          <table:table-cell office:value-type="float" office:value="7090" calcext:value-type="float">
            <text:p>7090</text:p>
          </table:table-cell>
          <table:table-cell office:value-type="float" office:value="1771.85" calcext:value-type="float">
            <text:p>1771.85</text:p>
          </table:table-cell>
          <table:table-cell office:value-type="float" office:value="1773.09" calcext:value-type="float">
            <text:p>1773.09</text:p>
          </table:table-cell>
          <table:table-cell office:value-type="float" office:value="1770.64" calcext:value-type="float">
            <text:p>1770.64</text:p>
          </table:table-cell>
          <table:table-cell office:value-type="float" office:value="1771.19" calcext:value-type="float">
            <text:p>1771.19</text:p>
          </table:table-cell>
          <table:table-cell office:value-type="float" office:value="472.2106" calcext:value-type="float">
            <text:p>472.2106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string" calcext:value-type="string">
            <text:p>2026-07-06T10:54:41.844Z</text:p>
          </table:table-cell>
          <table:table-cell office:value-type="float" office:value="62881.16" calcext:value-type="float">
            <text:p>62881.16</text:p>
          </table:table-cell>
          <table:table-cell office:value-type="float" office:value="62881.17" calcext:value-type="float">
            <text:p>62881.17</text:p>
          </table:table-cell>
          <table:table-cell office:value-type="float" office:value="62817.04" calcext:value-type="float">
            <text:p>62817.04</text:p>
          </table:table-cell>
          <table:table-cell office:value-type="float" office:value="62822" calcext:value-type="float">
            <text:p>62822</text:p>
          </table:table-cell>
          <table:table-cell office:value-type="float" office:value="40.31308" calcext:value-type="float">
            <text:p>40.31308</text:p>
          </table:table-cell>
          <table:table-cell office:value-type="float" office:value="9642" calcext:value-type="float">
            <text:p>9642</text:p>
          </table:table-cell>
          <table:table-cell office:value-type="float" office:value="1770.91" calcext:value-type="float">
            <text:p>1770.91</text:p>
          </table:table-cell>
          <table:table-cell office:value-type="float" office:value="1771.88" calcext:value-type="float">
            <text:p>1771.88</text:p>
          </table:table-cell>
          <table:table-cell office:value-type="float" office:value="1769.45" calcext:value-type="float">
            <text:p>1769.45</text:p>
          </table:table-cell>
          <table:table-cell office:value-type="float" office:value="1769.6" calcext:value-type="float">
            <text:p>1769.6</text:p>
          </table:table-cell>
          <table:table-cell office:value-type="float" office:value="798.1688" calcext:value-type="float">
            <text:p>798.1688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string" calcext:value-type="string">
            <text:p>2026-07-06T10:59:41.868Z</text:p>
          </table:table-cell>
          <table:table-cell table:number-columns-repeated="2" office:value-type="float" office:value="62838.01" calcext:value-type="float">
            <text:p>62838.01</text:p>
          </table:table-cell>
          <table:table-cell office:value-type="float" office:value="62806.78" calcext:value-type="float">
            <text:p>62806.78</text:p>
          </table:table-cell>
          <table:table-cell office:value-type="float" office:value="62820.91" calcext:value-type="float">
            <text:p>62820.91</text:p>
          </table:table-cell>
          <table:table-cell office:value-type="float" office:value="23.66762" calcext:value-type="float">
            <text:p>23.66762</text:p>
          </table:table-cell>
          <table:table-cell office:value-type="float" office:value="4758" calcext:value-type="float">
            <text:p>4758</text:p>
          </table:table-cell>
          <table:table-cell office:value-type="float" office:value="1769.73" calcext:value-type="float">
            <text:p>1769.73</text:p>
          </table:table-cell>
          <table:table-cell office:value-type="float" office:value="1770.79" calcext:value-type="float">
            <text:p>1770.79</text:p>
          </table:table-cell>
          <table:table-cell office:value-type="float" office:value="1769.45" calcext:value-type="float">
            <text:p>1769.45</text:p>
          </table:table-cell>
          <table:table-cell office:value-type="float" office:value="1770.78" calcext:value-type="float">
            <text:p>1770.78</text:p>
          </table:table-cell>
          <table:table-cell office:value-type="float" office:value="326.3712" calcext:value-type="float">
            <text:p>326.371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2026-07-06T11:04:41.894Z</text:p>
          </table:table-cell>
          <table:table-cell office:value-type="float" office:value="62819.73" calcext:value-type="float">
            <text:p>62819.73</text:p>
          </table:table-cell>
          <table:table-cell office:value-type="float" office:value="62885.15" calcext:value-type="float">
            <text:p>62885.15</text:p>
          </table:table-cell>
          <table:table-cell office:value-type="float" office:value="62819.72" calcext:value-type="float">
            <text:p>62819.72</text:p>
          </table:table-cell>
          <table:table-cell office:value-type="float" office:value="62874" calcext:value-type="float">
            <text:p>62874</text:p>
          </table:table-cell>
          <table:table-cell office:value-type="float" office:value="23.67119" calcext:value-type="float">
            <text:p>23.67119</text:p>
          </table:table-cell>
          <table:table-cell office:value-type="float" office:value="10417" calcext:value-type="float">
            <text:p>10417</text:p>
          </table:table-cell>
          <table:table-cell office:value-type="float" office:value="1770.38" calcext:value-type="float">
            <text:p>1770.38</text:p>
          </table:table-cell>
          <table:table-cell office:value-type="float" office:value="1773.5" calcext:value-type="float">
            <text:p>1773.5</text:p>
          </table:table-cell>
          <table:table-cell office:value-type="float" office:value="1770.37" calcext:value-type="float">
            <text:p>1770.37</text:p>
          </table:table-cell>
          <table:table-cell office:value-type="float" office:value="1771.5" calcext:value-type="float">
            <text:p>1771.5</text:p>
          </table:table-cell>
          <table:table-cell office:value-type="float" office:value="462.5845" calcext:value-type="float">
            <text:p>462.5845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2026-07-06T11:09:41.920Z</text:p>
          </table:table-cell>
          <table:table-cell office:value-type="float" office:value="62870" calcext:value-type="float">
            <text:p>62870</text:p>
          </table:table-cell>
          <table:table-cell office:value-type="float" office:value="62877.25" calcext:value-type="float">
            <text:p>62877.25</text:p>
          </table:table-cell>
          <table:table-cell office:value-type="float" office:value="62826" calcext:value-type="float">
            <text:p>62826</text:p>
          </table:table-cell>
          <table:table-cell office:value-type="float" office:value="62826.01" calcext:value-type="float">
            <text:p>62826.01</text:p>
          </table:table-cell>
          <table:table-cell office:value-type="float" office:value="39.33648" calcext:value-type="float">
            <text:p>39.33648</text:p>
          </table:table-cell>
          <table:table-cell office:value-type="float" office:value="3613" calcext:value-type="float">
            <text:p>3613</text:p>
          </table:table-cell>
          <table:table-cell table:number-columns-repeated="2" office:value-type="float" office:value="1771.84" calcext:value-type="float">
            <text:p>1771.84</text:p>
          </table:table-cell>
          <table:table-cell office:value-type="float" office:value="1768.41" calcext:value-type="float">
            <text:p>1768.41</text:p>
          </table:table-cell>
          <table:table-cell office:value-type="float" office:value="1768.53" calcext:value-type="float">
            <text:p>1768.53</text:p>
          </table:table-cell>
          <table:table-cell office:value-type="float" office:value="1039.9487" calcext:value-type="float">
            <text:p>1039.9487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2026-07-06T11:14:41.946Z</text:p>
          </table:table-cell>
          <table:table-cell table:number-columns-repeated="2" office:value-type="float" office:value="62833.21" calcext:value-type="float">
            <text:p>62833.21</text:p>
          </table:table-cell>
          <table:table-cell office:value-type="float" office:value="62800" calcext:value-type="float">
            <text:p>62800</text:p>
          </table:table-cell>
          <table:table-cell office:value-type="float" office:value="62807.69" calcext:value-type="float">
            <text:p>62807.69</text:p>
          </table:table-cell>
          <table:table-cell office:value-type="float" office:value="15.16967" calcext:value-type="float">
            <text:p>15.16967</text:p>
          </table:table-cell>
          <table:table-cell office:value-type="float" office:value="3985" calcext:value-type="float">
            <text:p>3985</text:p>
          </table:table-cell>
          <table:table-cell office:value-type="float" office:value="1768.87" calcext:value-type="float">
            <text:p>1768.87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1768.02" calcext:value-type="float">
            <text:p>1768.02</text:p>
          </table:table-cell>
          <table:table-cell office:value-type="float" office:value="1768.25" calcext:value-type="float">
            <text:p>1768.25</text:p>
          </table:table-cell>
          <table:table-cell office:value-type="float" office:value="816.596" calcext:value-type="float">
            <text:p>816.596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2026-07-06T11:19:41.972Z</text:p>
          </table:table-cell>
          <table:table-cell office:value-type="float" office:value="62814" calcext:value-type="float">
            <text:p>62814</text:p>
          </table:table-cell>
          <table:table-cell office:value-type="float" office:value="62838.91" calcext:value-type="float">
            <text:p>62838.91</text:p>
          </table:table-cell>
          <table:table-cell office:value-type="float" office:value="62783.46" calcext:value-type="float">
            <text:p>62783.46</text:p>
          </table:table-cell>
          <table:table-cell office:value-type="float" office:value="62830.2" calcext:value-type="float">
            <text:p>62830.2</text:p>
          </table:table-cell>
          <table:table-cell office:value-type="float" office:value="34.5668" calcext:value-type="float">
            <text:p>34.5668</text:p>
          </table:table-cell>
          <table:table-cell office:value-type="float" office:value="4568" calcext:value-type="float">
            <text:p>4568</text:p>
          </table:table-cell>
          <table:table-cell office:value-type="float" office:value="1768.59" calcext:value-type="float">
            <text:p>1768.59</text:p>
          </table:table-cell>
          <table:table-cell office:value-type="float" office:value="1769.46" calcext:value-type="float">
            <text:p>1769.46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769.46" calcext:value-type="float">
            <text:p>1769.46</text:p>
          </table:table-cell>
          <table:table-cell office:value-type="float" office:value="234.7756" calcext:value-type="float">
            <text:p>234.7756</text:p>
          </table:table-cell>
          <table:table-cell office:value-type="float" office:value="3598" calcext:value-type="float">
            <text:p>3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13:43:58.548586469</dc:date>
    <meta:editing-duration>PT10M16S</meta:editing-duration>
    <meta:editing-cycles>3</meta:editing-cycles>
    <meta:generator>LibreOffice/25.2.3.2$Linux_X86_64 LibreOffice_project/520$Build-2</meta:generator>
    <meta:document-statistic meta:table-count="1" meta:cell-count="386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00" chart:maximum="6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poly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a93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02cm" svg:height="14.902cm" xlink:href=".." xlink:type="simple" chart:class="chart:line" chart:style-name="ch1">
        <chart:legend chart:legend-position="bottom" svg:x="8.615cm" svg:y="14.303cm" style:legend-expansion="wide" chart:style-name="ch2"/>
        <chart:plot-area chart:style-name="ch3" svg:x="0.558cm" svg:y="0.298cm" svg:width="26.786cm" svg:height="13.523cm">
          <chart:coordinate-region svg:x="1.765cm" svg:y="0.497cm" svg:width="24.753cm" svg:height="12.3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rade_history.E2:trade_history.E297" chart:label-cell-address="trade_history.E1:trade_history.E1" chart:class="chart:line">
            <chart:data-point chart:repeated="296"/>
          </chart:series>
          <chart:series chart:attached-axis="secondary-y" chart:style-name="ch9" chart:values-cell-range-address="trade_history.F2:trade_history.F297" chart:label-cell-address="trade_history.F1:trade_history.F1" chart:class="chart:line">
            <chart:regression-curve chart:style-name="ch10"/>
            <chart:data-point chart:repeated="296"/>
          </chart:series>
          <chart:series chart:attached-axis="primary-y" chart:style-name="ch11" chart:values-cell-range-address="trade_history.G2:trade_history.G297" chart:label-cell-address="trade_history.G1:trade_history.G1" chart:class="chart:line">
            <chart:data-point chart:repeated="2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C_close</text:p>
                <draw:g>
                  <svg:desc>trade_history.E1:trade_history.E1</svg:desc>
                </draw:g>
              </table:table-cell>
              <table:table-cell office:value-type="string">
                <text:p>BTC_volume</text:p>
                <draw:g>
                  <svg:desc>trade_history.F1:trade_history.F1</svg:desc>
                </draw:g>
              </table:table-cell>
              <table:table-cell office:value-type="string">
                <text:p>BTC_trades</text:p>
                <draw:g>
                  <svg:desc>trade_history.G1:trade_history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94.2">
                <text:p>62494.2</text:p>
                <draw:g>
                  <svg:desc>trade_history.E2:trade_history.E297</svg:desc>
                </draw:g>
              </table:table-cell>
              <table:table-cell office:value-type="float" office:value="44.05532">
                <text:p>44.05532</text:p>
                <draw:g>
                  <svg:desc>trade_history.F2:trade_history.F297</svg:desc>
                </draw:g>
              </table:table-cell>
              <table:table-cell office:value-type="float" office:value="6725">
                <text:p>6725</text:p>
                <draw:g>
                  <svg:desc>trade_history.G2:trade_history.G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51.99">
                <text:p>62451.99</text:p>
              </table:table-cell>
              <table:table-cell office:value-type="float" office:value="9.30675">
                <text:p>9.3067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489.99">
                <text:p>62489.99</text:p>
              </table:table-cell>
              <table:table-cell office:value-type="float" office:value="29.76951">
                <text:p>29.76951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00">
                <text:p>62500</text:p>
              </table:table-cell>
              <table:table-cell office:value-type="float" office:value="12.21408">
                <text:p>12.2140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61.4">
                <text:p>62561.4</text:p>
              </table:table-cell>
              <table:table-cell office:value-type="float" office:value="27.45148">
                <text:p>27.4514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50">
                <text:p>62550</text:p>
              </table:table-cell>
              <table:table-cell office:value-type="float" office:value="5.18047">
                <text:p>5.18047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68">
                <text:p>62568</text:p>
              </table:table-cell>
              <table:table-cell office:value-type="float" office:value="23.42607">
                <text:p>23.42607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503.03">
                <text:p>62503.03</text:p>
              </table:table-cell>
              <table:table-cell office:value-type="float" office:value="15.26009">
                <text:p>15.26009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531.99">
                <text:p>62531.99</text:p>
              </table:table-cell>
              <table:table-cell office:value-type="float" office:value="18.5418">
                <text:p>18.5418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74">
                <text:p>62574</text:p>
              </table:table-cell>
              <table:table-cell office:value-type="float" office:value="13.71096">
                <text:p>13.71096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57.99">
                <text:p>62557.99</text:p>
              </table:table-cell>
              <table:table-cell office:value-type="float" office:value="20.54859">
                <text:p>20.54859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565.99">
                <text:p>62565.99</text:p>
              </table:table-cell>
              <table:table-cell office:value-type="float" office:value="6.91714">
                <text:p>6.91714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53.98">
                <text:p>62553.98</text:p>
              </table:table-cell>
              <table:table-cell office:value-type="float" office:value="23.12008">
                <text:p>23.12008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720">
                <text:p>62720</text:p>
              </table:table-cell>
              <table:table-cell office:value-type="float" office:value="57.90974">
                <text:p>57.90974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718.8">
                <text:p>62718.8</text:p>
              </table:table-cell>
              <table:table-cell office:value-type="float" office:value="27.01405">
                <text:p>27.01405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82.01">
                <text:p>62682.01</text:p>
              </table:table-cell>
              <table:table-cell office:value-type="float" office:value="39.21199">
                <text:p>39.21199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683.57">
                <text:p>62683.57</text:p>
              </table:table-cell>
              <table:table-cell office:value-type="float" office:value="19.1702">
                <text:p>19.1702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628.2">
                <text:p>62628.2</text:p>
              </table:table-cell>
              <table:table-cell office:value-type="float" office:value="30.08188">
                <text:p>30.08188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26.81">
                <text:p>62626.81</text:p>
              </table:table-cell>
              <table:table-cell office:value-type="float" office:value="15.29787">
                <text:p>15.29787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642">
                <text:p>62642</text:p>
              </table:table-cell>
              <table:table-cell office:value-type="float" office:value="16.91228">
                <text:p>16.91228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99.99">
                <text:p>62699.99</text:p>
              </table:table-cell>
              <table:table-cell office:value-type="float" office:value="16.49978">
                <text:p>16.49978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633.21">
                <text:p>62633.21</text:p>
              </table:table-cell>
              <table:table-cell office:value-type="float" office:value="8.41803">
                <text:p>8.41803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19.99">
                <text:p>62619.99</text:p>
              </table:table-cell>
              <table:table-cell office:value-type="float" office:value="32.53605">
                <text:p>32.5360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706">
                <text:p>62706</text:p>
              </table:table-cell>
              <table:table-cell office:value-type="float" office:value="19.32323">
                <text:p>19.32323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666.86">
                <text:p>62666.86</text:p>
              </table:table-cell>
              <table:table-cell office:value-type="float" office:value="10.68133">
                <text:p>10.68133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676.01">
                <text:p>62676.01</text:p>
              </table:table-cell>
              <table:table-cell office:value-type="float" office:value="20.26254">
                <text:p>20.26254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690">
                <text:p>62690</text:p>
              </table:table-cell>
              <table:table-cell office:value-type="float" office:value="13.35326">
                <text:p>13.35326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07">
                <text:p>62707</text:p>
              </table:table-cell>
              <table:table-cell office:value-type="float" office:value="38.64998">
                <text:p>38.64998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702.01">
                <text:p>62702.01</text:p>
              </table:table-cell>
              <table:table-cell office:value-type="float" office:value="27.7938">
                <text:p>27.7938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660">
                <text:p>62660</text:p>
              </table:table-cell>
              <table:table-cell office:value-type="float" office:value="38.50735">
                <text:p>38.5073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605.98">
                <text:p>62605.98</text:p>
              </table:table-cell>
              <table:table-cell office:value-type="float" office:value="138.41973">
                <text:p>138.41973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09.3">
                <text:p>62609.3</text:p>
              </table:table-cell>
              <table:table-cell office:value-type="float" office:value="11.45826">
                <text:p>11.45826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586">
                <text:p>62586</text:p>
              </table:table-cell>
              <table:table-cell office:value-type="float" office:value="6.9599">
                <text:p>6.9599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70.01">
                <text:p>62570.01</text:p>
              </table:table-cell>
              <table:table-cell office:value-type="float" office:value="11.09362">
                <text:p>11.0936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505.16">
                <text:p>62505.16</text:p>
              </table:table-cell>
              <table:table-cell office:value-type="float" office:value="31.44113">
                <text:p>31.44113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514.74">
                <text:p>62514.74</text:p>
              </table:table-cell>
              <table:table-cell office:value-type="float" office:value="17.93506">
                <text:p>17.93506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517.84">
                <text:p>62517.84</text:p>
              </table:table-cell>
              <table:table-cell office:value-type="float" office:value="9.9755">
                <text:p>9.9755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13.63">
                <text:p>62513.63</text:p>
              </table:table-cell>
              <table:table-cell office:value-type="float" office:value="45.9074">
                <text:p>45.9074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564.55">
                <text:p>62564.55</text:p>
              </table:table-cell>
              <table:table-cell office:value-type="float" office:value="30.04836">
                <text:p>30.04836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579.55">
                <text:p>62579.55</text:p>
              </table:table-cell>
              <table:table-cell office:value-type="float" office:value="31.04405">
                <text:p>31.04405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546">
                <text:p>62546</text:p>
              </table:table-cell>
              <table:table-cell office:value-type="float" office:value="39.74008">
                <text:p>39.74008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451.97">
                <text:p>62451.97</text:p>
              </table:table-cell>
              <table:table-cell office:value-type="float" office:value="46.38763">
                <text:p>46.3876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488">
                <text:p>62488</text:p>
              </table:table-cell>
              <table:table-cell office:value-type="float" office:value="13.66373">
                <text:p>13.6637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529.33">
                <text:p>62529.33</text:p>
              </table:table-cell>
              <table:table-cell office:value-type="float" office:value="17.8017">
                <text:p>17.8017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485.39">
                <text:p>62485.39</text:p>
              </table:table-cell>
              <table:table-cell office:value-type="float" office:value="64.53694">
                <text:p>64.53694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437.09">
                <text:p>62437.09</text:p>
              </table:table-cell>
              <table:table-cell office:value-type="float" office:value="19.58525">
                <text:p>19.58525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416.7">
                <text:p>62416.7</text:p>
              </table:table-cell>
              <table:table-cell office:value-type="float" office:value="9.97378">
                <text:p>9.973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359.21">
                <text:p>62359.21</text:p>
              </table:table-cell>
              <table:table-cell office:value-type="float" office:value="48.10334">
                <text:p>48.10334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491.64">
                <text:p>62491.64</text:p>
              </table:table-cell>
              <table:table-cell office:value-type="float" office:value="42.9722">
                <text:p>42.9722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459.09">
                <text:p>62459.09</text:p>
              </table:table-cell>
              <table:table-cell office:value-type="float" office:value="17.61339">
                <text:p>17.61339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487.99">
                <text:p>62487.99</text:p>
              </table:table-cell>
              <table:table-cell office:value-type="float" office:value="33.57556">
                <text:p>33.5755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472.01">
                <text:p>62472.01</text:p>
              </table:table-cell>
              <table:table-cell office:value-type="float" office:value="11.79234">
                <text:p>11.7923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508">
                <text:p>62508</text:p>
              </table:table-cell>
              <table:table-cell office:value-type="float" office:value="26.08724">
                <text:p>26.08724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03.99">
                <text:p>62503.99</text:p>
              </table:table-cell>
              <table:table-cell office:value-type="float" office:value="33.04656">
                <text:p>33.04656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486.85">
                <text:p>62486.85</text:p>
              </table:table-cell>
              <table:table-cell office:value-type="float" office:value="14.69351">
                <text:p>14.69351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489.72">
                <text:p>62489.72</text:p>
              </table:table-cell>
              <table:table-cell office:value-type="float" office:value="21.75402">
                <text:p>21.75402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38.63">
                <text:p>62538.63</text:p>
              </table:table-cell>
              <table:table-cell office:value-type="float" office:value="66.60192">
                <text:p>66.60192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30">
                <text:p>62530</text:p>
              </table:table-cell>
              <table:table-cell office:value-type="float" office:value="29.77746">
                <text:p>29.77746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63.34">
                <text:p>62563.34</text:p>
              </table:table-cell>
              <table:table-cell office:value-type="float" office:value="25.77196">
                <text:p>25.77196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546">
                <text:p>62546</text:p>
              </table:table-cell>
              <table:table-cell office:value-type="float" office:value="49.73779">
                <text:p>49.73779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550">
                <text:p>62550</text:p>
              </table:table-cell>
              <table:table-cell office:value-type="float" office:value="34.38823">
                <text:p>34.3882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492.18">
                <text:p>62492.18</text:p>
              </table:table-cell>
              <table:table-cell office:value-type="float" office:value="41.41252">
                <text:p>41.4125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3.99">
                <text:p>62523.99</text:p>
              </table:table-cell>
              <table:table-cell office:value-type="float" office:value="70.36019">
                <text:p>70.36019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535.88">
                <text:p>62535.88</text:p>
              </table:table-cell>
              <table:table-cell office:value-type="float" office:value="86.33509">
                <text:p>86.33509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588">
                <text:p>62588</text:p>
              </table:table-cell>
              <table:table-cell office:value-type="float" office:value="29.92617">
                <text:p>29.9261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572.91">
                <text:p>62572.91</text:p>
              </table:table-cell>
              <table:table-cell office:value-type="float" office:value="13.55395">
                <text:p>13.5539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550.91">
                <text:p>62550.91</text:p>
              </table:table-cell>
              <table:table-cell office:value-type="float" office:value="24.50949">
                <text:p>24.50949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550.92">
                <text:p>62550.92</text:p>
              </table:table-cell>
              <table:table-cell office:value-type="float" office:value="18.95693">
                <text:p>18.95693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18">
                <text:p>62518</text:p>
              </table:table-cell>
              <table:table-cell office:value-type="float" office:value="12.5102">
                <text:p>12.510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20">
                <text:p>62520</text:p>
              </table:table-cell>
              <table:table-cell office:value-type="float" office:value="10.94108">
                <text:p>10.94108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580">
                <text:p>62580</text:p>
              </table:table-cell>
              <table:table-cell office:value-type="float" office:value="12.64492">
                <text:p>12.64492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570">
                <text:p>62570</text:p>
              </table:table-cell>
              <table:table-cell office:value-type="float" office:value="16.54398">
                <text:p>16.54398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558.7">
                <text:p>62558.7</text:p>
              </table:table-cell>
              <table:table-cell office:value-type="float" office:value="15.49412">
                <text:p>15.4941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605.54">
                <text:p>62605.54</text:p>
              </table:table-cell>
              <table:table-cell office:value-type="float" office:value="24.6072">
                <text:p>24.6072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590.71">
                <text:p>62590.71</text:p>
              </table:table-cell>
              <table:table-cell office:value-type="float" office:value="60.26465">
                <text:p>60.26465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615.99">
                <text:p>62615.99</text:p>
              </table:table-cell>
              <table:table-cell office:value-type="float" office:value="50.85252">
                <text:p>50.85252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39.15">
                <text:p>62639.15</text:p>
              </table:table-cell>
              <table:table-cell office:value-type="float" office:value="30.20698">
                <text:p>30.20698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597.41">
                <text:p>62597.41</text:p>
              </table:table-cell>
              <table:table-cell office:value-type="float" office:value="55.15719">
                <text:p>55.15719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40.01">
                <text:p>62540.01</text:p>
              </table:table-cell>
              <table:table-cell office:value-type="float" office:value="38.81927">
                <text:p>38.81927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54.31">
                <text:p>62554.31</text:p>
              </table:table-cell>
              <table:table-cell office:value-type="float" office:value="25.38012">
                <text:p>25.38012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550.01">
                <text:p>62550.01</text:p>
              </table:table-cell>
              <table:table-cell office:value-type="float" office:value="11.87726">
                <text:p>11.87726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483.79">
                <text:p>62483.79</text:p>
              </table:table-cell>
              <table:table-cell office:value-type="float" office:value="16.74231">
                <text:p>16.74231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472">
                <text:p>62472</text:p>
              </table:table-cell>
              <table:table-cell office:value-type="float" office:value="9.16208">
                <text:p>9.1620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460">
                <text:p>62460</text:p>
              </table:table-cell>
              <table:table-cell office:value-type="float" office:value="7.91825">
                <text:p>7.9182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64.23">
                <text:p>62464.23</text:p>
              </table:table-cell>
              <table:table-cell office:value-type="float" office:value="17.8481">
                <text:p>17.8481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420">
                <text:p>62420</text:p>
              </table:table-cell>
              <table:table-cell office:value-type="float" office:value="69.65106">
                <text:p>69.65106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437.81">
                <text:p>62437.81</text:p>
              </table:table-cell>
              <table:table-cell office:value-type="float" office:value="21.73274">
                <text:p>21.73274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488">
                <text:p>62488</text:p>
              </table:table-cell>
              <table:table-cell office:value-type="float" office:value="18.86776">
                <text:p>18.86776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497.49">
                <text:p>62497.49</text:p>
              </table:table-cell>
              <table:table-cell office:value-type="float" office:value="10.4121">
                <text:p>10.412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502.07">
                <text:p>62502.07</text:p>
              </table:table-cell>
              <table:table-cell office:value-type="float" office:value="29.56049">
                <text:p>29.56049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490">
                <text:p>62490</text:p>
              </table:table-cell>
              <table:table-cell office:value-type="float" office:value="9.00572">
                <text:p>9.00572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465.75">
                <text:p>62465.75</text:p>
              </table:table-cell>
              <table:table-cell office:value-type="float" office:value="33.14258">
                <text:p>33.14258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460.8">
                <text:p>62460.8</text:p>
              </table:table-cell>
              <table:table-cell office:value-type="float" office:value="3.70152">
                <text:p>3.7015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457.39">
                <text:p>62457.39</text:p>
              </table:table-cell>
              <table:table-cell office:value-type="float" office:value="21.70574">
                <text:p>21.70574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502.36">
                <text:p>62502.36</text:p>
              </table:table-cell>
              <table:table-cell office:value-type="float" office:value="31.06081">
                <text:p>31.06081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513.35">
                <text:p>62513.35</text:p>
              </table:table-cell>
              <table:table-cell office:value-type="float" office:value="32.22589">
                <text:p>32.22589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490.34">
                <text:p>62490.34</text:p>
              </table:table-cell>
              <table:table-cell office:value-type="float" office:value="27.84281">
                <text:p>27.84281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486.03">
                <text:p>62486.03</text:p>
              </table:table-cell>
              <table:table-cell office:value-type="float" office:value="11.13896">
                <text:p>11.1389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486.43">
                <text:p>62486.43</text:p>
              </table:table-cell>
              <table:table-cell office:value-type="float" office:value="8.42075">
                <text:p>8.42075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482.46">
                <text:p>62482.46</text:p>
              </table:table-cell>
              <table:table-cell office:value-type="float" office:value="10.52792">
                <text:p>10.5279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502.38">
                <text:p>62502.38</text:p>
              </table:table-cell>
              <table:table-cell office:value-type="float" office:value="41.21199">
                <text:p>41.21199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545.01">
                <text:p>62545.01</text:p>
              </table:table-cell>
              <table:table-cell office:value-type="float" office:value="27.23671">
                <text:p>27.2367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477.99">
                <text:p>62477.99</text:p>
              </table:table-cell>
              <table:table-cell office:value-type="float" office:value="21.23667">
                <text:p>21.23667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480.2">
                <text:p>62480.2</text:p>
              </table:table-cell>
              <table:table-cell office:value-type="float" office:value="9.70193">
                <text:p>9.70193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507.13">
                <text:p>62507.13</text:p>
              </table:table-cell>
              <table:table-cell office:value-type="float" office:value="15.20631">
                <text:p>15.20631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544.55">
                <text:p>62544.55</text:p>
              </table:table-cell>
              <table:table-cell office:value-type="float" office:value="40.41225">
                <text:p>40.4122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515.74">
                <text:p>62515.74</text:p>
              </table:table-cell>
              <table:table-cell office:value-type="float" office:value="18.00188">
                <text:p>18.00188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490.43">
                <text:p>62490.43</text:p>
              </table:table-cell>
              <table:table-cell office:value-type="float" office:value="23.81744">
                <text:p>23.81744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495.99">
                <text:p>62495.99</text:p>
              </table:table-cell>
              <table:table-cell office:value-type="float" office:value="29.71989">
                <text:p>29.71989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536.33">
                <text:p>62536.33</text:p>
              </table:table-cell>
              <table:table-cell office:value-type="float" office:value="24.68978">
                <text:p>24.68978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489.4">
                <text:p>62489.4</text:p>
              </table:table-cell>
              <table:table-cell office:value-type="float" office:value="13.88493">
                <text:p>13.88493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494.01">
                <text:p>62494.01</text:p>
              </table:table-cell>
              <table:table-cell office:value-type="float" office:value="20.94614">
                <text:p>20.94614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505.09">
                <text:p>62505.09</text:p>
              </table:table-cell>
              <table:table-cell office:value-type="float" office:value="10.74767">
                <text:p>10.74767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511.02">
                <text:p>62511.02</text:p>
              </table:table-cell>
              <table:table-cell office:value-type="float" office:value="8.5688">
                <text:p>8.568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526">
                <text:p>62526</text:p>
              </table:table-cell>
              <table:table-cell office:value-type="float" office:value="34.09003">
                <text:p>34.09003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61.43">
                <text:p>62561.43</text:p>
              </table:table-cell>
              <table:table-cell office:value-type="float" office:value="19.3661">
                <text:p>19.3661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563.93">
                <text:p>62563.93</text:p>
              </table:table-cell>
              <table:table-cell office:value-type="float" office:value="7.55584">
                <text:p>7.5558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569.85">
                <text:p>62569.85</text:p>
              </table:table-cell>
              <table:table-cell office:value-type="float" office:value="11.39391">
                <text:p>11.39391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558.93">
                <text:p>62558.93</text:p>
              </table:table-cell>
              <table:table-cell office:value-type="float" office:value="9.83427">
                <text:p>9.83427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573.98">
                <text:p>62573.98</text:p>
              </table:table-cell>
              <table:table-cell office:value-type="float" office:value="3.66958">
                <text:p>3.6695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607.35">
                <text:p>62607.35</text:p>
              </table:table-cell>
              <table:table-cell office:value-type="float" office:value="18.39556">
                <text:p>18.39556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592.59">
                <text:p>62592.59</text:p>
              </table:table-cell>
              <table:table-cell office:value-type="float" office:value="15.94586">
                <text:p>15.94586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609.32">
                <text:p>62609.32</text:p>
              </table:table-cell>
              <table:table-cell office:value-type="float" office:value="10.21794">
                <text:p>10.21794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600.02">
                <text:p>62600.02</text:p>
              </table:table-cell>
              <table:table-cell office:value-type="float" office:value="14.90294">
                <text:p>14.9029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99.43">
                <text:p>62599.43</text:p>
              </table:table-cell>
              <table:table-cell office:value-type="float" office:value="9.4954">
                <text:p>9.4954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624.52">
                <text:p>62624.52</text:p>
              </table:table-cell>
              <table:table-cell office:value-type="float" office:value="16.79477">
                <text:p>16.7947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638.02">
                <text:p>62638.02</text:p>
              </table:table-cell>
              <table:table-cell office:value-type="float" office:value="18.95241">
                <text:p>18.95241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604">
                <text:p>62604</text:p>
              </table:table-cell>
              <table:table-cell office:value-type="float" office:value="15.44677">
                <text:p>15.4467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595.1">
                <text:p>62595.1</text:p>
              </table:table-cell>
              <table:table-cell office:value-type="float" office:value="14.9721">
                <text:p>14.9721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648.26">
                <text:p>62648.26</text:p>
              </table:table-cell>
              <table:table-cell office:value-type="float" office:value="30.77446">
                <text:p>30.77446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711.28">
                <text:p>62711.28</text:p>
              </table:table-cell>
              <table:table-cell office:value-type="float" office:value="59.42169">
                <text:p>59.42169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662">
                <text:p>62662</text:p>
              </table:table-cell>
              <table:table-cell office:value-type="float" office:value="24.87326">
                <text:p>24.87326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610.01">
                <text:p>62610.01</text:p>
              </table:table-cell>
              <table:table-cell office:value-type="float" office:value="19.33838">
                <text:p>19.33838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584.01">
                <text:p>62584.01</text:p>
              </table:table-cell>
              <table:table-cell office:value-type="float" office:value="7.90121">
                <text:p>7.90121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568.87">
                <text:p>62568.87</text:p>
              </table:table-cell>
              <table:table-cell office:value-type="float" office:value="14.64348">
                <text:p>14.64348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554.01">
                <text:p>62554.01</text:p>
              </table:table-cell>
              <table:table-cell office:value-type="float" office:value="23.69327">
                <text:p>23.69327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564.01">
                <text:p>62564.01</text:p>
              </table:table-cell>
              <table:table-cell office:value-type="float" office:value="7.9538">
                <text:p>7.9538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569.26">
                <text:p>62569.26</text:p>
              </table:table-cell>
              <table:table-cell office:value-type="float" office:value="13.28064">
                <text:p>13.28064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638.02">
                <text:p>62638.02</text:p>
              </table:table-cell>
              <table:table-cell office:value-type="float" office:value="12.06961">
                <text:p>12.06961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633.99">
                <text:p>62633.99</text:p>
              </table:table-cell>
              <table:table-cell office:value-type="float" office:value="9.98477">
                <text:p>9.98477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684.32">
                <text:p>62684.32</text:p>
              </table:table-cell>
              <table:table-cell office:value-type="float" office:value="15.01271">
                <text:p>15.01271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710.82">
                <text:p>62710.82</text:p>
              </table:table-cell>
              <table:table-cell office:value-type="float" office:value="22.32142">
                <text:p>22.32142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644.76">
                <text:p>62644.76</text:p>
              </table:table-cell>
              <table:table-cell office:value-type="float" office:value="41.31309">
                <text:p>41.31309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673.84">
                <text:p>62673.84</text:p>
              </table:table-cell>
              <table:table-cell office:value-type="float" office:value="11.13964">
                <text:p>11.13964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635.27">
                <text:p>62635.27</text:p>
              </table:table-cell>
              <table:table-cell office:value-type="float" office:value="26.8622">
                <text:p>26.8622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647.84">
                <text:p>62647.84</text:p>
              </table:table-cell>
              <table:table-cell office:value-type="float" office:value="20.54095">
                <text:p>20.54095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664.01">
                <text:p>62664.01</text:p>
              </table:table-cell>
              <table:table-cell office:value-type="float" office:value="16.99188">
                <text:p>16.99188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96">
                <text:p>62696</text:p>
              </table:table-cell>
              <table:table-cell office:value-type="float" office:value="8.09924">
                <text:p>8.09924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672.4">
                <text:p>62672.4</text:p>
              </table:table-cell>
              <table:table-cell office:value-type="float" office:value="25.15233">
                <text:p>25.1523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665.95">
                <text:p>62665.95</text:p>
              </table:table-cell>
              <table:table-cell office:value-type="float" office:value="13.78938">
                <text:p>13.78938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709.28">
                <text:p>62709.28</text:p>
              </table:table-cell>
              <table:table-cell office:value-type="float" office:value="23.1195">
                <text:p>23.1195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690.79">
                <text:p>62690.79</text:p>
              </table:table-cell>
              <table:table-cell office:value-type="float" office:value="30.25188">
                <text:p>30.25188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844">
                <text:p>62844</text:p>
              </table:table-cell>
              <table:table-cell office:value-type="float" office:value="252.81429">
                <text:p>252.81429</text:p>
              </table:table-cell>
              <table:table-cell office:value-type="float" office:value="38779">
                <text:p>38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816.29">
                <text:p>62816.29</text:p>
              </table:table-cell>
              <table:table-cell office:value-type="float" office:value="57.48029">
                <text:p>57.48029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825.53">
                <text:p>62825.53</text:p>
              </table:table-cell>
              <table:table-cell office:value-type="float" office:value="37.22333">
                <text:p>37.22333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864.14">
                <text:p>62864.14</text:p>
              </table:table-cell>
              <table:table-cell office:value-type="float" office:value="54.11146">
                <text:p>54.11146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862.94">
                <text:p>62862.94</text:p>
              </table:table-cell>
              <table:table-cell office:value-type="float" office:value="47.93716">
                <text:p>47.93716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917.1">
                <text:p>62917.1</text:p>
              </table:table-cell>
              <table:table-cell office:value-type="float" office:value="78.18448">
                <text:p>78.18448</text:p>
              </table:table-cell>
              <table:table-cell office:value-type="float" office:value="12874">
                <text:p>12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903.22">
                <text:p>62903.22</text:p>
              </table:table-cell>
              <table:table-cell office:value-type="float" office:value="51.77891">
                <text:p>51.77891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941.27">
                <text:p>62941.27</text:p>
              </table:table-cell>
              <table:table-cell office:value-type="float" office:value="71.7218">
                <text:p>71.7218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871.42">
                <text:p>62871.42</text:p>
              </table:table-cell>
              <table:table-cell office:value-type="float" office:value="43.4126">
                <text:p>43.4126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935.67">
                <text:p>62935.67</text:p>
              </table:table-cell>
              <table:table-cell office:value-type="float" office:value="23.5745">
                <text:p>23.5745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882.24">
                <text:p>62882.24</text:p>
              </table:table-cell>
              <table:table-cell office:value-type="float" office:value="52.73612">
                <text:p>52.7361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897.99">
                <text:p>62897.99</text:p>
              </table:table-cell>
              <table:table-cell office:value-type="float" office:value="42.82836">
                <text:p>42.82836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865.71">
                <text:p>62865.71</text:p>
              </table:table-cell>
              <table:table-cell office:value-type="float" office:value="22.29267">
                <text:p>22.29267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798.87">
                <text:p>62798.87</text:p>
              </table:table-cell>
              <table:table-cell office:value-type="float" office:value="28.99451">
                <text:p>28.99451</text:p>
              </table:table-cell>
              <table:table-cell office:value-type="float" office:value="9321">
                <text:p>9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847.99">
                <text:p>62847.99</text:p>
              </table:table-cell>
              <table:table-cell office:value-type="float" office:value="34.46564">
                <text:p>34.46564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873.05">
                <text:p>62873.05</text:p>
              </table:table-cell>
              <table:table-cell office:value-type="float" office:value="34.87704">
                <text:p>34.87704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906.18">
                <text:p>62906.18</text:p>
              </table:table-cell>
              <table:table-cell office:value-type="float" office:value="39.49801">
                <text:p>39.49801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914.01">
                <text:p>62914.01</text:p>
              </table:table-cell>
              <table:table-cell office:value-type="float" office:value="40.74715">
                <text:p>40.74715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908.36">
                <text:p>62908.36</text:p>
              </table:table-cell>
              <table:table-cell office:value-type="float" office:value="14.49466">
                <text:p>14.49466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882">
                <text:p>62882</text:p>
              </table:table-cell>
              <table:table-cell office:value-type="float" office:value="24.09097">
                <text:p>24.09097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956.52">
                <text:p>62956.52</text:p>
              </table:table-cell>
              <table:table-cell office:value-type="float" office:value="19.22452">
                <text:p>19.22452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910.01">
                <text:p>62910.01</text:p>
              </table:table-cell>
              <table:table-cell office:value-type="float" office:value="49.42315">
                <text:p>49.42315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829.99">
                <text:p>62829.99</text:p>
              </table:table-cell>
              <table:table-cell office:value-type="float" office:value="87.35119">
                <text:p>87.35119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899.99">
                <text:p>62899.99</text:p>
              </table:table-cell>
              <table:table-cell office:value-type="float" office:value="68.17427">
                <text:p>68.17427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921.99">
                <text:p>62921.99</text:p>
              </table:table-cell>
              <table:table-cell office:value-type="float" office:value="22.35071">
                <text:p>22.3507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922.01">
                <text:p>62922.01</text:p>
              </table:table-cell>
              <table:table-cell office:value-type="float" office:value="35.29153">
                <text:p>35.29153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923.88">
                <text:p>62923.88</text:p>
              </table:table-cell>
              <table:table-cell office:value-type="float" office:value="7.57634">
                <text:p>7.57634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980.13">
                <text:p>62980.13</text:p>
              </table:table-cell>
              <table:table-cell office:value-type="float" office:value="22.41222">
                <text:p>22.4122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051.13">
                <text:p>63051.13</text:p>
              </table:table-cell>
              <table:table-cell office:value-type="float" office:value="40.63078">
                <text:p>40.63078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3120.04">
                <text:p>63120.04</text:p>
              </table:table-cell>
              <table:table-cell office:value-type="float" office:value="108.66215">
                <text:p>108.66215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134.01">
                <text:p>63134.01</text:p>
              </table:table-cell>
              <table:table-cell office:value-type="float" office:value="38.35647">
                <text:p>38.35647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164.7">
                <text:p>63164.7</text:p>
              </table:table-cell>
              <table:table-cell office:value-type="float" office:value="77.61122">
                <text:p>77.61122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336.01">
                <text:p>63336.01</text:p>
              </table:table-cell>
              <table:table-cell office:value-type="float" office:value="182.18519">
                <text:p>182.18519</text:p>
              </table:table-cell>
              <table:table-cell office:value-type="float" office:value="25723">
                <text:p>25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336.01">
                <text:p>63336.01</text:p>
              </table:table-cell>
              <table:table-cell office:value-type="float" office:value="84.96024">
                <text:p>84.96024</text:p>
              </table:table-cell>
              <table:table-cell office:value-type="float" office:value="18437">
                <text:p>18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239.45">
                <text:p>63239.45</text:p>
              </table:table-cell>
              <table:table-cell office:value-type="float" office:value="78.79911">
                <text:p>78.79911</text:p>
              </table:table-cell>
              <table:table-cell office:value-type="float" office:value="10777">
                <text:p>10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273.92">
                <text:p>63273.92</text:p>
              </table:table-cell>
              <table:table-cell office:value-type="float" office:value="18.99474">
                <text:p>18.99474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259.99">
                <text:p>63259.99</text:p>
              </table:table-cell>
              <table:table-cell office:value-type="float" office:value="26.97585">
                <text:p>26.97585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271.49">
                <text:p>63271.49</text:p>
              </table:table-cell>
              <table:table-cell office:value-type="float" office:value="63.76073">
                <text:p>63.76073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207.72">
                <text:p>63207.72</text:p>
              </table:table-cell>
              <table:table-cell office:value-type="float" office:value="18.796">
                <text:p>18.796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178.38">
                <text:p>63178.38</text:p>
              </table:table-cell>
              <table:table-cell office:value-type="float" office:value="14.90883">
                <text:p>14.90883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137.45">
                <text:p>63137.45</text:p>
              </table:table-cell>
              <table:table-cell office:value-type="float" office:value="28.52244">
                <text:p>28.52244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127.68">
                <text:p>63127.68</text:p>
              </table:table-cell>
              <table:table-cell office:value-type="float" office:value="11.28461">
                <text:p>11.28461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135.46">
                <text:p>63135.46</text:p>
              </table:table-cell>
              <table:table-cell office:value-type="float" office:value="81.44876">
                <text:p>81.44876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145.51">
                <text:p>63145.51</text:p>
              </table:table-cell>
              <table:table-cell office:value-type="float" office:value="28.48401">
                <text:p>28.48401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150">
                <text:p>63150</text:p>
              </table:table-cell>
              <table:table-cell office:value-type="float" office:value="15.60314">
                <text:p>15.60314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74.79">
                <text:p>63174.79</text:p>
              </table:table-cell>
              <table:table-cell office:value-type="float" office:value="8.13567">
                <text:p>8.1356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224.38">
                <text:p>63224.38</text:p>
              </table:table-cell>
              <table:table-cell office:value-type="float" office:value="52.07247">
                <text:p>52.07247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214.09">
                <text:p>63214.09</text:p>
              </table:table-cell>
              <table:table-cell office:value-type="float" office:value="11.84589">
                <text:p>11.84589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230.01">
                <text:p>63230.01</text:p>
              </table:table-cell>
              <table:table-cell office:value-type="float" office:value="19.89637">
                <text:p>19.89637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211.44">
                <text:p>63211.44</text:p>
              </table:table-cell>
              <table:table-cell office:value-type="float" office:value="23.51421">
                <text:p>23.5142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280">
                <text:p>63280</text:p>
              </table:table-cell>
              <table:table-cell office:value-type="float" office:value="25.48494">
                <text:p>25.48494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297.42">
                <text:p>63297.42</text:p>
              </table:table-cell>
              <table:table-cell office:value-type="float" office:value="32.80271">
                <text:p>32.80271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359.99">
                <text:p>63359.99</text:p>
              </table:table-cell>
              <table:table-cell office:value-type="float" office:value="29.99674">
                <text:p>29.99674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306.57">
                <text:p>63306.57</text:p>
              </table:table-cell>
              <table:table-cell office:value-type="float" office:value="42.20439">
                <text:p>42.20439</text:p>
              </table:table-cell>
              <table:table-cell office:value-type="float" office:value="12453">
                <text:p>124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357.03">
                <text:p>63357.03</text:p>
              </table:table-cell>
              <table:table-cell office:value-type="float" office:value="15.56026">
                <text:p>15.56026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336">
                <text:p>63336</text:p>
              </table:table-cell>
              <table:table-cell office:value-type="float" office:value="67.70963">
                <text:p>67.70963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323.92">
                <text:p>63323.92</text:p>
              </table:table-cell>
              <table:table-cell office:value-type="float" office:value="18.31934">
                <text:p>18.31934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301.99">
                <text:p>63301.99</text:p>
              </table:table-cell>
              <table:table-cell office:value-type="float" office:value="12.95288">
                <text:p>12.95288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371.99">
                <text:p>63371.99</text:p>
              </table:table-cell>
              <table:table-cell office:value-type="float" office:value="20.59276">
                <text:p>20.59276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328">
                <text:p>63328</text:p>
              </table:table-cell>
              <table:table-cell office:value-type="float" office:value="16.10604">
                <text:p>16.10604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342.85">
                <text:p>63342.85</text:p>
              </table:table-cell>
              <table:table-cell office:value-type="float" office:value="8.80888">
                <text:p>8.8088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328.01">
                <text:p>63328.01</text:p>
              </table:table-cell>
              <table:table-cell office:value-type="float" office:value="15.72414">
                <text:p>15.72414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206.01">
                <text:p>63206.01</text:p>
              </table:table-cell>
              <table:table-cell office:value-type="float" office:value="54.20093">
                <text:p>54.20093</text:p>
              </table:table-cell>
              <table:table-cell office:value-type="float" office:value="13261">
                <text:p>13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182">
                <text:p>63182</text:p>
              </table:table-cell>
              <table:table-cell office:value-type="float" office:value="24.64713">
                <text:p>24.6471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194">
                <text:p>63194</text:p>
              </table:table-cell>
              <table:table-cell office:value-type="float" office:value="51.28439">
                <text:p>51.28439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267.47">
                <text:p>63267.47</text:p>
              </table:table-cell>
              <table:table-cell office:value-type="float" office:value="7.6035">
                <text:p>7.6035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258.46">
                <text:p>63258.46</text:p>
              </table:table-cell>
              <table:table-cell office:value-type="float" office:value="43.06233">
                <text:p>43.06233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319.99">
                <text:p>63319.99</text:p>
              </table:table-cell>
              <table:table-cell office:value-type="float" office:value="27.21592">
                <text:p>27.21592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308.01">
                <text:p>63308.01</text:p>
              </table:table-cell>
              <table:table-cell office:value-type="float" office:value="5.88727">
                <text:p>5.8872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293.71">
                <text:p>63293.71</text:p>
              </table:table-cell>
              <table:table-cell office:value-type="float" office:value="26.66117">
                <text:p>26.66117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206">
                <text:p>63206</text:p>
              </table:table-cell>
              <table:table-cell office:value-type="float" office:value="7.75506">
                <text:p>7.75506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244">
                <text:p>63244</text:p>
              </table:table-cell>
              <table:table-cell office:value-type="float" office:value="21.92294">
                <text:p>21.92294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279.99">
                <text:p>63279.99</text:p>
              </table:table-cell>
              <table:table-cell office:value-type="float" office:value="18.1822">
                <text:p>18.1822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369.16">
                <text:p>63369.16</text:p>
              </table:table-cell>
              <table:table-cell office:value-type="float" office:value="15.09638">
                <text:p>15.09638</text:p>
              </table:table-cell>
              <table:table-cell office:value-type="float" office:value="7763">
                <text:p>7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396.01">
                <text:p>63396.01</text:p>
              </table:table-cell>
              <table:table-cell office:value-type="float" office:value="21.65589">
                <text:p>21.65589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402.5">
                <text:p>63402.5</text:p>
              </table:table-cell>
              <table:table-cell office:value-type="float" office:value="24.75205">
                <text:p>24.75205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439.99">
                <text:p>63439.99</text:p>
              </table:table-cell>
              <table:table-cell office:value-type="float" office:value="32.18757">
                <text:p>32.1875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362.22">
                <text:p>63362.22</text:p>
              </table:table-cell>
              <table:table-cell office:value-type="float" office:value="29.29827">
                <text:p>29.29827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339.33">
                <text:p>63339.33</text:p>
              </table:table-cell>
              <table:table-cell office:value-type="float" office:value="9.02692">
                <text:p>9.02692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298.35">
                <text:p>63298.35</text:p>
              </table:table-cell>
              <table:table-cell office:value-type="float" office:value="12.1926">
                <text:p>12.1926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283.99">
                <text:p>63283.99</text:p>
              </table:table-cell>
              <table:table-cell office:value-type="float" office:value="27.03964">
                <text:p>27.03964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29.43">
                <text:p>63329.43</text:p>
              </table:table-cell>
              <table:table-cell office:value-type="float" office:value="18.09603">
                <text:p>18.09603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298.01">
                <text:p>63298.01</text:p>
              </table:table-cell>
              <table:table-cell office:value-type="float" office:value="14.86008">
                <text:p>14.86008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254.01">
                <text:p>63254.01</text:p>
              </table:table-cell>
              <table:table-cell office:value-type="float" office:value="8.73832">
                <text:p>8.7383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216.61">
                <text:p>63216.61</text:p>
              </table:table-cell>
              <table:table-cell office:value-type="float" office:value="15.01984">
                <text:p>15.01984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260">
                <text:p>63260</text:p>
              </table:table-cell>
              <table:table-cell office:value-type="float" office:value="22.79518">
                <text:p>22.79518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256.3">
                <text:p>63256.3</text:p>
              </table:table-cell>
              <table:table-cell office:value-type="float" office:value="10.32485">
                <text:p>10.32485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206">
                <text:p>63206</text:p>
              </table:table-cell>
              <table:table-cell office:value-type="float" office:value="14.21942">
                <text:p>14.21942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229.28">
                <text:p>63229.28</text:p>
              </table:table-cell>
              <table:table-cell office:value-type="float" office:value="37.69143">
                <text:p>37.69143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3242">
                <text:p>63242</text:p>
              </table:table-cell>
              <table:table-cell office:value-type="float" office:value="27.96476">
                <text:p>27.96476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205.99">
                <text:p>63205.99</text:p>
              </table:table-cell>
              <table:table-cell office:value-type="float" office:value="7.51718">
                <text:p>7.5171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168.01">
                <text:p>63168.01</text:p>
              </table:table-cell>
              <table:table-cell office:value-type="float" office:value="44.38857">
                <text:p>44.38857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198.92">
                <text:p>63198.92</text:p>
              </table:table-cell>
              <table:table-cell office:value-type="float" office:value="112.02842">
                <text:p>112.02842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190.39">
                <text:p>63190.39</text:p>
              </table:table-cell>
              <table:table-cell office:value-type="float" office:value="49.13226">
                <text:p>49.132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122.58">
                <text:p>63122.58</text:p>
              </table:table-cell>
              <table:table-cell office:value-type="float" office:value="143.03967">
                <text:p>143.03967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204">
                <text:p>63204</text:p>
              </table:table-cell>
              <table:table-cell office:value-type="float" office:value="74.41984">
                <text:p>74.41984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156.31">
                <text:p>63156.31</text:p>
              </table:table-cell>
              <table:table-cell office:value-type="float" office:value="89.09794">
                <text:p>89.09794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967.67">
                <text:p>62967.67</text:p>
              </table:table-cell>
              <table:table-cell office:value-type="float" office:value="93.43868">
                <text:p>93.43868</text:p>
              </table:table-cell>
              <table:table-cell office:value-type="float" office:value="15228">
                <text:p>152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054.89">
                <text:p>63054.89</text:p>
              </table:table-cell>
              <table:table-cell office:value-type="float" office:value="27.81171">
                <text:p>27.81171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093.99">
                <text:p>63093.99</text:p>
              </table:table-cell>
              <table:table-cell office:value-type="float" office:value="7.7989">
                <text:p>7.7989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147.99">
                <text:p>63147.99</text:p>
              </table:table-cell>
              <table:table-cell office:value-type="float" office:value="17.38374">
                <text:p>17.38374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140.4">
                <text:p>63140.4</text:p>
              </table:table-cell>
              <table:table-cell office:value-type="float" office:value="13.43043">
                <text:p>13.43043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148.01">
                <text:p>63148.01</text:p>
              </table:table-cell>
              <table:table-cell office:value-type="float" office:value="9.1189">
                <text:p>9.1189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226">
                <text:p>63226</text:p>
              </table:table-cell>
              <table:table-cell office:value-type="float" office:value="32.75776">
                <text:p>32.75776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178">
                <text:p>63178</text:p>
              </table:table-cell>
              <table:table-cell office:value-type="float" office:value="63.27374">
                <text:p>63.27374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166.2">
                <text:p>63166.2</text:p>
              </table:table-cell>
              <table:table-cell office:value-type="float" office:value="154.28972">
                <text:p>154.28972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043.99">
                <text:p>63043.99</text:p>
              </table:table-cell>
              <table:table-cell office:value-type="float" office:value="21.40354">
                <text:p>21.40354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071.61">
                <text:p>63071.61</text:p>
              </table:table-cell>
              <table:table-cell office:value-type="float" office:value="27.93725">
                <text:p>27.93725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037.48">
                <text:p>63037.48</text:p>
              </table:table-cell>
              <table:table-cell office:value-type="float" office:value="15.575">
                <text:p>15.575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037.19">
                <text:p>63037.19</text:p>
              </table:table-cell>
              <table:table-cell office:value-type="float" office:value="24.86635">
                <text:p>24.86635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991.01">
                <text:p>62991.01</text:p>
              </table:table-cell>
              <table:table-cell office:value-type="float" office:value="21.7345">
                <text:p>21.7345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047.99">
                <text:p>63047.99</text:p>
              </table:table-cell>
              <table:table-cell office:value-type="float" office:value="20.5636">
                <text:p>20.5636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019.44">
                <text:p>63019.44</text:p>
              </table:table-cell>
              <table:table-cell office:value-type="float" office:value="20.81466">
                <text:p>20.81466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021.99">
                <text:p>63021.99</text:p>
              </table:table-cell>
              <table:table-cell office:value-type="float" office:value="12.96738">
                <text:p>12.96738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111.36">
                <text:p>63111.36</text:p>
              </table:table-cell>
              <table:table-cell office:value-type="float" office:value="17.43548">
                <text:p>17.43548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098.01">
                <text:p>63098.01</text:p>
              </table:table-cell>
              <table:table-cell office:value-type="float" office:value="42.9607">
                <text:p>42.9607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882.53">
                <text:p>62882.53</text:p>
              </table:table-cell>
              <table:table-cell office:value-type="float" office:value="20.86451">
                <text:p>20.86451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868.58">
                <text:p>62868.58</text:p>
              </table:table-cell>
              <table:table-cell office:value-type="float" office:value="21.11398">
                <text:p>21.11398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877.39">
                <text:p>62877.39</text:p>
              </table:table-cell>
              <table:table-cell office:value-type="float" office:value="18.80016">
                <text:p>18.80016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850">
                <text:p>62850</text:p>
              </table:table-cell>
              <table:table-cell office:value-type="float" office:value="16.18172">
                <text:p>16.18172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793.75">
                <text:p>62793.75</text:p>
              </table:table-cell>
              <table:table-cell office:value-type="float" office:value="57.18471">
                <text:p>57.18471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745.22">
                <text:p>62745.22</text:p>
              </table:table-cell>
              <table:table-cell office:value-type="float" office:value="48.80751">
                <text:p>48.80751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690.01">
                <text:p>62690.01</text:p>
              </table:table-cell>
              <table:table-cell office:value-type="float" office:value="69.36906">
                <text:p>69.36906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630.86">
                <text:p>62630.86</text:p>
              </table:table-cell>
              <table:table-cell office:value-type="float" office:value="99.60556">
                <text:p>99.6055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688.01">
                <text:p>62688.01</text:p>
              </table:table-cell>
              <table:table-cell office:value-type="float" office:value="58.06688">
                <text:p>58.06688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637.53">
                <text:p>62637.53</text:p>
              </table:table-cell>
              <table:table-cell office:value-type="float" office:value="27.62921">
                <text:p>27.62921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676.13">
                <text:p>62676.13</text:p>
              </table:table-cell>
              <table:table-cell office:value-type="float" office:value="36.23219">
                <text:p>36.23219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664.76">
                <text:p>62664.76</text:p>
              </table:table-cell>
              <table:table-cell office:value-type="float" office:value="24.68841">
                <text:p>24.68841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771.98">
                <text:p>62771.98</text:p>
              </table:table-cell>
              <table:table-cell office:value-type="float" office:value="66.79438">
                <text:p>66.79438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826">
                <text:p>62826</text:p>
              </table:table-cell>
              <table:table-cell office:value-type="float" office:value="84.31517">
                <text:p>84.31517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840">
                <text:p>62840</text:p>
              </table:table-cell>
              <table:table-cell office:value-type="float" office:value="37.28627">
                <text:p>37.28627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850.59">
                <text:p>62850.59</text:p>
              </table:table-cell>
              <table:table-cell office:value-type="float" office:value="50.92393">
                <text:p>50.92393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859.45">
                <text:p>62859.45</text:p>
              </table:table-cell>
              <table:table-cell office:value-type="float" office:value="35.09387">
                <text:p>35.09387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882.02">
                <text:p>62882.02</text:p>
              </table:table-cell>
              <table:table-cell office:value-type="float" office:value="31.41297">
                <text:p>31.4129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940.3">
                <text:p>62940.3</text:p>
              </table:table-cell>
              <table:table-cell office:value-type="float" office:value="40.61021">
                <text:p>40.61021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007.34">
                <text:p>63007.34</text:p>
              </table:table-cell>
              <table:table-cell office:value-type="float" office:value="43.23483">
                <text:p>43.23483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926.79">
                <text:p>62926.79</text:p>
              </table:table-cell>
              <table:table-cell office:value-type="float" office:value="43.03432">
                <text:p>43.03432</text:p>
              </table:table-cell>
              <table:table-cell office:value-type="float" office:value="13466">
                <text:p>134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867.81">
                <text:p>62867.81</text:p>
              </table:table-cell>
              <table:table-cell office:value-type="float" office:value="41.59615">
                <text:p>41.59615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822">
                <text:p>62822</text:p>
              </table:table-cell>
              <table:table-cell office:value-type="float" office:value="40.31308">
                <text:p>40.31308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820.91">
                <text:p>62820.91</text:p>
              </table:table-cell>
              <table:table-cell office:value-type="float" office:value="23.66762">
                <text:p>23.66762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874">
                <text:p>62874</text:p>
              </table:table-cell>
              <table:table-cell office:value-type="float" office:value="23.67119">
                <text:p>23.67119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826.01">
                <text:p>62826.01</text:p>
              </table:table-cell>
              <table:table-cell office:value-type="float" office:value="39.33648">
                <text:p>39.33648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07.69">
                <text:p>62807.69</text:p>
              </table:table-cell>
              <table:table-cell office:value-type="float" office:value="15.16967">
                <text:p>15.1696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830.2">
                <text:p>62830.2</text:p>
              </table:table-cell>
              <table:table-cell office:value-type="float" office:value="34.5668">
                <text:p>34.5668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avg-15" chart:regression-max-degree="2" chart:regression-force-intercept="false" chart:regression-intercept-value="0" chart:regression-period="15" loext:regression-extrapolate-forward="0" loext:regression-extrapolate-backward="0" chart:regression-type="moving-average"/>
      <style:graphic-properties svg:stroke-color="#00a933"/>
    </style:style>
    <style:style style:name="ch11" style:family="chart">
      <style:chart-properties chart:regression-name="poly-9" chart:regression-max-degree="9" chart:regression-force-intercept="false" chart:regression-intercept-value="0" chart:regression-period="2" loext:regression-extrapolate-forward="0" loext:regression-extrapolate-backward="0" chart:regression-type="polynomial"/>
      <style:graphic-properties svg:stroke-color="#a7074b"/>
    </style:style>
    <style:style style:name="ch12" style:family="chart">
      <style:chart-properties chart:regression-name="poly-5" chart:regression-max-degree="5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d281e"/>
    </style:style>
    <style:style style:name="ch13" style:family="chart">
      <style:chart-properties chart:regression-moving-type="prior" chart:regression-name="avg-6" chart:regression-max-degree="2" chart:regression-force-intercept="false" chart:regression-intercept-value="0" chart:regression-period="6" loext:regression-extrapolate-forward="0" loext:regression-extrapolate-backward="0" chart:regression-type="moving-average"/>
      <style:graphic-properties svg:stroke-color="#127622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02cm" svg:height="14.902cm" xlink:href=".." xlink:type="simple" chart:class="chart:line" chart:style-name="ch1">
        <chart:legend chart:legend-position="bottom" svg:x="6.897cm" svg:y="14.303cm" style:legend-expansion="wide" chart:style-name="ch2"/>
        <chart:plot-area chart:style-name="ch3" svg:x="0.558cm" svg:y="0.298cm" svg:width="26.786cm" svg:height="13.523cm">
          <chart:coordinate-region svg:x="1.765cm" svg:y="0.498cm" svg:width="24.371cm" svg:height="12.3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rade_history.E2:trade_history.E297" chart:label-cell-address="trade_history.E1:trade_history.E1" chart:class="chart:line">
            <chart:data-point chart:repeated="296"/>
          </chart:series>
          <chart:series chart:attached-axis="secondary-y" chart:style-name="ch9" chart:values-cell-range-address="trade_history.G2:trade_history.G297" chart:label-cell-address="trade_history.G1:trade_history.G1" chart:class="chart:line">
            <chart:regression-curve chart:style-name="ch10"/>
            <chart:regression-curve chart:style-name="ch11"/>
            <chart:regression-curve chart:style-name="ch12"/>
            <chart:regression-curve chart:style-name="ch13"/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C_close</text:p>
                <draw:g>
                  <svg:desc>trade_history.E1:trade_history.E1</svg:desc>
                </draw:g>
              </table:table-cell>
              <table:table-cell office:value-type="string">
                <text:p>BTC_trades</text:p>
                <draw:g>
                  <svg:desc>trade_history.G1:trade_history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94.2">
                <text:p>62494.2</text:p>
                <draw:g>
                  <svg:desc>trade_history.E2:trade_history.E297</svg:desc>
                </draw:g>
              </table:table-cell>
              <table:table-cell office:value-type="float" office:value="6725">
                <text:p>6725</text:p>
                <draw:g>
                  <svg:desc>trade_history.G2:trade_history.G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51.99">
                <text:p>62451.99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489.99">
                <text:p>62489.99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00">
                <text:p>6250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61.4">
                <text:p>62561.4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50">
                <text:p>6255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68">
                <text:p>62568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503.03">
                <text:p>62503.03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531.99">
                <text:p>62531.9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74">
                <text:p>62574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57.99">
                <text:p>62557.99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565.99">
                <text:p>62565.99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53.98">
                <text:p>62553.98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720">
                <text:p>6272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718.8">
                <text:p>62718.8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82.01">
                <text:p>62682.01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683.57">
                <text:p>62683.57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628.2">
                <text:p>62628.2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26.81">
                <text:p>62626.81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642">
                <text:p>62642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99.99">
                <text:p>62699.99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633.21">
                <text:p>62633.21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19.99">
                <text:p>62619.99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706">
                <text:p>62706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666.86">
                <text:p>62666.8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676.01">
                <text:p>62676.01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690">
                <text:p>62690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07">
                <text:p>62707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702.01">
                <text:p>62702.01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660">
                <text:p>62660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605.98">
                <text:p>62605.98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09.3">
                <text:p>62609.3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586">
                <text:p>62586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70.01">
                <text:p>62570.0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505.16">
                <text:p>62505.16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514.74">
                <text:p>62514.74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517.84">
                <text:p>62517.84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13.63">
                <text:p>62513.63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564.55">
                <text:p>62564.55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579.55">
                <text:p>62579.55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546">
                <text:p>62546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451.97">
                <text:p>62451.97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488">
                <text:p>62488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529.33">
                <text:p>62529.33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485.39">
                <text:p>62485.39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437.09">
                <text:p>62437.09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416.7">
                <text:p>62416.7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359.21">
                <text:p>62359.21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491.64">
                <text:p>62491.64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459.09">
                <text:p>62459.09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487.99">
                <text:p>62487.99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472.01">
                <text:p>62472.01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508">
                <text:p>62508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03.99">
                <text:p>62503.99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486.85">
                <text:p>62486.85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489.72">
                <text:p>62489.72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38.63">
                <text:p>62538.63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30">
                <text:p>62530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63.34">
                <text:p>62563.34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546">
                <text:p>62546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550">
                <text:p>62550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492.18">
                <text:p>62492.18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3.99">
                <text:p>62523.99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535.88">
                <text:p>62535.88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588">
                <text:p>62588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572.91">
                <text:p>62572.9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550.91">
                <text:p>62550.91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550.92">
                <text:p>62550.9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18">
                <text:p>6251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20">
                <text:p>6252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580">
                <text:p>6258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570">
                <text:p>6257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558.7">
                <text:p>62558.7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605.54">
                <text:p>62605.54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590.71">
                <text:p>62590.71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615.99">
                <text:p>62615.99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39.15">
                <text:p>62639.1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597.41">
                <text:p>62597.41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40.01">
                <text:p>62540.01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54.31">
                <text:p>62554.31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550.01">
                <text:p>62550.01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483.79">
                <text:p>62483.79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472">
                <text:p>6247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460">
                <text:p>62460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64.23">
                <text:p>62464.23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420">
                <text:p>62420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437.81">
                <text:p>62437.81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488">
                <text:p>62488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497.49">
                <text:p>62497.49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502.07">
                <text:p>62502.0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490">
                <text:p>6249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465.75">
                <text:p>62465.75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460.8">
                <text:p>62460.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457.39">
                <text:p>62457.39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502.36">
                <text:p>62502.36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513.35">
                <text:p>62513.35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490.34">
                <text:p>62490.3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486.03">
                <text:p>62486.0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486.43">
                <text:p>62486.43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482.46">
                <text:p>62482.46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502.38">
                <text:p>62502.38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545.01">
                <text:p>62545.0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477.99">
                <text:p>62477.99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480.2">
                <text:p>62480.2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507.13">
                <text:p>62507.13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544.55">
                <text:p>62544.5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515.74">
                <text:p>62515.74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490.43">
                <text:p>62490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495.99">
                <text:p>62495.99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536.33">
                <text:p>62536.3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489.4">
                <text:p>62489.4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494.01">
                <text:p>62494.01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505.09">
                <text:p>62505.09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511.02">
                <text:p>62511.0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526">
                <text:p>62526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61.43">
                <text:p>62561.4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563.93">
                <text:p>62563.9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569.85">
                <text:p>62569.8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558.93">
                <text:p>62558.9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573.98">
                <text:p>62573.9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607.35">
                <text:p>62607.35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592.59">
                <text:p>62592.59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609.32">
                <text:p>62609.32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600.02">
                <text:p>62600.02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99.43">
                <text:p>62599.43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624.52">
                <text:p>62624.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638.02">
                <text:p>62638.02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604">
                <text:p>6260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595.1">
                <text:p>62595.1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648.26">
                <text:p>62648.26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711.28">
                <text:p>62711.28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662">
                <text:p>62662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610.01">
                <text:p>62610.01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584.01">
                <text:p>62584.01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568.87">
                <text:p>62568.87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554.01">
                <text:p>62554.01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564.01">
                <text:p>62564.0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569.26">
                <text:p>62569.26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638.02">
                <text:p>62638.02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633.99">
                <text:p>62633.9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684.32">
                <text:p>62684.32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710.82">
                <text:p>62710.82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644.76">
                <text:p>62644.76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673.84">
                <text:p>62673.84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635.27">
                <text:p>62635.2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647.84">
                <text:p>62647.84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664.01">
                <text:p>62664.01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96">
                <text:p>62696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672.4">
                <text:p>62672.4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665.95">
                <text:p>62665.95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709.28">
                <text:p>62709.28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690.79">
                <text:p>62690.79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844">
                <text:p>62844</text:p>
              </table:table-cell>
              <table:table-cell office:value-type="float" office:value="38779">
                <text:p>38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816.29">
                <text:p>62816.29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825.53">
                <text:p>62825.53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864.14">
                <text:p>62864.14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862.94">
                <text:p>62862.94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917.1">
                <text:p>62917.1</text:p>
              </table:table-cell>
              <table:table-cell office:value-type="float" office:value="12874">
                <text:p>12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903.22">
                <text:p>62903.22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941.27">
                <text:p>62941.27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871.42">
                <text:p>62871.42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935.67">
                <text:p>62935.67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882.24">
                <text:p>62882.24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897.99">
                <text:p>62897.99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865.71">
                <text:p>62865.71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798.87">
                <text:p>62798.87</text:p>
              </table:table-cell>
              <table:table-cell office:value-type="float" office:value="9321">
                <text:p>9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847.99">
                <text:p>62847.99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873.05">
                <text:p>62873.05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906.18">
                <text:p>62906.18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914.01">
                <text:p>62914.0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908.36">
                <text:p>62908.36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882">
                <text:p>62882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956.52">
                <text:p>62956.52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910.01">
                <text:p>62910.01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829.99">
                <text:p>62829.99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899.99">
                <text:p>62899.99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921.99">
                <text:p>62921.9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922.01">
                <text:p>62922.0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923.88">
                <text:p>62923.8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980.13">
                <text:p>62980.13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051.13">
                <text:p>63051.13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3120.04">
                <text:p>63120.04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134.01">
                <text:p>63134.01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164.7">
                <text:p>63164.7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336.01">
                <text:p>63336.01</text:p>
              </table:table-cell>
              <table:table-cell office:value-type="float" office:value="25723">
                <text:p>25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336.01">
                <text:p>63336.01</text:p>
              </table:table-cell>
              <table:table-cell office:value-type="float" office:value="18437">
                <text:p>18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239.45">
                <text:p>63239.45</text:p>
              </table:table-cell>
              <table:table-cell office:value-type="float" office:value="10777">
                <text:p>10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273.92">
                <text:p>63273.92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259.99">
                <text:p>63259.99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271.49">
                <text:p>63271.49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207.72">
                <text:p>63207.72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178.38">
                <text:p>63178.38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137.45">
                <text:p>63137.45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127.68">
                <text:p>63127.68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135.46">
                <text:p>63135.46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145.51">
                <text:p>63145.51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150">
                <text:p>63150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74.79">
                <text:p>63174.79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224.38">
                <text:p>63224.38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214.09">
                <text:p>63214.09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230.01">
                <text:p>63230.01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211.44">
                <text:p>63211.44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280">
                <text:p>63280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297.42">
                <text:p>63297.42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359.99">
                <text:p>63359.99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306.57">
                <text:p>63306.57</text:p>
              </table:table-cell>
              <table:table-cell office:value-type="float" office:value="12453">
                <text:p>124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357.03">
                <text:p>63357.03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336">
                <text:p>63336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323.92">
                <text:p>63323.92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301.99">
                <text:p>63301.99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371.99">
                <text:p>63371.99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328">
                <text:p>63328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342.85">
                <text:p>63342.85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328.01">
                <text:p>63328.01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206.01">
                <text:p>63206.01</text:p>
              </table:table-cell>
              <table:table-cell office:value-type="float" office:value="13261">
                <text:p>13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182">
                <text:p>63182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194">
                <text:p>63194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267.47">
                <text:p>63267.47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258.46">
                <text:p>63258.46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319.99">
                <text:p>63319.99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308.01">
                <text:p>63308.0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293.71">
                <text:p>63293.71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206">
                <text:p>63206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244">
                <text:p>63244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279.99">
                <text:p>63279.9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369.16">
                <text:p>63369.16</text:p>
              </table:table-cell>
              <table:table-cell office:value-type="float" office:value="7763">
                <text:p>7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396.01">
                <text:p>63396.01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402.5">
                <text:p>63402.5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439.99">
                <text:p>63439.99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362.22">
                <text:p>63362.22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339.33">
                <text:p>63339.33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298.35">
                <text:p>63298.35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283.99">
                <text:p>63283.99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29.43">
                <text:p>63329.43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298.01">
                <text:p>63298.01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254.01">
                <text:p>63254.01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216.61">
                <text:p>63216.61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260">
                <text:p>63260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256.3">
                <text:p>63256.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206">
                <text:p>6320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229.28">
                <text:p>63229.28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3242">
                <text:p>6324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205.99">
                <text:p>63205.9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168.01">
                <text:p>63168.01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198.92">
                <text:p>63198.92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190.39">
                <text:p>63190.39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122.58">
                <text:p>63122.58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204">
                <text:p>63204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156.31">
                <text:p>63156.31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967.67">
                <text:p>62967.67</text:p>
              </table:table-cell>
              <table:table-cell office:value-type="float" office:value="15228">
                <text:p>152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054.89">
                <text:p>63054.89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093.99">
                <text:p>63093.99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147.99">
                <text:p>63147.99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140.4">
                <text:p>63140.4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148.01">
                <text:p>63148.0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226">
                <text:p>63226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178">
                <text:p>63178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166.2">
                <text:p>63166.2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043.99">
                <text:p>63043.99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071.61">
                <text:p>63071.61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037.48">
                <text:p>63037.48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037.19">
                <text:p>63037.19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991.01">
                <text:p>62991.01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047.99">
                <text:p>63047.99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019.44">
                <text:p>63019.44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021.99">
                <text:p>63021.99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111.36">
                <text:p>63111.36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098.01">
                <text:p>63098.01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882.53">
                <text:p>62882.53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868.58">
                <text:p>62868.58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877.39">
                <text:p>62877.39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850">
                <text:p>62850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793.75">
                <text:p>62793.75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745.22">
                <text:p>62745.22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690.01">
                <text:p>62690.01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630.86">
                <text:p>62630.8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688.01">
                <text:p>62688.01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637.53">
                <text:p>62637.53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676.13">
                <text:p>62676.13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664.76">
                <text:p>62664.76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771.98">
                <text:p>62771.98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826">
                <text:p>62826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840">
                <text:p>6284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850.59">
                <text:p>62850.59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859.45">
                <text:p>62859.45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882.02">
                <text:p>62882.0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940.3">
                <text:p>62940.3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007.34">
                <text:p>63007.34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926.79">
                <text:p>62926.79</text:p>
              </table:table-cell>
              <table:table-cell office:value-type="float" office:value="13466">
                <text:p>134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867.81">
                <text:p>62867.81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822">
                <text:p>62822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820.91">
                <text:p>62820.91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874">
                <text:p>6287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826.01">
                <text:p>62826.01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07.69">
                <text:p>62807.69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830.2">
                <text:p>62830.2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